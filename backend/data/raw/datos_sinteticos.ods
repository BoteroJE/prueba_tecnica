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rlito" svg:font-family="Carli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0F766E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36"/>
    <style:style style:name="ce5" style:family="table-cell" style:parent-style-name="Default" style:data-style-name="N37"/>
    <style:style style:name="ce6" style:family="table-cell" style:parent-style-name="Default" style:data-style-name="N37"/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style:vertical-align="automatic" fo:wrap-option="wrap" fo:background-color="#CCFBF1"/>
      <style:text-properties fo:color="#115E59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fo:background-color="#0F766E" style:repeat-content="false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Default" style:data-style-name="N36"/>
    <style:style style:name="ce12" style:family="table-cell" style:parent-style-name="Default" style:data-style-name="N0">
      <style:table-cell-properties style:vertical-align="middle" fo:wrap-option="wrap" fo:background-color="#0F766E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6.56166666666667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5.29166666666667cm"/>
    </style:style>
    <style:style style:name="co12" style:family="table-column">
      <style:table-column-properties fo:break-before="auto" style:column-width="14.8166666666667cm"/>
    </style:style>
    <style:style style:name="co13" style:family="table-column">
      <style:table-column-properties fo:break-before="auto" style:column-width="4.65666666666667cm"/>
    </style:style>
    <style:style style:name="co14" style:family="table-column">
      <style:table-column-properties fo:break-before="auto" style:column-width="5.92666666666667cm"/>
    </style:style>
    <style:style style:name="co15" style:family="table-column">
      <style:table-column-properties fo:break-before="auto" style:column-width="13.7583333333333cm"/>
    </style:style>
    <style:style style:name="co16" style:family="table-column">
      <style:table-column-properties fo:break-before="auto" style:column-width="17.99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3" style:family="table-cell">
      <style:map style:condition="of:is-true-formula([.L2]=&quot;Alta&quot;)" style:apply-style-name="cf1" style:base-cell-address="Pacientes.L2"/>
      <style:map style:condition="of:is-true-formula([.L2]=&quot;Media&quot;)" style:apply-style-name="cf2" style:base-cell-address="Pacientes.L2"/>
      <style:map style:condition="of:is-true-formula([.L2]=&quot;Baja&quot;)" style:apply-style-name="cf3" style:base-cell-address="Pacientes.L2"/>
    </style:style>
    <style:style style:name="ce14" style:family="table-cell" style:parent-style-name="Default" style:data-style-name="N0">
      <style:map style:condition="of:is-true-formula([.L2]=&quot;Alta&quot;)" style:apply-style-name="cf1" style:base-cell-address="Pacientes.L2"/>
      <style:map style:condition="of:is-true-formula([.L2]=&quot;Media&quot;)" style:apply-style-name="cf2" style:base-cell-address="Pacientes.L2"/>
      <style:map style:condition="of:is-true-formula([.L2]=&quot;Baja&quot;)" style:apply-style-name="cf3" style:base-cell-address="Pacientes.L2"/>
    </style:style>
    <style:style style:name="ce15" style:family="table-cell">
      <style:map style:condition="of:is-true-formula([.M2]=&quot;Pendiente&quot;)" style:apply-style-name="cf4" style:base-cell-address="Pacientes.M2"/>
      <style:map style:condition="of:is-true-formula([.M2]=&quot;En atención&quot;)" style:apply-style-name="cf5" style:base-cell-address="Pacientes.M2"/>
      <style:map style:condition="of:is-true-formula([.M2]=&quot;Atendido&quot;)" style:apply-style-name="cf3" style:base-cell-address="Pacientes.M2"/>
    </style:style>
    <style:style style:name="ce16" style:family="table-cell" style:parent-style-name="Default" style:data-style-name="N0">
      <style:map style:condition="of:is-true-formula([.M2]=&quot;Pendiente&quot;)" style:apply-style-name="cf4" style:base-cell-address="Pacientes.M2"/>
      <style:map style:condition="of:is-true-formula([.M2]=&quot;En atención&quot;)" style:apply-style-name="cf5" style:base-cell-address="Pacientes.M2"/>
      <style:map style:condition="of:is-true-formula([.M2]=&quot;Atendido&quot;)" style:apply-style-name="cf3" style:base-cell-address="Pacientes.M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cient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9" table:default-cell-style-name="ce1"/>
        <table:table-column table:style-name="co5" table:number-columns-repeated="2" table:default-cell-style-name="ce1"/>
        <table:table-column table:style-name="co10" table:number-columns-repeated="16369" table:default-cell-style-name="ce1"/>
        <table:table-row table:style-name="ro1">
          <table:table-cell office:value-type="string" table:style-name="ce10">
            <text:p>paciente_id</text:p>
          </table:table-cell>
          <table:table-cell office:value-type="string" table:style-name="ce10">
            <text:p>tipo_documento</text:p>
          </table:table-cell>
          <table:table-cell office:value-type="string" table:style-name="ce10">
            <text:p>documento</text:p>
          </table:table-cell>
          <table:table-cell office:value-type="string" table:style-name="ce10">
            <text:p>nombre_completo</text:p>
          </table:table-cell>
          <table:table-cell office:value-type="string" table:style-name="ce10">
            <text:p>fecha_nacimiento</text:p>
          </table:table-cell>
          <table:table-cell office:value-type="string" table:style-name="ce10">
            <text:p>genero</text:p>
          </table:table-cell>
          <table:table-cell office:value-type="string" table:style-name="ce10">
            <text:p>telefono</text:p>
          </table:table-cell>
          <table:table-cell office:value-type="string" table:style-name="ce10">
            <text:p>correo</text:p>
          </table:table-cell>
          <table:table-cell office:value-type="string" table:style-name="ce10">
            <text:p>eps_codigo</text:p>
          </table:table-cell>
          <table:table-cell office:value-type="string" table:style-name="ce10">
            <text:p>eps_nombre</text:p>
          </table:table-cell>
          <table:table-cell office:value-type="string" table:style-name="ce10">
            <text:p>ciudad</text:p>
          </table:table-cell>
          <table:table-cell office:value-type="string" table:style-name="ce10">
            <text:p>prioridad</text:p>
          </table:table-cell>
          <table:table-cell office:value-type="string" table:style-name="ce10">
            <text:p>estado</text:p>
          </table:table-cell>
          <table:table-cell office:value-type="string" table:style-name="ce10">
            <text:p>fecha_creacion</text:p>
          </table:table-cell>
          <table:table-cell office:value-type="string" table:style-name="ce10">
            <text:p>fecha_actualizacion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752937642</text:p>
          </table:table-cell>
          <table:table-cell office:value-type="string" table:style-name="ce1">
            <text:p>Mateo Castro Pérez</text:p>
          </table:table-cell>
          <table:table-cell office:value-type="date" office:date-value="1965-06-03T00:00:00" table:style-name="ce4">
            <text:p>1965-06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8577833</text:p>
          </table:table-cell>
          <table:table-cell office:value-type="string" table:style-name="ce1">
            <text:p>mateo.castro1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15T13:26:00" table:style-name="ce5">
            <text:p>2026-04-15 13:26</text:p>
          </table:table-cell>
          <table:table-cell office:value-type="date" office:date-value="2026-06-07T18:37:00" table:style-name="ce6">
            <text:p>2026-06-07 18:37</text:p>
          </table:table-cell>
          <table:table-cell table:number-columns-repeated="1636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39402725</text:p>
          </table:table-cell>
          <table:table-cell office:value-type="string" table:style-name="ce1">
            <text:p>Catalina Sara Vargas Restrepo</text:p>
          </table:table-cell>
          <table:table-cell office:value-type="date" office:date-value="1946-09-06T00:00:00" table:style-name="ce4">
            <text:p>1946-09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2433976</text:p>
          </table:table-cell>
          <table:table-cell office:value-type="string" table:style-name="ce1">
            <text:p>catalina.vargas2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6-14T07:34:00" table:style-name="ce5">
            <text:p>2026-06-14 07:34</text:p>
          </table:table-cell>
          <table:table-cell office:value-type="date" office:date-value="2026-06-26T03:41:00" table:style-name="ce6">
            <text:p>2026-06-26 03:41</text:p>
          </table:table-cell>
          <table:table-cell table:number-columns-repeated="1636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1928630</text:p>
          </table:table-cell>
          <table:table-cell office:value-type="string" table:style-name="ce1">
            <text:p>Alejandra Laura Rodríguez Cárdenas</text:p>
          </table:table-cell>
          <table:table-cell office:value-type="date" office:date-value="1999-05-25T00:00:00" table:style-name="ce4">
            <text:p>1999-05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1602891</text:p>
          </table:table-cell>
          <table:table-cell office:value-type="string" table:style-name="ce1">
            <text:p>alejandra.rodriguez3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23T03:32:00" table:style-name="ce5">
            <text:p>2026-04-23 03:32</text:p>
          </table:table-cell>
          <table:table-cell office:value-type="date" office:date-value="2026-06-15T18:34:00" table:style-name="ce6">
            <text:p>2026-06-15 18:34</text:p>
          </table:table-cell>
          <table:table-cell table:number-columns-repeated="1636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22671032</text:p>
          </table:table-cell>
          <table:table-cell office:value-type="string" table:style-name="ce1">
            <text:p>José Díaz Silva</text:p>
          </table:table-cell>
          <table:table-cell office:value-type="date" office:date-value="1994-09-17T00:00:00" table:style-name="ce4">
            <text:p>1994-09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3218115</text:p>
          </table:table-cell>
          <table:table-cell office:value-type="string" table:style-name="ce1">
            <text:p>jose.diaz4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7-08T19:12:00" table:style-name="ce5">
            <text:p>2026-07-08 19:12</text:p>
          </table:table-cell>
          <table:table-cell office:value-type="date" office:date-value="2026-07-10T03:54:00" table:style-name="ce6">
            <text:p>2026-07-10 03:54</text:p>
          </table:table-cell>
          <table:table-cell table:number-columns-repeated="1636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59084469</text:p>
          </table:table-cell>
          <table:table-cell office:value-type="string" table:style-name="ce1">
            <text:p>Valentina Romero Torres</text:p>
          </table:table-cell>
          <table:table-cell office:value-type="date" office:date-value="2002-12-12T00:00:00" table:style-name="ce4">
            <text:p>2002-12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4526137</text:p>
          </table:table-cell>
          <table:table-cell office:value-type="string" table:style-name="ce1">
            <text:p>valentina.romero5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29T03:41:00" table:style-name="ce5">
            <text:p>2026-05-29 03:41</text:p>
          </table:table-cell>
          <table:table-cell office:value-type="date" office:date-value="2026-06-19T00:15:00" table:style-name="ce6">
            <text:p>2026-06-19 00:15</text:p>
          </table:table-cell>
          <table:table-cell table:number-columns-repeated="16369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0533028</text:p>
          </table:table-cell>
          <table:table-cell office:value-type="string" table:style-name="ce1">
            <text:p>David González Díaz</text:p>
          </table:table-cell>
          <table:table-cell office:value-type="date" office:date-value="1991-04-28T00:00:00" table:style-name="ce4">
            <text:p>1991-04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2027380</text:p>
          </table:table-cell>
          <table:table-cell office:value-type="string" table:style-name="ce1">
            <text:p>david.gonzalez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5-23T18:26:00" table:style-name="ce5">
            <text:p>2026-05-23 18:26</text:p>
          </table:table-cell>
          <table:table-cell office:value-type="date" office:date-value="2026-07-01T00:22:00" table:style-name="ce6">
            <text:p>2026-07-01 00:22</text:p>
          </table:table-cell>
          <table:table-cell table:number-columns-repeated="1636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5413704</text:p>
          </table:table-cell>
          <table:table-cell office:value-type="string" table:style-name="ce1">
            <text:p>Santiago Álvarez Quintero</text:p>
          </table:table-cell>
          <table:table-cell office:value-type="date" office:date-value="1987-02-27T00:00:00" table:style-name="ce4">
            <text:p>1987-02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9333453</text:p>
          </table:table-cell>
          <table:table-cell office:value-type="string" table:style-name="ce1">
            <text:p>santiago.alvarez7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08T23:07:00" table:style-name="ce5">
            <text:p>2026-05-08 23:07</text:p>
          </table:table-cell>
          <table:table-cell office:value-type="date" office:date-value="2026-06-19T11:24:00" table:style-name="ce6">
            <text:p>2026-06-19 11:24</text:p>
          </table:table-cell>
          <table:table-cell table:number-columns-repeated="1636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29883598</text:p>
          </table:table-cell>
          <table:table-cell office:value-type="string" table:style-name="ce1">
            <text:p>Nicolás Silva Moreno</text:p>
          </table:table-cell>
          <table:table-cell office:value-type="date" office:date-value="1995-06-11T00:00:00" table:style-name="ce4">
            <text:p>1995-06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7772855</text:p>
          </table:table-cell>
          <table:table-cell office:value-type="string" table:style-name="ce1">
            <text:p>nicolas.silva8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6-01T20:32:00" table:style-name="ce5">
            <text:p>2026-06-01 20:32</text:p>
          </table:table-cell>
          <table:table-cell office:value-type="date" office:date-value="2026-06-14T06:57:00" table:style-name="ce6">
            <text:p>2026-06-14 06:57</text:p>
          </table:table-cell>
          <table:table-cell table:number-columns-repeated="1636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58922771</text:p>
          </table:table-cell>
          <table:table-cell office:value-type="string" table:style-name="ce1">
            <text:p>Diana Valencia Romero</text:p>
          </table:table-cell>
          <table:table-cell office:value-type="date" office:date-value="1943-07-21T00:00:00" table:style-name="ce4">
            <text:p>1943-07-2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3014949</text:p>
          </table:table-cell>
          <table:table-cell office:value-type="string" table:style-name="ce1">
            <text:p>diana.valencia9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5-17T20:17:00" table:style-name="ce5">
            <text:p>2026-05-17 20:17</text:p>
          </table:table-cell>
          <table:table-cell office:value-type="date" office:date-value="2026-06-08T02:37:00" table:style-name="ce6">
            <text:p>2026-06-08 02:37</text:p>
          </table:table-cell>
          <table:table-cell table:number-columns-repeated="1636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83728718</text:p>
          </table:table-cell>
          <table:table-cell office:value-type="string" table:style-name="ce1">
            <text:p>Carolina Díaz Hernández</text:p>
          </table:table-cell>
          <table:table-cell office:value-type="date" office:date-value="1984-07-02T00:00:00" table:style-name="ce4">
            <text:p>1984-07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3902718</text:p>
          </table:table-cell>
          <table:table-cell office:value-type="string" table:style-name="ce1">
            <text:p>carolina.diaz10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07T08:48:00" table:style-name="ce5">
            <text:p>2026-04-07 08:48</text:p>
          </table:table-cell>
          <table:table-cell office:value-type="date" office:date-value="2026-05-10T20:17:00" table:style-name="ce6">
            <text:p>2026-05-10 20:17</text:p>
          </table:table-cell>
          <table:table-cell table:number-columns-repeated="16369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71778184</text:p>
          </table:table-cell>
          <table:table-cell office:value-type="string" table:style-name="ce1">
            <text:p>Daniela Carolina Valencia Jiménez</text:p>
          </table:table-cell>
          <table:table-cell office:value-type="date" office:date-value="1991-08-23T00:00:00" table:style-name="ce4">
            <text:p>1991-08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9043868</text:p>
          </table:table-cell>
          <table:table-cell office:value-type="string" table:style-name="ce1">
            <text:p>daniela.valencia11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5-27T20:43:00" table:style-name="ce5">
            <text:p>2026-05-27 20:43</text:p>
          </table:table-cell>
          <table:table-cell office:value-type="date" office:date-value="2026-07-04T09:51:00" table:style-name="ce6">
            <text:p>2026-07-04 09:51</text:p>
          </table:table-cell>
          <table:table-cell table:number-columns-repeated="16369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5777316</text:p>
          </table:table-cell>
          <table:table-cell office:value-type="string" table:style-name="ce1">
            <text:p>Ana Díaz Giraldo</text:p>
          </table:table-cell>
          <table:table-cell office:value-type="date" office:date-value="1989-08-03T00:00:00" table:style-name="ce4">
            <text:p>1989-08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4206740</text:p>
          </table:table-cell>
          <table:table-cell office:value-type="string" table:style-name="ce1">
            <text:p>ana.diaz1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3-14T07:14:00" table:style-name="ce5">
            <text:p>2026-03-14 07:14</text:p>
          </table:table-cell>
          <table:table-cell office:value-type="date" office:date-value="2026-04-26T22:58:00" table:style-name="ce6">
            <text:p>2026-04-26 22:58</text:p>
          </table:table-cell>
          <table:table-cell table:number-columns-repeated="1636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802147</text:p>
          </table:table-cell>
          <table:table-cell office:value-type="string" table:style-name="ce1">
            <text:p>Camila Muñoz Álvarez</text:p>
          </table:table-cell>
          <table:table-cell office:value-type="date" office:date-value="1953-02-21T00:00:00" table:style-name="ce4">
            <text:p>1953-02-2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9180840</text:p>
          </table:table-cell>
          <table:table-cell office:value-type="string" table:style-name="ce1">
            <text:p>camila.munoz1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7-02T06:09:00" table:style-name="ce5">
            <text:p>2026-07-02 06:09</text:p>
          </table:table-cell>
          <table:table-cell office:value-type="date" office:date-value="2026-07-08T18:17:00" table:style-name="ce6">
            <text:p>2026-07-08 18:17</text:p>
          </table:table-cell>
          <table:table-cell table:number-columns-repeated="16369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66238410</text:p>
          </table:table-cell>
          <table:table-cell office:value-type="string" table:style-name="ce1">
            <text:p>Sebastián González Romero</text:p>
          </table:table-cell>
          <table:table-cell office:value-type="date" office:date-value="1978-04-15T00:00:00" table:style-name="ce4">
            <text:p>1978-04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8120360</text:p>
          </table:table-cell>
          <table:table-cell office:value-type="string" table:style-name="ce1">
            <text:p>sebastian.gonzalez1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3-25T06:17:00" table:style-name="ce5">
            <text:p>2026-03-25 06:17</text:p>
          </table:table-cell>
          <table:table-cell office:value-type="date" office:date-value="2026-05-07T21:13:00" table:style-name="ce6">
            <text:p>2026-05-07 21:13</text:p>
          </table:table-cell>
          <table:table-cell table:number-columns-repeated="16369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86818391</text:p>
          </table:table-cell>
          <table:table-cell office:value-type="string" table:style-name="ce1">
            <text:p>Juan Castaño Castro</text:p>
          </table:table-cell>
          <table:table-cell office:value-type="date" office:date-value="1980-05-18T00:00:00" table:style-name="ce4">
            <text:p>1980-05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7367807</text:p>
          </table:table-cell>
          <table:table-cell office:value-type="string" table:style-name="ce1">
            <text:p>juan.castano15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02T07:48:00" table:style-name="ce5">
            <text:p>2026-04-02 07:48</text:p>
          </table:table-cell>
          <table:table-cell office:value-type="date" office:date-value="2026-05-15T13:19:00" table:style-name="ce6">
            <text:p>2026-05-15 13:19</text:p>
          </table:table-cell>
          <table:table-cell table:number-columns-repeated="1636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4275583</text:p>
          </table:table-cell>
          <table:table-cell office:value-type="string" table:style-name="ce1">
            <text:p>Juliana Ospina Restrepo</text:p>
          </table:table-cell>
          <table:table-cell office:value-type="date" office:date-value="1986-04-30T00:00:00" table:style-name="ce4">
            <text:p>1986-04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6703214</text:p>
          </table:table-cell>
          <table:table-cell office:value-type="string" table:style-name="ce1">
            <text:p>juliana.ospina16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22T07:27:00" table:style-name="ce5">
            <text:p>2026-05-22 07:27</text:p>
          </table:table-cell>
          <table:table-cell office:value-type="date" office:date-value="2026-05-27T16:21:00" table:style-name="ce6">
            <text:p>2026-05-27 16:21</text:p>
          </table:table-cell>
          <table:table-cell table:number-columns-repeated="16369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8746391</text:p>
          </table:table-cell>
          <table:table-cell office:value-type="string" table:style-name="ce1">
            <text:p>Sebastián Valencia Muñoz</text:p>
          </table:table-cell>
          <table:table-cell office:value-type="date" office:date-value="1964-06-20T00:00:00" table:style-name="ce4">
            <text:p>1964-06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3537913</text:p>
          </table:table-cell>
          <table:table-cell office:value-type="string" table:style-name="ce1">
            <text:p>sebastian.valencia17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07T13:53:00" table:style-name="ce5">
            <text:p>2026-04-07 13:53</text:p>
          </table:table-cell>
          <table:table-cell office:value-type="date" office:date-value="2026-04-24T23:35:00" table:style-name="ce6">
            <text:p>2026-04-24 23:35</text:p>
          </table:table-cell>
          <table:table-cell table:number-columns-repeated="16369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51965489</text:p>
          </table:table-cell>
          <table:table-cell office:value-type="string" table:style-name="ce1">
            <text:p>Mateo Romero Álvarez</text:p>
          </table:table-cell>
          <table:table-cell office:value-type="date" office:date-value="2007-12-02T00:00:00" table:style-name="ce4">
            <text:p>2007-12-02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011045338</text:p>
          </table:table-cell>
          <table:table-cell office:value-type="string" table:style-name="ce1">
            <text:p>mateo.romero18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6-05T22:03:00" table:style-name="ce5">
            <text:p>2026-06-05 22:03</text:p>
          </table:table-cell>
          <table:table-cell office:value-type="date" office:date-value="2026-07-07T06:12:00" table:style-name="ce6">
            <text:p>2026-07-07 06:12</text:p>
          </table:table-cell>
          <table:table-cell table:number-columns-repeated="16369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670949212</text:p>
          </table:table-cell>
          <table:table-cell office:value-type="string" table:style-name="ce1">
            <text:p>Isabella Manuela Rodríguez Moreno</text:p>
          </table:table-cell>
          <table:table-cell office:value-type="date" office:date-value="1990-04-29T00:00:00" table:style-name="ce4">
            <text:p>1990-04-2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1614457</text:p>
          </table:table-cell>
          <table:table-cell office:value-type="string" table:style-name="ce1">
            <text:p>isabella.rodriguez1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21T20:21:00" table:style-name="ce5">
            <text:p>2026-05-21 20:21</text:p>
          </table:table-cell>
          <table:table-cell office:value-type="date" office:date-value="2026-06-18T12:10:00" table:style-name="ce6">
            <text:p>2026-06-18 12:10</text:p>
          </table:table-cell>
          <table:table-cell table:number-columns-repeated="1636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85412415</text:p>
          </table:table-cell>
          <table:table-cell office:value-type="string" table:style-name="ce1">
            <text:p>Daniel Pérez Valencia</text:p>
          </table:table-cell>
          <table:table-cell office:value-type="date" office:date-value="1965-10-20T00:00:00" table:style-name="ce4">
            <text:p>1965-10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2534552</text:p>
          </table:table-cell>
          <table:table-cell office:value-type="string" table:style-name="ce1">
            <text:p>daniel.perez20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15T20:13:00" table:style-name="ce5">
            <text:p>2026-04-15 20:13</text:p>
          </table:table-cell>
          <table:table-cell office:value-type="date" office:date-value="2026-05-26T10:57:00" table:style-name="ce6">
            <text:p>2026-05-26 10:57</text:p>
          </table:table-cell>
          <table:table-cell table:number-columns-repeated="16369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3021430</text:p>
          </table:table-cell>
          <table:table-cell office:value-type="string" table:style-name="ce1">
            <text:p>José López Sánchez</text:p>
          </table:table-cell>
          <table:table-cell office:value-type="date" office:date-value="1994-10-26T00:00:00" table:style-name="ce4">
            <text:p>1994-10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7481451</text:p>
          </table:table-cell>
          <table:table-cell office:value-type="string" table:style-name="ce1">
            <text:p>jose.lopez21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5-01T14:06:00" table:style-name="ce5">
            <text:p>2026-05-01 14:06</text:p>
          </table:table-cell>
          <table:table-cell office:value-type="date" office:date-value="2026-06-08T03:12:00" table:style-name="ce6">
            <text:p>2026-06-08 03:12</text:p>
          </table:table-cell>
          <table:table-cell table:number-columns-repeated="16369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28394602</text:p>
          </table:table-cell>
          <table:table-cell office:value-type="string" table:style-name="ce1">
            <text:p>Santiago Cárdenas Valencia</text:p>
          </table:table-cell>
          <table:table-cell office:value-type="date" office:date-value="2001-03-06T00:00:00" table:style-name="ce4">
            <text:p>2001-03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6270866</text:p>
          </table:table-cell>
          <table:table-cell office:value-type="string" table:style-name="ce1">
            <text:p>santiago.cardenas22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24T17:27:00" table:style-name="ce5">
            <text:p>2026-04-24 17:27</text:p>
          </table:table-cell>
          <table:table-cell office:value-type="date" office:date-value="2026-06-25T11:21:00" table:style-name="ce6">
            <text:p>2026-06-25 11:21</text:p>
          </table:table-cell>
          <table:table-cell table:number-columns-repeated="16369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77457537</text:p>
          </table:table-cell>
          <table:table-cell office:value-type="string" table:style-name="ce1">
            <text:p>Ana Sánchez Castro</text:p>
          </table:table-cell>
          <table:table-cell office:value-type="date" office:date-value="2004-10-07T00:00:00" table:style-name="ce4">
            <text:p>2004-10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8121086</text:p>
          </table:table-cell>
          <table:table-cell office:value-type="string" table:style-name="ce1">
            <text:p>ana.sanchez23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16T19:47:00" table:style-name="ce5">
            <text:p>2026-04-16 19:47</text:p>
          </table:table-cell>
          <table:table-cell office:value-type="date" office:date-value="2026-05-09T23:53:00" table:style-name="ce6">
            <text:p>2026-05-09 23:53</text:p>
          </table:table-cell>
          <table:table-cell table:number-columns-repeated="16369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46075024</text:p>
          </table:table-cell>
          <table:table-cell office:value-type="string" table:style-name="ce1">
            <text:p>Miguel Valencia Giraldo</text:p>
          </table:table-cell>
          <table:table-cell office:value-type="date" office:date-value="1965-09-16T00:00:00" table:style-name="ce4">
            <text:p>1965-09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1076983</text:p>
          </table:table-cell>
          <table:table-cell office:value-type="string" table:style-name="ce1">
            <text:p>miguel.valencia2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4-30T20:30:00" table:style-name="ce5">
            <text:p>2026-04-30 20:30</text:p>
          </table:table-cell>
          <table:table-cell office:value-type="date" office:date-value="2026-05-24T06:17:00" table:style-name="ce6">
            <text:p>2026-05-24 06:17</text:p>
          </table:table-cell>
          <table:table-cell table:number-columns-repeated="16369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176818957</text:p>
          </table:table-cell>
          <table:table-cell office:value-type="string" table:style-name="ce1">
            <text:p>Juan Hernández Vargas</text:p>
          </table:table-cell>
          <table:table-cell office:value-type="date" office:date-value="2013-07-12T00:00:00" table:style-name="ce4">
            <text:p>2013-07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9044154</text:p>
          </table:table-cell>
          <table:table-cell office:value-type="string" table:style-name="ce1">
            <text:p>juan.hernandez25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4-18T21:31:00" table:style-name="ce5">
            <text:p>2026-04-18 21:31</text:p>
          </table:table-cell>
          <table:table-cell office:value-type="date" office:date-value="2026-05-20T01:47:00" table:style-name="ce6">
            <text:p>2026-05-20 01:47</text:p>
          </table:table-cell>
          <table:table-cell table:number-columns-repeated="1636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95632815</text:p>
          </table:table-cell>
          <table:table-cell office:value-type="string" table:style-name="ce1">
            <text:p>Natalia Castro López</text:p>
          </table:table-cell>
          <table:table-cell office:value-type="date" office:date-value="1990-10-24T00:00:00" table:style-name="ce4">
            <text:p>1990-10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9478542</text:p>
          </table:table-cell>
          <table:table-cell office:value-type="string" table:style-name="ce1">
            <text:p>natalia.castro2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30T06:37:00" table:style-name="ce5">
            <text:p>2026-06-30 06:37</text:p>
          </table:table-cell>
          <table:table-cell office:value-type="date" office:date-value="2026-07-06T17:10:00" table:style-name="ce6">
            <text:p>2026-07-06 17:10</text:p>
          </table:table-cell>
          <table:table-cell table:number-columns-repeated="16369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0059093</text:p>
          </table:table-cell>
          <table:table-cell office:value-type="string" table:style-name="ce1">
            <text:p>Ana Gabriela García López</text:p>
          </table:table-cell>
          <table:table-cell office:value-type="date" office:date-value="1991-10-20T00:00:00" table:style-name="ce4">
            <text:p>1991-10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8289390</text:p>
          </table:table-cell>
          <table:table-cell office:value-type="string" table:style-name="ce1">
            <text:p>ana.garcia27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28T05:24:00" table:style-name="ce5">
            <text:p>2026-04-28 05:24</text:p>
          </table:table-cell>
          <table:table-cell office:value-type="date" office:date-value="2026-05-03T19:35:00" table:style-name="ce6">
            <text:p>2026-05-03 19:35</text:p>
          </table:table-cell>
          <table:table-cell table:number-columns-repeated="16369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25841945</text:p>
          </table:table-cell>
          <table:table-cell office:value-type="string" table:style-name="ce1">
            <text:p>Santiago Silva Romero</text:p>
          </table:table-cell>
          <table:table-cell office:value-type="date" office:date-value="1996-12-11T00:00:00" table:style-name="ce4">
            <text:p>1996-12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5567993</text:p>
          </table:table-cell>
          <table:table-cell office:value-type="string" table:style-name="ce1">
            <text:p>santiago.silva2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5-29T16:48:00" table:style-name="ce5">
            <text:p>2026-05-29 16:48</text:p>
          </table:table-cell>
          <table:table-cell office:value-type="date" office:date-value="2026-06-12T07:27:00" table:style-name="ce6">
            <text:p>2026-06-12 07:27</text:p>
          </table:table-cell>
          <table:table-cell table:number-columns-repeated="16369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1672335</text:p>
          </table:table-cell>
          <table:table-cell office:value-type="string" table:style-name="ce1">
            <text:p>Paula Juliana Sánchez Moreno</text:p>
          </table:table-cell>
          <table:table-cell office:value-type="date" office:date-value="1956-09-13T00:00:00" table:style-name="ce4">
            <text:p>1956-09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6860975</text:p>
          </table:table-cell>
          <table:table-cell office:value-type="string" table:style-name="ce1">
            <text:p>paula.sanchez29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6-12T04:24:00" table:style-name="ce5">
            <text:p>2026-06-12 04:24</text:p>
          </table:table-cell>
          <table:table-cell office:value-type="date" office:date-value="2026-07-04T08:04:00" table:style-name="ce6">
            <text:p>2026-07-04 08:04</text:p>
          </table:table-cell>
          <table:table-cell table:number-columns-repeated="16369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82120263</text:p>
          </table:table-cell>
          <table:table-cell office:value-type="string" table:style-name="ce1">
            <text:p>Diana Rodríguez López</text:p>
          </table:table-cell>
          <table:table-cell office:value-type="date" office:date-value="1991-11-19T00:00:00" table:style-name="ce4">
            <text:p>1991-11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2324489</text:p>
          </table:table-cell>
          <table:table-cell office:value-type="string" table:style-name="ce1">
            <text:p>diana.rodriguez3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17T08:01:00" table:style-name="ce5">
            <text:p>2026-04-17 08:01</text:p>
          </table:table-cell>
          <table:table-cell office:value-type="date" office:date-value="2026-04-25T13:53:00" table:style-name="ce6">
            <text:p>2026-04-25 13:53</text:p>
          </table:table-cell>
          <table:table-cell table:number-columns-repeated="16369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11554494</text:p>
          </table:table-cell>
          <table:table-cell office:value-type="string" table:style-name="ce1">
            <text:p>Laura García Ortiz</text:p>
          </table:table-cell>
          <table:table-cell office:value-type="date" office:date-value="1973-02-14T00:00:00" table:style-name="ce4">
            <text:p>1973-02-1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4586001</text:p>
          </table:table-cell>
          <table:table-cell office:value-type="string" table:style-name="ce1">
            <text:p>laura.garcia3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4-02T14:00:00" table:style-name="ce5">
            <text:p>2026-04-02 14:00</text:p>
          </table:table-cell>
          <table:table-cell office:value-type="date" office:date-value="2026-05-09T20:40:00" table:style-name="ce6">
            <text:p>2026-05-09 20:40</text:p>
          </table:table-cell>
          <table:table-cell table:number-columns-repeated="16369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9545347</text:p>
          </table:table-cell>
          <table:table-cell office:value-type="string" table:style-name="ce1">
            <text:p>Alejandra Romero Silva</text:p>
          </table:table-cell>
          <table:table-cell office:value-type="date" office:date-value="1953-04-13T00:00:00" table:style-name="ce4">
            <text:p>1953-04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9937775</text:p>
          </table:table-cell>
          <table:table-cell office:value-type="string" table:style-name="ce1">
            <text:p>alejandra.romero3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03T20:45:00" table:style-name="ce5">
            <text:p>2026-05-03 20:45</text:p>
          </table:table-cell>
          <table:table-cell office:value-type="date" office:date-value="2026-05-24T10:54:00" table:style-name="ce6">
            <text:p>2026-05-24 10:54</text:p>
          </table:table-cell>
          <table:table-cell table:number-columns-repeated="16369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64310566</text:p>
          </table:table-cell>
          <table:table-cell office:value-type="string" table:style-name="ce1">
            <text:p>Santiago Ospina González</text:p>
          </table:table-cell>
          <table:table-cell office:value-type="date" office:date-value="1964-07-05T00:00:00" table:style-name="ce4">
            <text:p>1964-07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2390454</text:p>
          </table:table-cell>
          <table:table-cell office:value-type="string" table:style-name="ce1">
            <text:p>santiago.ospina33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05T23:29:00" table:style-name="ce5">
            <text:p>2026-06-05 23:29</text:p>
          </table:table-cell>
          <table:table-cell office:value-type="date" office:date-value="2026-06-18T16:13:00" table:style-name="ce6">
            <text:p>2026-06-18 16:13</text:p>
          </table:table-cell>
          <table:table-cell table:number-columns-repeated="16369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94995106</text:p>
          </table:table-cell>
          <table:table-cell office:value-type="string" table:style-name="ce1">
            <text:p>Diana Laura Jiménez Moreno</text:p>
          </table:table-cell>
          <table:table-cell office:value-type="date" office:date-value="1993-01-10T00:00:00" table:style-name="ce4">
            <text:p>1993-01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6138806</text:p>
          </table:table-cell>
          <table:table-cell office:value-type="string" table:style-name="ce1">
            <text:p>diana.jimenez34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4-12T07:14:00" table:style-name="ce5">
            <text:p>2026-04-12 07:14</text:p>
          </table:table-cell>
          <table:table-cell office:value-type="date" office:date-value="2026-06-17T11:22:00" table:style-name="ce6">
            <text:p>2026-06-17 11:22</text:p>
          </table:table-cell>
          <table:table-cell table:number-columns-repeated="16369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094022</text:p>
          </table:table-cell>
          <table:table-cell office:value-type="string" table:style-name="ce1">
            <text:p>Daniel Santiago Castaño Romero</text:p>
          </table:table-cell>
          <table:table-cell office:value-type="date" office:date-value="1989-06-17T00:00:00" table:style-name="ce4">
            <text:p>1989-06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5780090</text:p>
          </table:table-cell>
          <table:table-cell office:value-type="string" table:style-name="ce1">
            <text:p>daniel.castano3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01T12:56:00" table:style-name="ce5">
            <text:p>2026-06-01 12:56</text:p>
          </table:table-cell>
          <table:table-cell office:value-type="date" office:date-value="2026-06-06T10:22:00" table:style-name="ce6">
            <text:p>2026-06-06 10:22</text:p>
          </table:table-cell>
          <table:table-cell table:number-columns-repeated="16369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70882194</text:p>
          </table:table-cell>
          <table:table-cell office:value-type="string" table:style-name="ce1">
            <text:p>Nicolás Hernández Giraldo</text:p>
          </table:table-cell>
          <table:table-cell office:value-type="date" office:date-value="1997-06-10T00:00:00" table:style-name="ce4">
            <text:p>1997-06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7376992</text:p>
          </table:table-cell>
          <table:table-cell office:value-type="string" table:style-name="ce1">
            <text:p>nicolas.hernandez3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3-23T15:25:00" table:style-name="ce5">
            <text:p>2026-03-23 15:25</text:p>
          </table:table-cell>
          <table:table-cell office:value-type="date" office:date-value="2026-06-12T02:03:00" table:style-name="ce6">
            <text:p>2026-06-12 02:03</text:p>
          </table:table-cell>
          <table:table-cell table:number-columns-repeated="16369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8935407</text:p>
          </table:table-cell>
          <table:table-cell office:value-type="string" table:style-name="ce1">
            <text:p>Carlos Silva Romero</text:p>
          </table:table-cell>
          <table:table-cell office:value-type="date" office:date-value="1949-05-28T00:00:00" table:style-name="ce4">
            <text:p>1949-05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5872333</text:p>
          </table:table-cell>
          <table:table-cell office:value-type="string" table:style-name="ce1">
            <text:p>carlos.silva37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3-22T13:43:00" table:style-name="ce5">
            <text:p>2026-03-22 13:43</text:p>
          </table:table-cell>
          <table:table-cell office:value-type="date" office:date-value="2026-04-18T14:41:00" table:style-name="ce6">
            <text:p>2026-04-18 14:41</text:p>
          </table:table-cell>
          <table:table-cell table:number-columns-repeated="16369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83521</text:p>
          </table:table-cell>
          <table:table-cell office:value-type="string" table:style-name="ce1">
            <text:p>Andrea Restrepo García</text:p>
          </table:table-cell>
          <table:table-cell office:value-type="date" office:date-value="1955-11-01T00:00:00" table:style-name="ce4">
            <text:p>1955-11-0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3344689</text:p>
          </table:table-cell>
          <table:table-cell office:value-type="string" table:style-name="ce1">
            <text:p>andrea.restrepo3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05T10:12:00" table:style-name="ce5">
            <text:p>2026-04-05 10:12</text:p>
          </table:table-cell>
          <table:table-cell office:value-type="date" office:date-value="2026-07-01T10:54:00" table:style-name="ce6">
            <text:p>2026-07-01 10:54</text:p>
          </table:table-cell>
          <table:table-cell table:number-columns-repeated="16369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97423040</text:p>
          </table:table-cell>
          <table:table-cell office:value-type="string" table:style-name="ce1">
            <text:p>Manuela Valencia González</text:p>
          </table:table-cell>
          <table:table-cell office:value-type="date" office:date-value="1991-10-28T00:00:00" table:style-name="ce4">
            <text:p>1991-10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5587474</text:p>
          </table:table-cell>
          <table:table-cell office:value-type="string" table:style-name="ce1">
            <text:p>manuela.valencia39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20T04:12:00" table:style-name="ce5">
            <text:p>2026-06-20 04:12</text:p>
          </table:table-cell>
          <table:table-cell office:value-type="date" office:date-value="2026-06-29T19:32:00" table:style-name="ce6">
            <text:p>2026-06-29 19:32</text:p>
          </table:table-cell>
          <table:table-cell table:number-columns-repeated="16369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0751920</text:p>
          </table:table-cell>
          <table:table-cell office:value-type="string" table:style-name="ce1">
            <text:p>Ana Ruiz Díaz</text:p>
          </table:table-cell>
          <table:table-cell office:value-type="date" office:date-value="1976-08-22T00:00:00" table:style-name="ce4">
            <text:p>1976-08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3821247</text:p>
          </table:table-cell>
          <table:table-cell office:value-type="string" table:style-name="ce1">
            <text:p>ana.ruiz4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3-28T04:05:00" table:style-name="ce5">
            <text:p>2026-03-28 04:05</text:p>
          </table:table-cell>
          <table:table-cell office:value-type="date" office:date-value="2026-04-19T17:02:00" table:style-name="ce6">
            <text:p>2026-04-19 17:02</text:p>
          </table:table-cell>
          <table:table-cell table:number-columns-repeated="16369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24869286</text:p>
          </table:table-cell>
          <table:table-cell office:value-type="string" table:style-name="ce1">
            <text:p>Sofía Muñoz Castro</text:p>
          </table:table-cell>
          <table:table-cell office:value-type="date" office:date-value="1998-07-02T00:00:00" table:style-name="ce4">
            <text:p>1998-07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7975518</text:p>
          </table:table-cell>
          <table:table-cell office:value-type="string" table:style-name="ce1">
            <text:p>sofia.munoz41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7-01T14:38:00" table:style-name="ce5">
            <text:p>2026-07-01 14:38</text:p>
          </table:table-cell>
          <table:table-cell office:value-type="date" office:date-value="2026-07-01T19:04:00" table:style-name="ce6">
            <text:p>2026-07-01 19:04</text:p>
          </table:table-cell>
          <table:table-cell table:number-columns-repeated="16369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68033572</text:p>
          </table:table-cell>
          <table:table-cell office:value-type="string" table:style-name="ce1">
            <text:p>Sofía Carolina Sánchez López</text:p>
          </table:table-cell>
          <table:table-cell office:value-type="date" office:date-value="2005-06-12T00:00:00" table:style-name="ce4">
            <text:p>2005-06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8686713</text:p>
          </table:table-cell>
          <table:table-cell office:value-type="string" table:style-name="ce1">
            <text:p>sofia.sanchez4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3-24T21:32:00" table:style-name="ce5">
            <text:p>2026-03-24 21:32</text:p>
          </table:table-cell>
          <table:table-cell office:value-type="date" office:date-value="2026-03-29T19:07:00" table:style-name="ce6">
            <text:p>2026-03-29 19:07</text:p>
          </table:table-cell>
          <table:table-cell table:number-columns-repeated="16369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92940988</text:p>
          </table:table-cell>
          <table:table-cell office:value-type="string" table:style-name="ce1">
            <text:p>Manuela Valencia González</text:p>
          </table:table-cell>
          <table:table-cell office:value-type="date" office:date-value="1946-09-13T00:00:00" table:style-name="ce4">
            <text:p>1946-09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5849857</text:p>
          </table:table-cell>
          <table:table-cell office:value-type="string" table:style-name="ce1">
            <text:p>manuela.valencia43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5-13T13:10:00" table:style-name="ce5">
            <text:p>2026-05-13 13:10</text:p>
          </table:table-cell>
          <table:table-cell office:value-type="date" office:date-value="2026-06-29T02:36:00" table:style-name="ce6">
            <text:p>2026-06-29 02:36</text:p>
          </table:table-cell>
          <table:table-cell table:number-columns-repeated="16369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13420608</text:p>
          </table:table-cell>
          <table:table-cell office:value-type="string" table:style-name="ce1">
            <text:p>María Gabriela Rojas Castaño</text:p>
          </table:table-cell>
          <table:table-cell office:value-type="date" office:date-value="1984-07-28T00:00:00" table:style-name="ce4">
            <text:p>1984-07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9433260</text:p>
          </table:table-cell>
          <table:table-cell office:value-type="string" table:style-name="ce1">
            <text:p>maria.rojas4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4-02T02:58:00" table:style-name="ce5">
            <text:p>2026-04-02 02:58</text:p>
          </table:table-cell>
          <table:table-cell office:value-type="date" office:date-value="2026-07-02T21:48:00" table:style-name="ce6">
            <text:p>2026-07-02 21:48</text:p>
          </table:table-cell>
          <table:table-cell table:number-columns-repeated="16369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9234739</text:p>
          </table:table-cell>
          <table:table-cell office:value-type="string" table:style-name="ce1">
            <text:p>Natalia Restrepo Vargas</text:p>
          </table:table-cell>
          <table:table-cell office:value-type="date" office:date-value="2003-06-03T00:00:00" table:style-name="ce4">
            <text:p>2003-06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3832369</text:p>
          </table:table-cell>
          <table:table-cell office:value-type="string" table:style-name="ce1">
            <text:p>natalia.restrepo4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11T17:36:00" table:style-name="ce5">
            <text:p>2026-05-11 17:36</text:p>
          </table:table-cell>
          <table:table-cell office:value-type="date" office:date-value="2026-07-05T06:54:00" table:style-name="ce6">
            <text:p>2026-07-05 06:54</text:p>
          </table:table-cell>
          <table:table-cell table:number-columns-repeated="16369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60684338</text:p>
          </table:table-cell>
          <table:table-cell office:value-type="string" table:style-name="ce1">
            <text:p>Natalia Rojas Muñoz</text:p>
          </table:table-cell>
          <table:table-cell office:value-type="date" office:date-value="1972-07-25T00:00:00" table:style-name="ce4">
            <text:p>1972-07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9928336</text:p>
          </table:table-cell>
          <table:table-cell office:value-type="string" table:style-name="ce1">
            <text:p>natalia.rojas46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09T15:37:00" table:style-name="ce5">
            <text:p>2026-04-09 15:37</text:p>
          </table:table-cell>
          <table:table-cell office:value-type="date" office:date-value="2026-04-25T19:48:00" table:style-name="ce6">
            <text:p>2026-04-25 19:48</text:p>
          </table:table-cell>
          <table:table-cell table:number-columns-repeated="16369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83524131</text:p>
          </table:table-cell>
          <table:table-cell office:value-type="string" table:style-name="ce1">
            <text:p>Tomás García Pérez</text:p>
          </table:table-cell>
          <table:table-cell office:value-type="date" office:date-value="1981-12-19T00:00:00" table:style-name="ce4">
            <text:p>1981-12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4039951</text:p>
          </table:table-cell>
          <table:table-cell office:value-type="string" table:style-name="ce1">
            <text:p>tomas.garcia4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13T02:23:00" table:style-name="ce5">
            <text:p>2026-04-13 02:23</text:p>
          </table:table-cell>
          <table:table-cell office:value-type="date" office:date-value="2026-07-03T21:46:00" table:style-name="ce6">
            <text:p>2026-07-03 21:46</text:p>
          </table:table-cell>
          <table:table-cell table:number-columns-repeated="16369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83774820</text:p>
          </table:table-cell>
          <table:table-cell office:value-type="string" table:style-name="ce1">
            <text:p>Diana Giraldo Martínez</text:p>
          </table:table-cell>
          <table:table-cell office:value-type="date" office:date-value="2011-06-23T00:00:00" table:style-name="ce4">
            <text:p>2011-06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6001579</text:p>
          </table:table-cell>
          <table:table-cell office:value-type="string" table:style-name="ce1">
            <text:p>diana.giraldo48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4-01T19:01:00" table:style-name="ce5">
            <text:p>2026-04-01 19:01</text:p>
          </table:table-cell>
          <table:table-cell office:value-type="date" office:date-value="2026-04-14T16:46:00" table:style-name="ce6">
            <text:p>2026-04-14 16:46</text:p>
          </table:table-cell>
          <table:table-cell table:number-columns-repeated="16369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20299166</text:p>
          </table:table-cell>
          <table:table-cell office:value-type="string" table:style-name="ce1">
            <text:p>Natalia Ruiz Muñoz</text:p>
          </table:table-cell>
          <table:table-cell office:value-type="date" office:date-value="1968-09-08T00:00:00" table:style-name="ce4">
            <text:p>1968-09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5407636</text:p>
          </table:table-cell>
          <table:table-cell office:value-type="string" table:style-name="ce1">
            <text:p>natalia.ruiz49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30T22:59:00" table:style-name="ce5">
            <text:p>2026-06-30 22:59</text:p>
          </table:table-cell>
          <table:table-cell office:value-type="date" office:date-value="2026-07-07T02:43:00" table:style-name="ce6">
            <text:p>2026-07-07 02:43</text:p>
          </table:table-cell>
          <table:table-cell table:number-columns-repeated="16369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35740262</text:p>
          </table:table-cell>
          <table:table-cell office:value-type="string" table:style-name="ce1">
            <text:p>Gabriela Díaz Ospina</text:p>
          </table:table-cell>
          <table:table-cell office:value-type="date" office:date-value="2013-09-27T00:00:00" table:style-name="ce4">
            <text:p>2013-09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4309534</text:p>
          </table:table-cell>
          <table:table-cell office:value-type="string" table:style-name="ce1">
            <text:p>gabriela.diaz5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27T00:01:00" table:style-name="ce5">
            <text:p>2026-06-27 00:01</text:p>
          </table:table-cell>
          <table:table-cell office:value-type="date" office:date-value="2026-06-29T12:23:00" table:style-name="ce6">
            <text:p>2026-06-29 12:23</text:p>
          </table:table-cell>
          <table:table-cell table:number-columns-repeated="16369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52643589</text:p>
          </table:table-cell>
          <table:table-cell office:value-type="string" table:style-name="ce1">
            <text:p>Sofía García Ospina</text:p>
          </table:table-cell>
          <table:table-cell office:value-type="date" office:date-value="1958-12-22T00:00:00" table:style-name="ce4">
            <text:p>1958-12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3283517</text:p>
          </table:table-cell>
          <table:table-cell office:value-type="string" table:style-name="ce1">
            <text:p>sofia.garcia51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4-02T12:59:00" table:style-name="ce5">
            <text:p>2026-04-02 12:59</text:p>
          </table:table-cell>
          <table:table-cell office:value-type="date" office:date-value="2026-06-04T15:43:00" table:style-name="ce6">
            <text:p>2026-06-04 15:43</text:p>
          </table:table-cell>
          <table:table-cell table:number-columns-repeated="16369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72379445</text:p>
          </table:table-cell>
          <table:table-cell office:value-type="string" table:style-name="ce1">
            <text:p>Catalina Mendoza González</text:p>
          </table:table-cell>
          <table:table-cell office:value-type="date" office:date-value="1985-07-05T00:00:00" table:style-name="ce4">
            <text:p>1985-07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6358764</text:p>
          </table:table-cell>
          <table:table-cell office:value-type="string" table:style-name="ce1">
            <text:p>catalina.mendoza52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6-26T00:10:00" table:style-name="ce5">
            <text:p>2026-06-26 00:10</text:p>
          </table:table-cell>
          <table:table-cell office:value-type="date" office:date-value="2026-06-30T21:59:00" table:style-name="ce6">
            <text:p>2026-06-30 21:59</text:p>
          </table:table-cell>
          <table:table-cell table:number-columns-repeated="16369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8131825</text:p>
          </table:table-cell>
          <table:table-cell office:value-type="string" table:style-name="ce1">
            <text:p>Mateo Romero Mendoza</text:p>
          </table:table-cell>
          <table:table-cell office:value-type="date" office:date-value="1957-05-23T00:00:00" table:style-name="ce4">
            <text:p>1957-05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5877809</text:p>
          </table:table-cell>
          <table:table-cell office:value-type="string" table:style-name="ce1">
            <text:p>mateo.romero53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01T03:23:00" table:style-name="ce5">
            <text:p>2026-05-01 03:23</text:p>
          </table:table-cell>
          <table:table-cell office:value-type="date" office:date-value="2026-05-20T12:47:00" table:style-name="ce6">
            <text:p>2026-05-20 12:47</text:p>
          </table:table-cell>
          <table:table-cell table:number-columns-repeated="16369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58836839</text:p>
          </table:table-cell>
          <table:table-cell office:value-type="string" table:style-name="ce1">
            <text:p>Sebastián Castaño Hernández</text:p>
          </table:table-cell>
          <table:table-cell office:value-type="date" office:date-value="1989-10-22T00:00:00" table:style-name="ce4">
            <text:p>1989-10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7151087</text:p>
          </table:table-cell>
          <table:table-cell office:value-type="string" table:style-name="ce1">
            <text:p>sebastian.castano54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24T17:21:00" table:style-name="ce5">
            <text:p>2026-06-24 17:21</text:p>
          </table:table-cell>
          <table:table-cell office:value-type="date" office:date-value="2026-07-01T17:09:00" table:style-name="ce6">
            <text:p>2026-07-01 17:09</text:p>
          </table:table-cell>
          <table:table-cell table:number-columns-repeated="16369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2521287</text:p>
          </table:table-cell>
          <table:table-cell office:value-type="string" table:style-name="ce1">
            <text:p>Paula Álvarez Ramírez</text:p>
          </table:table-cell>
          <table:table-cell office:value-type="date" office:date-value="1946-11-09T00:00:00" table:style-name="ce4">
            <text:p>1946-11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3151984</text:p>
          </table:table-cell>
          <table:table-cell office:value-type="string" table:style-name="ce1">
            <text:p>paula.alvarez55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23T02:14:00" table:style-name="ce5">
            <text:p>2026-03-23 02:14</text:p>
          </table:table-cell>
          <table:table-cell office:value-type="date" office:date-value="2026-06-20T10:09:00" table:style-name="ce6">
            <text:p>2026-06-20 10:09</text:p>
          </table:table-cell>
          <table:table-cell table:number-columns-repeated="16369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128571940</text:p>
          </table:table-cell>
          <table:table-cell office:value-type="string" table:style-name="ce1">
            <text:p>Daniel Cristian Giraldo González</text:p>
          </table:table-cell>
          <table:table-cell office:value-type="date" office:date-value="1970-02-07T00:00:00" table:style-name="ce4">
            <text:p>1970-02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5747240</text:p>
          </table:table-cell>
          <table:table-cell office:value-type="string" table:style-name="ce1">
            <text:p>daniel.giraldo56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06T10:56:00" table:style-name="ce5">
            <text:p>2026-04-06 10:56</text:p>
          </table:table-cell>
          <table:table-cell office:value-type="date" office:date-value="2026-04-15T15:16:00" table:style-name="ce6">
            <text:p>2026-04-15 15:16</text:p>
          </table:table-cell>
          <table:table-cell table:number-columns-repeated="16369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7834620</text:p>
          </table:table-cell>
          <table:table-cell office:value-type="string" table:style-name="ce1">
            <text:p>Natalia Hernández Vargas</text:p>
          </table:table-cell>
          <table:table-cell office:value-type="date" office:date-value="1972-04-26T00:00:00" table:style-name="ce4">
            <text:p>1972-04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3056301</text:p>
          </table:table-cell>
          <table:table-cell office:value-type="string" table:style-name="ce1">
            <text:p>natalia.hernandez57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5-13T11:49:00" table:style-name="ce5">
            <text:p>2026-05-13 11:49</text:p>
          </table:table-cell>
          <table:table-cell office:value-type="date" office:date-value="2026-06-27T00:39:00" table:style-name="ce6">
            <text:p>2026-06-27 00:39</text:p>
          </table:table-cell>
          <table:table-cell table:number-columns-repeated="16369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30865138</text:p>
          </table:table-cell>
          <table:table-cell office:value-type="string" table:style-name="ce1">
            <text:p>Andrés Nicolás Moreno Quintero</text:p>
          </table:table-cell>
          <table:table-cell office:value-type="date" office:date-value="1995-10-03T00:00:00" table:style-name="ce4">
            <text:p>1995-10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4534091</text:p>
          </table:table-cell>
          <table:table-cell office:value-type="string" table:style-name="ce1">
            <text:p>andres.moreno58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4-03T08:14:00" table:style-name="ce5">
            <text:p>2026-04-03 08:14</text:p>
          </table:table-cell>
          <table:table-cell office:value-type="date" office:date-value="2026-05-10T02:32:00" table:style-name="ce6">
            <text:p>2026-05-10 02:32</text:p>
          </table:table-cell>
          <table:table-cell table:number-columns-repeated="16369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68408228</text:p>
          </table:table-cell>
          <table:table-cell office:value-type="string" table:style-name="ce1">
            <text:p>Valentina Vargas Ortiz</text:p>
          </table:table-cell>
          <table:table-cell office:value-type="date" office:date-value="1955-11-25T00:00:00" table:style-name="ce4">
            <text:p>1955-11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2307072</text:p>
          </table:table-cell>
          <table:table-cell office:value-type="string" table:style-name="ce1">
            <text:p>valentina.vargas59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01T23:12:00" table:style-name="ce5">
            <text:p>2026-04-01 23:12</text:p>
          </table:table-cell>
          <table:table-cell office:value-type="date" office:date-value="2026-07-02T20:59:00" table:style-name="ce6">
            <text:p>2026-07-02 20:59</text:p>
          </table:table-cell>
          <table:table-cell table:number-columns-repeated="16369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4303868</text:p>
          </table:table-cell>
          <table:table-cell office:value-type="string" table:style-name="ce1">
            <text:p>Ana Rojas Vargas</text:p>
          </table:table-cell>
          <table:table-cell office:value-type="date" office:date-value="2002-10-14T00:00:00" table:style-name="ce4">
            <text:p>2002-10-1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5476066</text:p>
          </table:table-cell>
          <table:table-cell office:value-type="string" table:style-name="ce1">
            <text:p>ana.rojas60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5-21T07:29:00" table:style-name="ce5">
            <text:p>2026-05-21 07:29</text:p>
          </table:table-cell>
          <table:table-cell office:value-type="date" office:date-value="2026-06-27T20:13:00" table:style-name="ce6">
            <text:p>2026-06-27 20:13</text:p>
          </table:table-cell>
          <table:table-cell table:number-columns-repeated="16369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39216561</text:p>
          </table:table-cell>
          <table:table-cell office:value-type="string" table:style-name="ce1">
            <text:p>Paula Hernández Jiménez</text:p>
          </table:table-cell>
          <table:table-cell office:value-type="date" office:date-value="1965-06-28T00:00:00" table:style-name="ce4">
            <text:p>1965-06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4907146</text:p>
          </table:table-cell>
          <table:table-cell office:value-type="string" table:style-name="ce1">
            <text:p>paula.hernandez61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3-16T06:56:00" table:style-name="ce5">
            <text:p>2026-03-16 06:56</text:p>
          </table:table-cell>
          <table:table-cell office:value-type="date" office:date-value="2026-06-11T19:07:00" table:style-name="ce6">
            <text:p>2026-06-11 19:07</text:p>
          </table:table-cell>
          <table:table-cell table:number-columns-repeated="16369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3016948</text:p>
          </table:table-cell>
          <table:table-cell office:value-type="string" table:style-name="ce1">
            <text:p>María Muñoz Álvarez</text:p>
          </table:table-cell>
          <table:table-cell office:value-type="date" office:date-value="1986-08-13T00:00:00" table:style-name="ce4">
            <text:p>1986-08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2906326</text:p>
          </table:table-cell>
          <table:table-cell office:value-type="string" table:style-name="ce1">
            <text:p>maria.munoz6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14T15:33:00" table:style-name="ce5">
            <text:p>2026-04-14 15:33</text:p>
          </table:table-cell>
          <table:table-cell office:value-type="date" office:date-value="2026-04-21T20:20:00" table:style-name="ce6">
            <text:p>2026-04-21 20:20</text:p>
          </table:table-cell>
          <table:table-cell table:number-columns-repeated="16369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99279457</text:p>
          </table:table-cell>
          <table:table-cell office:value-type="string" table:style-name="ce1">
            <text:p>Valentina López Hernández</text:p>
          </table:table-cell>
          <table:table-cell office:value-type="date" office:date-value="1975-03-19T00:00:00" table:style-name="ce4">
            <text:p>1975-03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4649956</text:p>
          </table:table-cell>
          <table:table-cell office:value-type="string" table:style-name="ce1">
            <text:p>valentina.lopez6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4-29T23:45:00" table:style-name="ce5">
            <text:p>2026-04-29 23:45</text:p>
          </table:table-cell>
          <table:table-cell office:value-type="date" office:date-value="2026-05-11T13:58:00" table:style-name="ce6">
            <text:p>2026-05-11 13:58</text:p>
          </table:table-cell>
          <table:table-cell table:number-columns-repeated="16369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68140000</text:p>
          </table:table-cell>
          <table:table-cell office:value-type="string" table:style-name="ce1">
            <text:p>Alejandro Jiménez Ospina</text:p>
          </table:table-cell>
          <table:table-cell office:value-type="date" office:date-value="1971-01-20T00:00:00" table:style-name="ce4">
            <text:p>1971-01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9908580</text:p>
          </table:table-cell>
          <table:table-cell office:value-type="string" table:style-name="ce1">
            <text:p>alejandro.jimenez64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15T20:22:00" table:style-name="ce5">
            <text:p>2026-06-15 20:22</text:p>
          </table:table-cell>
          <table:table-cell office:value-type="date" office:date-value="2026-07-02T16:24:00" table:style-name="ce6">
            <text:p>2026-07-02 16:24</text:p>
          </table:table-cell>
          <table:table-cell table:number-columns-repeated="16369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03943656</text:p>
          </table:table-cell>
          <table:table-cell office:value-type="string" table:style-name="ce1">
            <text:p>Mateo Castro Díaz</text:p>
          </table:table-cell>
          <table:table-cell office:value-type="date" office:date-value="1993-10-23T00:00:00" table:style-name="ce4">
            <text:p>1993-10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4587818</text:p>
          </table:table-cell>
          <table:table-cell office:value-type="string" table:style-name="ce1">
            <text:p>mateo.castro65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06T05:17:00" table:style-name="ce5">
            <text:p>2026-04-06 05:17</text:p>
          </table:table-cell>
          <table:table-cell office:value-type="date" office:date-value="2026-07-03T22:57:00" table:style-name="ce6">
            <text:p>2026-07-03 22:57</text:p>
          </table:table-cell>
          <table:table-cell table:number-columns-repeated="16369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97357759</text:p>
          </table:table-cell>
          <table:table-cell office:value-type="string" table:style-name="ce1">
            <text:p>Julián Jiménez López</text:p>
          </table:table-cell>
          <table:table-cell office:value-type="date" office:date-value="1992-02-25T00:00:00" table:style-name="ce4">
            <text:p>1992-02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3005062</text:p>
          </table:table-cell>
          <table:table-cell office:value-type="string" table:style-name="ce1">
            <text:p>julian.jimenez6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17T11:17:00" table:style-name="ce5">
            <text:p>2026-05-17 11:17</text:p>
          </table:table-cell>
          <table:table-cell office:value-type="date" office:date-value="2026-05-27T13:43:00" table:style-name="ce6">
            <text:p>2026-05-27 13:43</text:p>
          </table:table-cell>
          <table:table-cell table:number-columns-repeated="16369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31687726</text:p>
          </table:table-cell>
          <table:table-cell office:value-type="string" table:style-name="ce1">
            <text:p>Laura Ospina Díaz</text:p>
          </table:table-cell>
          <table:table-cell office:value-type="date" office:date-value="1979-11-10T00:00:00" table:style-name="ce4">
            <text:p>1979-11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6751027</text:p>
          </table:table-cell>
          <table:table-cell office:value-type="string" table:style-name="ce1">
            <text:p>laura.ospina67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25T02:29:00" table:style-name="ce5">
            <text:p>2026-05-25 02:29</text:p>
          </table:table-cell>
          <table:table-cell office:value-type="date" office:date-value="2026-06-25T12:40:00" table:style-name="ce6">
            <text:p>2026-06-25 12:40</text:p>
          </table:table-cell>
          <table:table-cell table:number-columns-repeated="16369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48891024</text:p>
          </table:table-cell>
          <table:table-cell office:value-type="string" table:style-name="ce1">
            <text:p>Alejandra Torres García</text:p>
          </table:table-cell>
          <table:table-cell office:value-type="date" office:date-value="1957-02-19T00:00:00" table:style-name="ce4">
            <text:p>1957-02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3603016</text:p>
          </table:table-cell>
          <table:table-cell office:value-type="string" table:style-name="ce1">
            <text:p>alejandra.torres68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23T10:10:00" table:style-name="ce5">
            <text:p>2026-05-23 10:10</text:p>
          </table:table-cell>
          <table:table-cell office:value-type="date" office:date-value="2026-06-04T04:39:00" table:style-name="ce6">
            <text:p>2026-06-04 04:39</text:p>
          </table:table-cell>
          <table:table-cell table:number-columns-repeated="16369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80564751</text:p>
          </table:table-cell>
          <table:table-cell office:value-type="string" table:style-name="ce1">
            <text:p>Ana Ospina Ortiz</text:p>
          </table:table-cell>
          <table:table-cell office:value-type="date" office:date-value="2013-05-23T00:00:00" table:style-name="ce4">
            <text:p>2013-05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4845924</text:p>
          </table:table-cell>
          <table:table-cell office:value-type="string" table:style-name="ce1">
            <text:p>ana.ospina69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7-03T00:56:00" table:style-name="ce5">
            <text:p>2026-07-03 00:56</text:p>
          </table:table-cell>
          <table:table-cell office:value-type="date" office:date-value="2026-07-08T01:43:00" table:style-name="ce6">
            <text:p>2026-07-08 01:43</text:p>
          </table:table-cell>
          <table:table-cell table:number-columns-repeated="16369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7616440</text:p>
          </table:table-cell>
          <table:table-cell office:value-type="string" table:style-name="ce1">
            <text:p>María González Rojas</text:p>
          </table:table-cell>
          <table:table-cell office:value-type="date" office:date-value="1988-08-19T00:00:00" table:style-name="ce4">
            <text:p>1988-08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6479461</text:p>
          </table:table-cell>
          <table:table-cell office:value-type="string" table:style-name="ce1">
            <text:p>maria.gonzalez70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3-24T19:16:00" table:style-name="ce5">
            <text:p>2026-03-24 19:16</text:p>
          </table:table-cell>
          <table:table-cell office:value-type="date" office:date-value="2026-04-13T22:55:00" table:style-name="ce6">
            <text:p>2026-04-13 22:55</text:p>
          </table:table-cell>
          <table:table-cell table:number-columns-repeated="16369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485996232</text:p>
          </table:table-cell>
          <table:table-cell office:value-type="string" table:style-name="ce1">
            <text:p>Andrés Rojas Quintero</text:p>
          </table:table-cell>
          <table:table-cell office:value-type="date" office:date-value="2020-09-25T00:00:00" table:style-name="ce4">
            <text:p>2020-09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9349499</text:p>
          </table:table-cell>
          <table:table-cell office:value-type="string" table:style-name="ce1">
            <text:p>andres.rojas71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07T07:21:00" table:style-name="ce5">
            <text:p>2026-05-07 07:21</text:p>
          </table:table-cell>
          <table:table-cell office:value-type="date" office:date-value="2026-05-09T16:57:00" table:style-name="ce6">
            <text:p>2026-05-09 16:57</text:p>
          </table:table-cell>
          <table:table-cell table:number-columns-repeated="16369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50254259</text:p>
          </table:table-cell>
          <table:table-cell office:value-type="string" table:style-name="ce1">
            <text:p>Esteban David Rodríguez Rojas</text:p>
          </table:table-cell>
          <table:table-cell office:value-type="date" office:date-value="1995-01-06T00:00:00" table:style-name="ce4">
            <text:p>1995-01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6672198</text:p>
          </table:table-cell>
          <table:table-cell office:value-type="string" table:style-name="ce1">
            <text:p>esteban.rodriguez7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06T14:58:00" table:style-name="ce5">
            <text:p>2026-06-06 14:58</text:p>
          </table:table-cell>
          <table:table-cell office:value-type="date" office:date-value="2026-06-20T12:45:00" table:style-name="ce6">
            <text:p>2026-06-20 12:45</text:p>
          </table:table-cell>
          <table:table-cell table:number-columns-repeated="16369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96315884</text:p>
          </table:table-cell>
          <table:table-cell office:value-type="string" table:style-name="ce1">
            <text:p>Miguel Valencia Álvarez</text:p>
          </table:table-cell>
          <table:table-cell office:value-type="date" office:date-value="1959-12-18T00:00:00" table:style-name="ce4">
            <text:p>1959-12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3162859</text:p>
          </table:table-cell>
          <table:table-cell office:value-type="string" table:style-name="ce1">
            <text:p>miguel.valencia7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05T04:48:00" table:style-name="ce5">
            <text:p>2026-05-05 04:48</text:p>
          </table:table-cell>
          <table:table-cell office:value-type="date" office:date-value="2026-05-31T10:24:00" table:style-name="ce6">
            <text:p>2026-05-31 10:24</text:p>
          </table:table-cell>
          <table:table-cell table:number-columns-repeated="16369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42530502</text:p>
          </table:table-cell>
          <table:table-cell office:value-type="string" table:style-name="ce1">
            <text:p>Andrea Ospina Quintero</text:p>
          </table:table-cell>
          <table:table-cell office:value-type="date" office:date-value="1982-04-07T00:00:00" table:style-name="ce4">
            <text:p>1982-04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8796889</text:p>
          </table:table-cell>
          <table:table-cell office:value-type="string" table:style-name="ce1">
            <text:p>andrea.ospina74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21T02:00:00" table:style-name="ce5">
            <text:p>2026-06-21 02:00</text:p>
          </table:table-cell>
          <table:table-cell office:value-type="date" office:date-value="2026-06-22T23:15:00" table:style-name="ce6">
            <text:p>2026-06-22 23:15</text:p>
          </table:table-cell>
          <table:table-cell table:number-columns-repeated="16369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8479105</text:p>
          </table:table-cell>
          <table:table-cell office:value-type="string" table:style-name="ce1">
            <text:p>Natalia Romero López</text:p>
          </table:table-cell>
          <table:table-cell office:value-type="date" office:date-value="1983-11-06T00:00:00" table:style-name="ce4">
            <text:p>1983-11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3986253</text:p>
          </table:table-cell>
          <table:table-cell office:value-type="string" table:style-name="ce1">
            <text:p>natalia.romero7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03T09:31:00" table:style-name="ce5">
            <text:p>2026-05-03 09:31</text:p>
          </table:table-cell>
          <table:table-cell office:value-type="date" office:date-value="2026-05-31T09:29:00" table:style-name="ce6">
            <text:p>2026-05-31 09:29</text:p>
          </table:table-cell>
          <table:table-cell table:number-columns-repeated="16369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81285788</text:p>
          </table:table-cell>
          <table:table-cell office:value-type="string" table:style-name="ce1">
            <text:p>Andrés Ramírez Moreno</text:p>
          </table:table-cell>
          <table:table-cell office:value-type="date" office:date-value="1994-06-07T00:00:00" table:style-name="ce4">
            <text:p>1994-06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3652624</text:p>
          </table:table-cell>
          <table:table-cell office:value-type="string" table:style-name="ce1">
            <text:p>andres.ramirez76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19T10:16:00" table:style-name="ce5">
            <text:p>2026-05-19 10:16</text:p>
          </table:table-cell>
          <table:table-cell office:value-type="date" office:date-value="2026-06-19T20:45:00" table:style-name="ce6">
            <text:p>2026-06-19 20:45</text:p>
          </table:table-cell>
          <table:table-cell table:number-columns-repeated="16369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7478197</text:p>
          </table:table-cell>
          <table:table-cell office:value-type="string" table:style-name="ce1">
            <text:p>Sebastián Ramírez Martínez</text:p>
          </table:table-cell>
          <table:table-cell office:value-type="date" office:date-value="1968-09-15T00:00:00" table:style-name="ce4">
            <text:p>1968-09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3541668</text:p>
          </table:table-cell>
          <table:table-cell office:value-type="string" table:style-name="ce1">
            <text:p>sebastian.ramirez77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09T23:03:00" table:style-name="ce5">
            <text:p>2026-06-09 23:03</text:p>
          </table:table-cell>
          <table:table-cell office:value-type="date" office:date-value="2026-06-20T23:25:00" table:style-name="ce6">
            <text:p>2026-06-20 23:25</text:p>
          </table:table-cell>
          <table:table-cell table:number-columns-repeated="16369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15066556</text:p>
          </table:table-cell>
          <table:table-cell office:value-type="string" table:style-name="ce1">
            <text:p>Valentina Andrea Muñoz Martínez</text:p>
          </table:table-cell>
          <table:table-cell office:value-type="date" office:date-value="1972-08-09T00:00:00" table:style-name="ce4">
            <text:p>1972-08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7508167</text:p>
          </table:table-cell>
          <table:table-cell office:value-type="string" table:style-name="ce1">
            <text:p>valentina.munoz7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11T23:56:00" table:style-name="ce5">
            <text:p>2026-04-11 23:56</text:p>
          </table:table-cell>
          <table:table-cell office:value-type="date" office:date-value="2026-06-27T02:51:00" table:style-name="ce6">
            <text:p>2026-06-27 02:51</text:p>
          </table:table-cell>
          <table:table-cell table:number-columns-repeated="16369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14103900</text:p>
          </table:table-cell>
          <table:table-cell office:value-type="string" table:style-name="ce1">
            <text:p>Daniela González Moreno</text:p>
          </table:table-cell>
          <table:table-cell office:value-type="date" office:date-value="1976-09-05T00:00:00" table:style-name="ce4">
            <text:p>1976-09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3137726</text:p>
          </table:table-cell>
          <table:table-cell office:value-type="string" table:style-name="ce1">
            <text:p>daniela.gonzalez79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23T07:56:00" table:style-name="ce5">
            <text:p>2026-06-23 07:56</text:p>
          </table:table-cell>
          <table:table-cell office:value-type="date" office:date-value="2026-07-07T01:21:00" table:style-name="ce6">
            <text:p>2026-07-07 01:21</text:p>
          </table:table-cell>
          <table:table-cell table:number-columns-repeated="16369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26823056</text:p>
          </table:table-cell>
          <table:table-cell office:value-type="string" table:style-name="ce1">
            <text:p>Sara Andrea Silva Pérez</text:p>
          </table:table-cell>
          <table:table-cell office:value-type="date" office:date-value="1983-07-22T00:00:00" table:style-name="ce4">
            <text:p>1983-07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1923692</text:p>
          </table:table-cell>
          <table:table-cell office:value-type="string" table:style-name="ce1">
            <text:p>sara.silva80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7-02T21:18:00" table:style-name="ce5">
            <text:p>2026-07-02 21:18</text:p>
          </table:table-cell>
          <table:table-cell office:value-type="date" office:date-value="2026-07-04T18:39:00" table:style-name="ce6">
            <text:p>2026-07-04 18:39</text:p>
          </table:table-cell>
          <table:table-cell table:number-columns-repeated="16369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66470814</text:p>
          </table:table-cell>
          <table:table-cell office:value-type="string" table:style-name="ce1">
            <text:p>Laura Ana Martínez Castro</text:p>
          </table:table-cell>
          <table:table-cell office:value-type="date" office:date-value="1985-01-02T00:00:00" table:style-name="ce4">
            <text:p>1985-01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7854797</text:p>
          </table:table-cell>
          <table:table-cell office:value-type="string" table:style-name="ce1">
            <text:p>laura.martinez81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15T18:55:00" table:style-name="ce5">
            <text:p>2026-05-15 18:55</text:p>
          </table:table-cell>
          <table:table-cell office:value-type="date" office:date-value="2026-05-23T01:41:00" table:style-name="ce6">
            <text:p>2026-05-23 01:41</text:p>
          </table:table-cell>
          <table:table-cell table:number-columns-repeated="16369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00488973</text:p>
          </table:table-cell>
          <table:table-cell office:value-type="string" table:style-name="ce1">
            <text:p>Julián González Martínez</text:p>
          </table:table-cell>
          <table:table-cell office:value-type="date" office:date-value="1993-07-18T00:00:00" table:style-name="ce4">
            <text:p>1993-07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7287566</text:p>
          </table:table-cell>
          <table:table-cell office:value-type="string" table:style-name="ce1">
            <text:p>julian.gonzalez82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30T03:17:00" table:style-name="ce5">
            <text:p>2026-06-30 03:17</text:p>
          </table:table-cell>
          <table:table-cell office:value-type="date" office:date-value="2026-07-02T21:40:00" table:style-name="ce6">
            <text:p>2026-07-02 21:40</text:p>
          </table:table-cell>
          <table:table-cell table:number-columns-repeated="16369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4435583</text:p>
          </table:table-cell>
          <table:table-cell office:value-type="string" table:style-name="ce1">
            <text:p>Natalia Torres García</text:p>
          </table:table-cell>
          <table:table-cell office:value-type="date" office:date-value="1961-09-08T00:00:00" table:style-name="ce4">
            <text:p>1961-09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1081601</text:p>
          </table:table-cell>
          <table:table-cell office:value-type="string" table:style-name="ce1">
            <text:p>natalia.torres83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7-03T22:36:00" table:style-name="ce5">
            <text:p>2026-07-03 22:36</text:p>
          </table:table-cell>
          <table:table-cell office:value-type="date" office:date-value="2026-07-05T00:55:00" table:style-name="ce6">
            <text:p>2026-07-05 00:55</text:p>
          </table:table-cell>
          <table:table-cell table:number-columns-repeated="16369"/>
        </table:table-row>
        <table:table-row table:style-name="ro1">
          <table:table-cell office:value-type="float" office:value="84" table:style-name="ce3">
            <text:p>8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47733120</text:p>
          </table:table-cell>
          <table:table-cell office:value-type="string" table:style-name="ce1">
            <text:p>Valentina Cárdenas López</text:p>
          </table:table-cell>
          <table:table-cell office:value-type="date" office:date-value="1984-03-15T00:00:00" table:style-name="ce4">
            <text:p>1984-03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8458539</text:p>
          </table:table-cell>
          <table:table-cell office:value-type="string" table:style-name="ce1">
            <text:p>valentina.cardenas84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6-26T16:17:00" table:style-name="ce5">
            <text:p>2026-06-26 16:17</text:p>
          </table:table-cell>
          <table:table-cell office:value-type="date" office:date-value="2026-06-27T19:37:00" table:style-name="ce6">
            <text:p>2026-06-27 19:37</text:p>
          </table:table-cell>
          <table:table-cell table:number-columns-repeated="16369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46178883</text:p>
          </table:table-cell>
          <table:table-cell office:value-type="string" table:style-name="ce1">
            <text:p>Carlos Quintero Castaño</text:p>
          </table:table-cell>
          <table:table-cell office:value-type="date" office:date-value="1967-06-18T00:00:00" table:style-name="ce4">
            <text:p>1967-06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2187631</text:p>
          </table:table-cell>
          <table:table-cell office:value-type="string" table:style-name="ce1">
            <text:p>carlos.quintero85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08T07:06:00" table:style-name="ce5">
            <text:p>2026-04-08 07:06</text:p>
          </table:table-cell>
          <table:table-cell office:value-type="date" office:date-value="2026-07-05T04:12:00" table:style-name="ce6">
            <text:p>2026-07-05 04:12</text:p>
          </table:table-cell>
          <table:table-cell table:number-columns-repeated="16369"/>
        </table:table-row>
        <table:table-row table:style-name="ro1">
          <table:table-cell office:value-type="float" office:value="86" table:style-name="ce3">
            <text:p>8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36306394</text:p>
          </table:table-cell>
          <table:table-cell office:value-type="string" table:style-name="ce1">
            <text:p>Samuel Romero Ruiz</text:p>
          </table:table-cell>
          <table:table-cell office:value-type="date" office:date-value="1965-07-22T00:00:00" table:style-name="ce4">
            <text:p>1965-07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3248277</text:p>
          </table:table-cell>
          <table:table-cell office:value-type="string" table:style-name="ce1">
            <text:p>samuel.romero86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3-19T07:19:00" table:style-name="ce5">
            <text:p>2026-03-19 07:19</text:p>
          </table:table-cell>
          <table:table-cell office:value-type="date" office:date-value="2026-07-08T03:47:00" table:style-name="ce6">
            <text:p>2026-07-08 03:47</text:p>
          </table:table-cell>
          <table:table-cell table:number-columns-repeated="16369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02708190</text:p>
          </table:table-cell>
          <table:table-cell office:value-type="string" table:style-name="ce1">
            <text:p>Luisa Juliana Mendoza Álvarez</text:p>
          </table:table-cell>
          <table:table-cell office:value-type="date" office:date-value="1941-10-12T00:00:00" table:style-name="ce4">
            <text:p>1941-10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2815503</text:p>
          </table:table-cell>
          <table:table-cell office:value-type="string" table:style-name="ce1">
            <text:p>luisa.mendoza8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5-08T01:33:00" table:style-name="ce5">
            <text:p>2026-05-08 01:33</text:p>
          </table:table-cell>
          <table:table-cell office:value-type="date" office:date-value="2026-06-15T16:46:00" table:style-name="ce6">
            <text:p>2026-06-15 16:46</text:p>
          </table:table-cell>
          <table:table-cell table:number-columns-repeated="16369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46037147</text:p>
          </table:table-cell>
          <table:table-cell office:value-type="string" table:style-name="ce1">
            <text:p>Luisa Restrepo Muñoz</text:p>
          </table:table-cell>
          <table:table-cell office:value-type="date" office:date-value="1971-02-06T00:00:00" table:style-name="ce4">
            <text:p>1971-02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3621542</text:p>
          </table:table-cell>
          <table:table-cell office:value-type="string" table:style-name="ce1">
            <text:p>luisa.restrepo88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24T16:22:00" table:style-name="ce5">
            <text:p>2026-06-24 16:22</text:p>
          </table:table-cell>
          <table:table-cell office:value-type="date" office:date-value="2026-07-10T00:21:00" table:style-name="ce6">
            <text:p>2026-07-10 00:21</text:p>
          </table:table-cell>
          <table:table-cell table:number-columns-repeated="16369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3360631</text:p>
          </table:table-cell>
          <table:table-cell office:value-type="string" table:style-name="ce1">
            <text:p>Ricardo Castro González</text:p>
          </table:table-cell>
          <table:table-cell office:value-type="date" office:date-value="1969-09-18T00:00:00" table:style-name="ce4">
            <text:p>1969-09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9941867</text:p>
          </table:table-cell>
          <table:table-cell office:value-type="string" table:style-name="ce1">
            <text:p>ricardo.castro89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6-15T06:34:00" table:style-name="ce5">
            <text:p>2026-06-15 06:34</text:p>
          </table:table-cell>
          <table:table-cell office:value-type="date" office:date-value="2026-07-02T17:46:00" table:style-name="ce6">
            <text:p>2026-07-02 17:46</text:p>
          </table:table-cell>
          <table:table-cell table:number-columns-repeated="16369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42223344</text:p>
          </table:table-cell>
          <table:table-cell office:value-type="string" table:style-name="ce1">
            <text:p>Nicolás Ricardo González Restrepo</text:p>
          </table:table-cell>
          <table:table-cell office:value-type="date" office:date-value="1992-01-19T00:00:00" table:style-name="ce4">
            <text:p>1992-01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4618336</text:p>
          </table:table-cell>
          <table:table-cell office:value-type="string" table:style-name="ce1">
            <text:p>nicolas.gonzalez90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4-05T04:06:00" table:style-name="ce5">
            <text:p>2026-04-05 04:06</text:p>
          </table:table-cell>
          <table:table-cell office:value-type="date" office:date-value="2026-06-03T20:49:00" table:style-name="ce6">
            <text:p>2026-06-03 20:49</text:p>
          </table:table-cell>
          <table:table-cell table:number-columns-repeated="16369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60195250</text:p>
          </table:table-cell>
          <table:table-cell office:value-type="string" table:style-name="ce1">
            <text:p>Ana Torres Giraldo</text:p>
          </table:table-cell>
          <table:table-cell office:value-type="date" office:date-value="1978-02-16T00:00:00" table:style-name="ce4">
            <text:p>1978-02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2399540</text:p>
          </table:table-cell>
          <table:table-cell office:value-type="string" table:style-name="ce1">
            <text:p>ana.torres91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5-23T20:04:00" table:style-name="ce5">
            <text:p>2026-05-23 20:04</text:p>
          </table:table-cell>
          <table:table-cell office:value-type="date" office:date-value="2026-06-02T20:54:00" table:style-name="ce6">
            <text:p>2026-06-02 20:54</text:p>
          </table:table-cell>
          <table:table-cell table:number-columns-repeated="16369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86646157</text:p>
          </table:table-cell>
          <table:table-cell office:value-type="string" table:style-name="ce1">
            <text:p>Mateo David Valencia García</text:p>
          </table:table-cell>
          <table:table-cell office:value-type="date" office:date-value="1992-04-12T00:00:00" table:style-name="ce4">
            <text:p>1992-04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9467226</text:p>
          </table:table-cell>
          <table:table-cell office:value-type="string" table:style-name="ce1">
            <text:p>mateo.valencia92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26T00:27:00" table:style-name="ce5">
            <text:p>2026-04-26 00:27</text:p>
          </table:table-cell>
          <table:table-cell office:value-type="date" office:date-value="2026-05-10T10:12:00" table:style-name="ce6">
            <text:p>2026-05-10 10:12</text:p>
          </table:table-cell>
          <table:table-cell table:number-columns-repeated="16369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565167358</text:p>
          </table:table-cell>
          <table:table-cell office:value-type="string" table:style-name="ce1">
            <text:p>Sofía Moreno Ramírez</text:p>
          </table:table-cell>
          <table:table-cell office:value-type="date" office:date-value="2010-01-06T00:00:00" table:style-name="ce4">
            <text:p>2010-01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4674137</text:p>
          </table:table-cell>
          <table:table-cell office:value-type="string" table:style-name="ce1">
            <text:p>sofia.moreno9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21T13:01:00" table:style-name="ce5">
            <text:p>2026-04-21 13:01</text:p>
          </table:table-cell>
          <table:table-cell office:value-type="date" office:date-value="2026-05-31T05:45:00" table:style-name="ce6">
            <text:p>2026-05-31 05:45</text:p>
          </table:table-cell>
          <table:table-cell table:number-columns-repeated="16369"/>
        </table:table-row>
        <table:table-row table:style-name="ro1">
          <table:table-cell office:value-type="float" office:value="94" table:style-name="ce3">
            <text:p>9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60916177</text:p>
          </table:table-cell>
          <table:table-cell office:value-type="string" table:style-name="ce1">
            <text:p>Esteban Muñoz Silva</text:p>
          </table:table-cell>
          <table:table-cell office:value-type="date" office:date-value="1988-04-13T00:00:00" table:style-name="ce4">
            <text:p>1988-04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5928392</text:p>
          </table:table-cell>
          <table:table-cell office:value-type="string" table:style-name="ce1">
            <text:p>esteban.munoz94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24T12:17:00" table:style-name="ce5">
            <text:p>2026-04-24 12:17</text:p>
          </table:table-cell>
          <table:table-cell office:value-type="date" office:date-value="2026-06-07T13:29:00" table:style-name="ce6">
            <text:p>2026-06-07 13:29</text:p>
          </table:table-cell>
          <table:table-cell table:number-columns-repeated="16369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41404207</text:p>
          </table:table-cell>
          <table:table-cell office:value-type="string" table:style-name="ce1">
            <text:p>Laura Álvarez Ospina</text:p>
          </table:table-cell>
          <table:table-cell office:value-type="date" office:date-value="1966-02-19T00:00:00" table:style-name="ce4">
            <text:p>1966-02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4982161</text:p>
          </table:table-cell>
          <table:table-cell office:value-type="string" table:style-name="ce1">
            <text:p>laura.alvarez9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25T04:42:00" table:style-name="ce5">
            <text:p>2026-05-25 04:42</text:p>
          </table:table-cell>
          <table:table-cell office:value-type="date" office:date-value="2026-06-11T23:43:00" table:style-name="ce6">
            <text:p>2026-06-11 23:43</text:p>
          </table:table-cell>
          <table:table-cell table:number-columns-repeated="16369"/>
        </table:table-row>
        <table:table-row table:style-name="ro1">
          <table:table-cell office:value-type="float" office:value="96" table:style-name="ce3">
            <text:p>9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02449810</text:p>
          </table:table-cell>
          <table:table-cell office:value-type="string" table:style-name="ce1">
            <text:p>Ricardo Silva Ospina</text:p>
          </table:table-cell>
          <table:table-cell office:value-type="date" office:date-value="2006-08-17T00:00:00" table:style-name="ce4">
            <text:p>2006-08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5636565</text:p>
          </table:table-cell>
          <table:table-cell office:value-type="string" table:style-name="ce1">
            <text:p>ricardo.silva9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16T17:27:00" table:style-name="ce5">
            <text:p>2026-06-16 17:27</text:p>
          </table:table-cell>
          <table:table-cell office:value-type="date" office:date-value="2026-06-30T14:11:00" table:style-name="ce6">
            <text:p>2026-06-30 14:11</text:p>
          </table:table-cell>
          <table:table-cell table:number-columns-repeated="16369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5944595</text:p>
          </table:table-cell>
          <table:table-cell office:value-type="string" table:style-name="ce1">
            <text:p>Alejandra Martínez Ruiz</text:p>
          </table:table-cell>
          <table:table-cell office:value-type="date" office:date-value="1976-12-26T00:00:00" table:style-name="ce4">
            <text:p>1976-12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4283326</text:p>
          </table:table-cell>
          <table:table-cell office:value-type="string" table:style-name="ce1">
            <text:p>alejandra.martinez97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12T09:37:00" table:style-name="ce5">
            <text:p>2026-04-12 09:37</text:p>
          </table:table-cell>
          <table:table-cell office:value-type="date" office:date-value="2026-05-05T19:56:00" table:style-name="ce6">
            <text:p>2026-05-05 19:56</text:p>
          </table:table-cell>
          <table:table-cell table:number-columns-repeated="16369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938197374</text:p>
          </table:table-cell>
          <table:table-cell office:value-type="string" table:style-name="ce1">
            <text:p>José Ramírez Castaño</text:p>
          </table:table-cell>
          <table:table-cell office:value-type="date" office:date-value="1979-08-19T00:00:00" table:style-name="ce4">
            <text:p>1979-08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8543411</text:p>
          </table:table-cell>
          <table:table-cell office:value-type="string" table:style-name="ce1">
            <text:p>jose.ramirez98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19T21:50:00" table:style-name="ce5">
            <text:p>2026-06-19 21:50</text:p>
          </table:table-cell>
          <table:table-cell office:value-type="date" office:date-value="2026-06-22T03:17:00" table:style-name="ce6">
            <text:p>2026-06-22 03:17</text:p>
          </table:table-cell>
          <table:table-cell table:number-columns-repeated="16369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51480305</text:p>
          </table:table-cell>
          <table:table-cell office:value-type="string" table:style-name="ce1">
            <text:p>Catalina Castaño González</text:p>
          </table:table-cell>
          <table:table-cell office:value-type="date" office:date-value="1968-08-02T00:00:00" table:style-name="ce4">
            <text:p>1968-08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9813482</text:p>
          </table:table-cell>
          <table:table-cell office:value-type="string" table:style-name="ce1">
            <text:p>catalina.castano99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25T05:15:00" table:style-name="ce5">
            <text:p>2026-06-25 05:15</text:p>
          </table:table-cell>
          <table:table-cell office:value-type="date" office:date-value="2026-07-09T18:11:00" table:style-name="ce6">
            <text:p>2026-07-09 18:11</text:p>
          </table:table-cell>
          <table:table-cell table:number-columns-repeated="1636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57411220</text:p>
          </table:table-cell>
          <table:table-cell office:value-type="string" table:style-name="ce1">
            <text:p>Mateo Muñoz Martínez</text:p>
          </table:table-cell>
          <table:table-cell office:value-type="date" office:date-value="1984-02-07T00:00:00" table:style-name="ce4">
            <text:p>1984-02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1376091</text:p>
          </table:table-cell>
          <table:table-cell office:value-type="string" table:style-name="ce1">
            <text:p>mateo.munoz100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08T09:14:00" table:style-name="ce5">
            <text:p>2026-04-08 09:14</text:p>
          </table:table-cell>
          <table:table-cell office:value-type="date" office:date-value="2026-04-16T19:39:00" table:style-name="ce6">
            <text:p>2026-04-16 19:39</text:p>
          </table:table-cell>
          <table:table-cell table:number-columns-repeated="16369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9729883</text:p>
          </table:table-cell>
          <table:table-cell office:value-type="string" table:style-name="ce1">
            <text:p>Daniel Restrepo Valencia</text:p>
          </table:table-cell>
          <table:table-cell office:value-type="date" office:date-value="1998-02-22T00:00:00" table:style-name="ce4">
            <text:p>1998-02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4610003</text:p>
          </table:table-cell>
          <table:table-cell office:value-type="string" table:style-name="ce1">
            <text:p>daniel.restrepo101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11T22:47:00" table:style-name="ce5">
            <text:p>2026-06-11 22:47</text:p>
          </table:table-cell>
          <table:table-cell office:value-type="date" office:date-value="2026-07-05T03:52:00" table:style-name="ce6">
            <text:p>2026-07-05 03:52</text:p>
          </table:table-cell>
          <table:table-cell table:number-columns-repeated="16369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2990690</text:p>
          </table:table-cell>
          <table:table-cell office:value-type="string" table:style-name="ce1">
            <text:p>Sebastián Rojas Restrepo</text:p>
          </table:table-cell>
          <table:table-cell office:value-type="date" office:date-value="1996-09-02T00:00:00" table:style-name="ce4">
            <text:p>1996-09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7229288</text:p>
          </table:table-cell>
          <table:table-cell office:value-type="string" table:style-name="ce1">
            <text:p>sebastian.rojas10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4-06T21:29:00" table:style-name="ce5">
            <text:p>2026-04-06 21:29</text:p>
          </table:table-cell>
          <table:table-cell office:value-type="date" office:date-value="2026-05-14T22:22:00" table:style-name="ce6">
            <text:p>2026-05-14 22:22</text:p>
          </table:table-cell>
          <table:table-cell table:number-columns-repeated="16369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85549838</text:p>
          </table:table-cell>
          <table:table-cell office:value-type="string" table:style-name="ce1">
            <text:p>Carlos Moreno González</text:p>
          </table:table-cell>
          <table:table-cell office:value-type="date" office:date-value="2012-05-05T00:00:00" table:style-name="ce4">
            <text:p>2012-05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4129441</text:p>
          </table:table-cell>
          <table:table-cell office:value-type="string" table:style-name="ce1">
            <text:p>carlos.moreno10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08T12:43:00" table:style-name="ce5">
            <text:p>2026-06-08 12:43</text:p>
          </table:table-cell>
          <table:table-cell office:value-type="date" office:date-value="2026-06-12T11:51:00" table:style-name="ce6">
            <text:p>2026-06-12 11:51</text:p>
          </table:table-cell>
          <table:table-cell table:number-columns-repeated="16369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0951885</text:p>
          </table:table-cell>
          <table:table-cell office:value-type="string" table:style-name="ce1">
            <text:p>Samuel Díaz López</text:p>
          </table:table-cell>
          <table:table-cell office:value-type="date" office:date-value="1943-10-16T00:00:00" table:style-name="ce4">
            <text:p>1943-10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7193742</text:p>
          </table:table-cell>
          <table:table-cell office:value-type="string" table:style-name="ce1">
            <text:p>samuel.diaz10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7-05T10:40:00" table:style-name="ce5">
            <text:p>2026-07-05 10:40</text:p>
          </table:table-cell>
          <table:table-cell office:value-type="date" office:date-value="2026-07-05T16:09:00" table:style-name="ce6">
            <text:p>2026-07-05 16:09</text:p>
          </table:table-cell>
          <table:table-cell table:number-columns-repeated="16369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56780417</text:p>
          </table:table-cell>
          <table:table-cell office:value-type="string" table:style-name="ce1">
            <text:p>Alejandra Ruiz Silva</text:p>
          </table:table-cell>
          <table:table-cell office:value-type="date" office:date-value="1943-09-04T00:00:00" table:style-name="ce4">
            <text:p>1943-09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3832646</text:p>
          </table:table-cell>
          <table:table-cell office:value-type="string" table:style-name="ce1">
            <text:p>alejandra.ruiz105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10T23:43:00" table:style-name="ce5">
            <text:p>2026-06-10 23:43</text:p>
          </table:table-cell>
          <table:table-cell office:value-type="date" office:date-value="2026-07-01T13:41:00" table:style-name="ce6">
            <text:p>2026-07-01 13:41</text:p>
          </table:table-cell>
          <table:table-cell table:number-columns-repeated="16369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70887234</text:p>
          </table:table-cell>
          <table:table-cell office:value-type="string" table:style-name="ce1">
            <text:p>Luisa Romero Jiménez</text:p>
          </table:table-cell>
          <table:table-cell office:value-type="date" office:date-value="1942-02-04T00:00:00" table:style-name="ce4">
            <text:p>1942-02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6895266</text:p>
          </table:table-cell>
          <table:table-cell office:value-type="string" table:style-name="ce1">
            <text:p>luisa.romero10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5-31T02:10:00" table:style-name="ce5">
            <text:p>2026-05-31 02:10</text:p>
          </table:table-cell>
          <table:table-cell office:value-type="date" office:date-value="2026-06-09T00:03:00" table:style-name="ce6">
            <text:p>2026-06-09 00:03</text:p>
          </table:table-cell>
          <table:table-cell table:number-columns-repeated="16369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17060131</text:p>
          </table:table-cell>
          <table:table-cell office:value-type="string" table:style-name="ce1">
            <text:p>Daniel Quintero Vargas</text:p>
          </table:table-cell>
          <table:table-cell office:value-type="date" office:date-value="1989-01-05T00:00:00" table:style-name="ce4">
            <text:p>1989-01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2176693</text:p>
          </table:table-cell>
          <table:table-cell office:value-type="string" table:style-name="ce1">
            <text:p>daniel.quintero107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24T06:28:00" table:style-name="ce5">
            <text:p>2026-04-24 06:28</text:p>
          </table:table-cell>
          <table:table-cell office:value-type="date" office:date-value="2026-05-30T19:22:00" table:style-name="ce6">
            <text:p>2026-05-30 19:22</text:p>
          </table:table-cell>
          <table:table-cell table:number-columns-repeated="16369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95117378</text:p>
          </table:table-cell>
          <table:table-cell office:value-type="string" table:style-name="ce1">
            <text:p>Mateo Hernández Rodríguez</text:p>
          </table:table-cell>
          <table:table-cell office:value-type="date" office:date-value="1968-06-10T00:00:00" table:style-name="ce4">
            <text:p>1968-06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2157127</text:p>
          </table:table-cell>
          <table:table-cell office:value-type="string" table:style-name="ce1">
            <text:p>mateo.hernandez108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28T19:35:00" table:style-name="ce5">
            <text:p>2026-06-28 19:35</text:p>
          </table:table-cell>
          <table:table-cell office:value-type="date" office:date-value="2026-06-29T16:46:00" table:style-name="ce6">
            <text:p>2026-06-29 16:46</text:p>
          </table:table-cell>
          <table:table-cell table:number-columns-repeated="16369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54053953</text:p>
          </table:table-cell>
          <table:table-cell office:value-type="string" table:style-name="ce1">
            <text:p>Daniel Ortiz Rodríguez</text:p>
          </table:table-cell>
          <table:table-cell office:value-type="date" office:date-value="1970-12-05T00:00:00" table:style-name="ce4">
            <text:p>1970-12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9416322</text:p>
          </table:table-cell>
          <table:table-cell office:value-type="string" table:style-name="ce1">
            <text:p>daniel.ortiz10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05T18:25:00" table:style-name="ce5">
            <text:p>2026-06-05 18:25</text:p>
          </table:table-cell>
          <table:table-cell office:value-type="date" office:date-value="2026-07-09T22:30:00" table:style-name="ce6">
            <text:p>2026-07-09 22:30</text:p>
          </table:table-cell>
          <table:table-cell table:number-columns-repeated="16369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64163542</text:p>
          </table:table-cell>
          <table:table-cell office:value-type="string" table:style-name="ce1">
            <text:p>Julián Romero Ospina</text:p>
          </table:table-cell>
          <table:table-cell office:value-type="date" office:date-value="1977-03-15T00:00:00" table:style-name="ce4">
            <text:p>1977-03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8814077</text:p>
          </table:table-cell>
          <table:table-cell office:value-type="string" table:style-name="ce1">
            <text:p>julian.romero110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7-04T21:39:00" table:style-name="ce5">
            <text:p>2026-07-04 21:39</text:p>
          </table:table-cell>
          <table:table-cell office:value-type="date" office:date-value="2026-07-09T03:32:00" table:style-name="ce6">
            <text:p>2026-07-09 03:32</text:p>
          </table:table-cell>
          <table:table-cell table:number-columns-repeated="16369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900911</text:p>
          </table:table-cell>
          <table:table-cell office:value-type="string" table:style-name="ce1">
            <text:p>Samuel Castro Silva</text:p>
          </table:table-cell>
          <table:table-cell office:value-type="date" office:date-value="1983-11-13T00:00:00" table:style-name="ce4">
            <text:p>1983-11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1669511</text:p>
          </table:table-cell>
          <table:table-cell office:value-type="string" table:style-name="ce1">
            <text:p>samuel.castro111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02T13:59:00" table:style-name="ce5">
            <text:p>2026-05-02 13:59</text:p>
          </table:table-cell>
          <table:table-cell office:value-type="date" office:date-value="2026-05-13T16:12:00" table:style-name="ce6">
            <text:p>2026-05-13 16:12</text:p>
          </table:table-cell>
          <table:table-cell table:number-columns-repeated="16369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8803655</text:p>
          </table:table-cell>
          <table:table-cell office:value-type="string" table:style-name="ce1">
            <text:p>Juan López Rodríguez</text:p>
          </table:table-cell>
          <table:table-cell office:value-type="date" office:date-value="1944-12-22T00:00:00" table:style-name="ce4">
            <text:p>1944-12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6512475</text:p>
          </table:table-cell>
          <table:table-cell office:value-type="string" table:style-name="ce1">
            <text:p>juan.lopez112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29T19:04:00" table:style-name="ce5">
            <text:p>2026-05-29 19:04</text:p>
          </table:table-cell>
          <table:table-cell office:value-type="date" office:date-value="2026-06-17T11:33:00" table:style-name="ce6">
            <text:p>2026-06-17 11:33</text:p>
          </table:table-cell>
          <table:table-cell table:number-columns-repeated="16369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89091262</text:p>
          </table:table-cell>
          <table:table-cell office:value-type="string" table:style-name="ce1">
            <text:p>Alejandra Cárdenas Rodríguez</text:p>
          </table:table-cell>
          <table:table-cell office:value-type="date" office:date-value="1939-02-27T00:00:00" table:style-name="ce4">
            <text:p>1939-02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4098218</text:p>
          </table:table-cell>
          <table:table-cell office:value-type="string" table:style-name="ce1">
            <text:p>alejandra.cardenas11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10T08:54:00" table:style-name="ce5">
            <text:p>2026-05-10 08:54</text:p>
          </table:table-cell>
          <table:table-cell office:value-type="date" office:date-value="2026-05-14T13:57:00" table:style-name="ce6">
            <text:p>2026-05-14 13:57</text:p>
          </table:table-cell>
          <table:table-cell table:number-columns-repeated="16369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641426672</text:p>
          </table:table-cell>
          <table:table-cell office:value-type="string" table:style-name="ce1">
            <text:p>Sofía Ortiz Romero</text:p>
          </table:table-cell>
          <table:table-cell office:value-type="date" office:date-value="2018-01-03T00:00:00" table:style-name="ce4">
            <text:p>2018-01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4299469</text:p>
          </table:table-cell>
          <table:table-cell office:value-type="string" table:style-name="ce1">
            <text:p>sofia.ortiz114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4-27T10:16:00" table:style-name="ce5">
            <text:p>2026-04-27 10:16</text:p>
          </table:table-cell>
          <table:table-cell office:value-type="date" office:date-value="2026-07-02T12:22:00" table:style-name="ce6">
            <text:p>2026-07-02 12:22</text:p>
          </table:table-cell>
          <table:table-cell table:number-columns-repeated="16369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3813697</text:p>
          </table:table-cell>
          <table:table-cell office:value-type="string" table:style-name="ce1">
            <text:p>Paula Luisa Ruiz Álvarez</text:p>
          </table:table-cell>
          <table:table-cell office:value-type="date" office:date-value="2003-02-25T00:00:00" table:style-name="ce4">
            <text:p>2003-02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4632917</text:p>
          </table:table-cell>
          <table:table-cell office:value-type="string" table:style-name="ce1">
            <text:p>paula.ruiz115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4-26T20:00:00" table:style-name="ce5">
            <text:p>2026-04-26 20:00</text:p>
          </table:table-cell>
          <table:table-cell office:value-type="date" office:date-value="2026-04-30T17:13:00" table:style-name="ce6">
            <text:p>2026-04-30 17:13</text:p>
          </table:table-cell>
          <table:table-cell table:number-columns-repeated="16369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1161473</text:p>
          </table:table-cell>
          <table:table-cell office:value-type="string" table:style-name="ce1">
            <text:p>Andrés Ruiz Silva</text:p>
          </table:table-cell>
          <table:table-cell office:value-type="date" office:date-value="1965-08-02T00:00:00" table:style-name="ce4">
            <text:p>1965-08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3488211</text:p>
          </table:table-cell>
          <table:table-cell office:value-type="string" table:style-name="ce1">
            <text:p>andres.ruiz11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12T22:51:00" table:style-name="ce5">
            <text:p>2026-04-12 22:51</text:p>
          </table:table-cell>
          <table:table-cell office:value-type="date" office:date-value="2026-04-30T00:04:00" table:style-name="ce6">
            <text:p>2026-04-30 00:04</text:p>
          </table:table-cell>
          <table:table-cell table:number-columns-repeated="16369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9831102</text:p>
          </table:table-cell>
          <table:table-cell office:value-type="string" table:style-name="ce1">
            <text:p>Julián García Pérez</text:p>
          </table:table-cell>
          <table:table-cell office:value-type="date" office:date-value="2004-04-27T00:00:00" table:style-name="ce4">
            <text:p>2004-04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9164983</text:p>
          </table:table-cell>
          <table:table-cell office:value-type="string" table:style-name="ce1">
            <text:p>julian.garcia117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5-17T21:12:00" table:style-name="ce5">
            <text:p>2026-05-17 21:12</text:p>
          </table:table-cell>
          <table:table-cell office:value-type="date" office:date-value="2026-05-30T16:02:00" table:style-name="ce6">
            <text:p>2026-05-30 16:02</text:p>
          </table:table-cell>
          <table:table-cell table:number-columns-repeated="16369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0803630</text:p>
          </table:table-cell>
          <table:table-cell office:value-type="string" table:style-name="ce1">
            <text:p>Sara Romero Torres</text:p>
          </table:table-cell>
          <table:table-cell office:value-type="date" office:date-value="1965-07-25T00:00:00" table:style-name="ce4">
            <text:p>1965-07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3780632</text:p>
          </table:table-cell>
          <table:table-cell office:value-type="string" table:style-name="ce1">
            <text:p>sara.romero118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21T18:44:00" table:style-name="ce5">
            <text:p>2026-06-21 18:44</text:p>
          </table:table-cell>
          <table:table-cell office:value-type="date" office:date-value="2026-07-05T10:22:00" table:style-name="ce6">
            <text:p>2026-07-05 10:22</text:p>
          </table:table-cell>
          <table:table-cell table:number-columns-repeated="16369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447634977</text:p>
          </table:table-cell>
          <table:table-cell office:value-type="string" table:style-name="ce1">
            <text:p>Carlos González Ramírez</text:p>
          </table:table-cell>
          <table:table-cell office:value-type="date" office:date-value="1999-05-16T00:00:00" table:style-name="ce4">
            <text:p>1999-05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2468700</text:p>
          </table:table-cell>
          <table:table-cell office:value-type="string" table:style-name="ce1">
            <text:p>carlos.gonzalez119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14T08:51:00" table:style-name="ce5">
            <text:p>2026-05-14 08:51</text:p>
          </table:table-cell>
          <table:table-cell office:value-type="date" office:date-value="2026-07-05T22:34:00" table:style-name="ce6">
            <text:p>2026-07-05 22:34</text:p>
          </table:table-cell>
          <table:table-cell table:number-columns-repeated="16369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57822504</text:p>
          </table:table-cell>
          <table:table-cell office:value-type="string" table:style-name="ce1">
            <text:p>Ana Álvarez López</text:p>
          </table:table-cell>
          <table:table-cell office:value-type="date" office:date-value="1983-02-19T00:00:00" table:style-name="ce4">
            <text:p>1983-02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4815138</text:p>
          </table:table-cell>
          <table:table-cell office:value-type="string" table:style-name="ce1">
            <text:p>ana.alvarez12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26T19:27:00" table:style-name="ce5">
            <text:p>2026-06-26 19:27</text:p>
          </table:table-cell>
          <table:table-cell office:value-type="date" office:date-value="2026-07-03T15:47:00" table:style-name="ce6">
            <text:p>2026-07-03 15:47</text:p>
          </table:table-cell>
          <table:table-cell table:number-columns-repeated="16369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16865802</text:p>
          </table:table-cell>
          <table:table-cell office:value-type="string" table:style-name="ce1">
            <text:p>Julián Ospina Vargas</text:p>
          </table:table-cell>
          <table:table-cell office:value-type="date" office:date-value="1956-01-26T00:00:00" table:style-name="ce4">
            <text:p>1956-01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9989940</text:p>
          </table:table-cell>
          <table:table-cell office:value-type="string" table:style-name="ce1">
            <text:p>julian.ospina121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10T19:31:00" table:style-name="ce5">
            <text:p>2026-06-10 19:31</text:p>
          </table:table-cell>
          <table:table-cell office:value-type="date" office:date-value="2026-07-08T05:31:00" table:style-name="ce6">
            <text:p>2026-07-08 05:31</text:p>
          </table:table-cell>
          <table:table-cell table:number-columns-repeated="16369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38190108</text:p>
          </table:table-cell>
          <table:table-cell office:value-type="string" table:style-name="ce1">
            <text:p>Alejandro Jorge Pérez Castro</text:p>
          </table:table-cell>
          <table:table-cell office:value-type="date" office:date-value="1987-07-02T00:00:00" table:style-name="ce4">
            <text:p>1987-07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9805857</text:p>
          </table:table-cell>
          <table:table-cell office:value-type="string" table:style-name="ce1">
            <text:p>alejandro.perez12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5-16T14:38:00" table:style-name="ce5">
            <text:p>2026-05-16 14:38</text:p>
          </table:table-cell>
          <table:table-cell office:value-type="date" office:date-value="2026-05-21T02:45:00" table:style-name="ce6">
            <text:p>2026-05-21 02:45</text:p>
          </table:table-cell>
          <table:table-cell table:number-columns-repeated="16369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30639902</text:p>
          </table:table-cell>
          <table:table-cell office:value-type="string" table:style-name="ce1">
            <text:p>Tomás Díaz Restrepo</text:p>
          </table:table-cell>
          <table:table-cell office:value-type="date" office:date-value="2002-07-12T00:00:00" table:style-name="ce4">
            <text:p>2002-07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4212059</text:p>
          </table:table-cell>
          <table:table-cell office:value-type="string" table:style-name="ce1">
            <text:p>tomas.diaz123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18T23:43:00" table:style-name="ce5">
            <text:p>2026-06-18 23:43</text:p>
          </table:table-cell>
          <table:table-cell office:value-type="date" office:date-value="2026-06-23T04:18:00" table:style-name="ce6">
            <text:p>2026-06-23 04:18</text:p>
          </table:table-cell>
          <table:table-cell table:number-columns-repeated="16369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68896438</text:p>
          </table:table-cell>
          <table:table-cell office:value-type="string" table:style-name="ce1">
            <text:p>Sara Hernández Quintero</text:p>
          </table:table-cell>
          <table:table-cell office:value-type="date" office:date-value="1971-02-14T00:00:00" table:style-name="ce4">
            <text:p>1971-02-1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4283755</text:p>
          </table:table-cell>
          <table:table-cell office:value-type="string" table:style-name="ce1">
            <text:p>sara.hernandez12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14T00:44:00" table:style-name="ce5">
            <text:p>2026-03-14 00:44</text:p>
          </table:table-cell>
          <table:table-cell office:value-type="date" office:date-value="2026-05-26T01:16:00" table:style-name="ce6">
            <text:p>2026-05-26 01:16</text:p>
          </table:table-cell>
          <table:table-cell table:number-columns-repeated="16369"/>
        </table:table-row>
        <table:table-row table:style-name="ro1">
          <table:table-cell office:value-type="float" office:value="125" table:style-name="ce3">
            <text:p>12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0609545</text:p>
          </table:table-cell>
          <table:table-cell office:value-type="string" table:style-name="ce1">
            <text:p>Juliana Moreno Ramírez</text:p>
          </table:table-cell>
          <table:table-cell office:value-type="date" office:date-value="1983-04-17T00:00:00" table:style-name="ce4">
            <text:p>1983-04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1849214</text:p>
          </table:table-cell>
          <table:table-cell office:value-type="string" table:style-name="ce1">
            <text:p>juliana.moreno12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16T02:18:00" table:style-name="ce5">
            <text:p>2026-05-16 02:18</text:p>
          </table:table-cell>
          <table:table-cell office:value-type="date" office:date-value="2026-07-08T08:26:00" table:style-name="ce6">
            <text:p>2026-07-08 08:26</text:p>
          </table:table-cell>
          <table:table-cell table:number-columns-repeated="16369"/>
        </table:table-row>
        <table:table-row table:style-name="ro1">
          <table:table-cell office:value-type="float" office:value="126" table:style-name="ce3">
            <text:p>12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84287836</text:p>
          </table:table-cell>
          <table:table-cell office:value-type="string" table:style-name="ce1">
            <text:p>Gabriela Romero Mendoza</text:p>
          </table:table-cell>
          <table:table-cell office:value-type="date" office:date-value="1985-09-04T00:00:00" table:style-name="ce4">
            <text:p>1985-09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7808970</text:p>
          </table:table-cell>
          <table:table-cell office:value-type="string" table:style-name="ce1">
            <text:p>gabriela.romero126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6-03T16:27:00" table:style-name="ce5">
            <text:p>2026-06-03 16:27</text:p>
          </table:table-cell>
          <table:table-cell office:value-type="date" office:date-value="2026-06-23T00:42:00" table:style-name="ce6">
            <text:p>2026-06-23 00:42</text:p>
          </table:table-cell>
          <table:table-cell table:number-columns-repeated="16369"/>
        </table:table-row>
        <table:table-row table:style-name="ro1">
          <table:table-cell office:value-type="float" office:value="127" table:style-name="ce3">
            <text:p>12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2443863</text:p>
          </table:table-cell>
          <table:table-cell office:value-type="string" table:style-name="ce1">
            <text:p>Miguel Cárdenas Sánchez</text:p>
          </table:table-cell>
          <table:table-cell office:value-type="date" office:date-value="1984-03-31T00:00:00" table:style-name="ce4">
            <text:p>1984-03-3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6804022</text:p>
          </table:table-cell>
          <table:table-cell office:value-type="string" table:style-name="ce1">
            <text:p>miguel.cardenas127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17T14:58:00" table:style-name="ce5">
            <text:p>2026-06-17 14:58</text:p>
          </table:table-cell>
          <table:table-cell office:value-type="date" office:date-value="2026-07-03T10:46:00" table:style-name="ce6">
            <text:p>2026-07-03 10:46</text:p>
          </table:table-cell>
          <table:table-cell table:number-columns-repeated="16369"/>
        </table:table-row>
        <table:table-row table:style-name="ro1">
          <table:table-cell office:value-type="float" office:value="128" table:style-name="ce3">
            <text:p>12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7713289</text:p>
          </table:table-cell>
          <table:table-cell office:value-type="string" table:style-name="ce1">
            <text:p>Daniel Ramírez Romero</text:p>
          </table:table-cell>
          <table:table-cell office:value-type="date" office:date-value="2000-01-13T00:00:00" table:style-name="ce4">
            <text:p>2000-01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5796412</text:p>
          </table:table-cell>
          <table:table-cell office:value-type="string" table:style-name="ce1">
            <text:p>daniel.ramirez12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07T15:58:00" table:style-name="ce5">
            <text:p>2026-04-07 15:58</text:p>
          </table:table-cell>
          <table:table-cell office:value-type="date" office:date-value="2026-06-07T21:52:00" table:style-name="ce6">
            <text:p>2026-06-07 21:52</text:p>
          </table:table-cell>
          <table:table-cell table:number-columns-repeated="16369"/>
        </table:table-row>
        <table:table-row table:style-name="ro1">
          <table:table-cell office:value-type="float" office:value="129" table:style-name="ce3">
            <text:p>12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5703009</text:p>
          </table:table-cell>
          <table:table-cell office:value-type="string" table:style-name="ce1">
            <text:p>Esteban Díaz Hernández</text:p>
          </table:table-cell>
          <table:table-cell office:value-type="date" office:date-value="1974-12-01T00:00:00" table:style-name="ce4">
            <text:p>1974-12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7783362</text:p>
          </table:table-cell>
          <table:table-cell office:value-type="string" table:style-name="ce1">
            <text:p>esteban.diaz129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22T00:22:00" table:style-name="ce5">
            <text:p>2026-06-22 00:22</text:p>
          </table:table-cell>
          <table:table-cell office:value-type="date" office:date-value="2026-06-25T12:32:00" table:style-name="ce6">
            <text:p>2026-06-25 12:32</text:p>
          </table:table-cell>
          <table:table-cell table:number-columns-repeated="16369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970806514</text:p>
          </table:table-cell>
          <table:table-cell office:value-type="string" table:style-name="ce1">
            <text:p>Miguel Rojas Mendoza</text:p>
          </table:table-cell>
          <table:table-cell office:value-type="date" office:date-value="1952-09-16T00:00:00" table:style-name="ce4">
            <text:p>1952-09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9685322</text:p>
          </table:table-cell>
          <table:table-cell office:value-type="string" table:style-name="ce1">
            <text:p>miguel.rojas130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21T13:06:00" table:style-name="ce5">
            <text:p>2026-06-21 13:06</text:p>
          </table:table-cell>
          <table:table-cell office:value-type="date" office:date-value="2026-07-07T00:29:00" table:style-name="ce6">
            <text:p>2026-07-07 00:29</text:p>
          </table:table-cell>
          <table:table-cell table:number-columns-repeated="16369"/>
        </table:table-row>
        <table:table-row table:style-name="ro1">
          <table:table-cell office:value-type="float" office:value="131" table:style-name="ce3">
            <text:p>13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1877932</text:p>
          </table:table-cell>
          <table:table-cell office:value-type="string" table:style-name="ce1">
            <text:p>Natalia Diana Torres Castaño</text:p>
          </table:table-cell>
          <table:table-cell office:value-type="date" office:date-value="1967-06-05T00:00:00" table:style-name="ce4">
            <text:p>1967-06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3622089</text:p>
          </table:table-cell>
          <table:table-cell office:value-type="string" table:style-name="ce1">
            <text:p>natalia.torres131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22T21:04:00" table:style-name="ce5">
            <text:p>2026-05-22 21:04</text:p>
          </table:table-cell>
          <table:table-cell office:value-type="date" office:date-value="2026-07-04T22:07:00" table:style-name="ce6">
            <text:p>2026-07-04 22:07</text:p>
          </table:table-cell>
          <table:table-cell table:number-columns-repeated="16369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78799172</text:p>
          </table:table-cell>
          <table:table-cell office:value-type="string" table:style-name="ce1">
            <text:p>Camila López Jiménez</text:p>
          </table:table-cell>
          <table:table-cell office:value-type="date" office:date-value="1988-02-18T00:00:00" table:style-name="ce4">
            <text:p>1988-02-1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6377936</text:p>
          </table:table-cell>
          <table:table-cell office:value-type="string" table:style-name="ce1">
            <text:p>camila.lopez132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03T11:58:00" table:style-name="ce5">
            <text:p>2026-06-03 11:58</text:p>
          </table:table-cell>
          <table:table-cell office:value-type="date" office:date-value="2026-06-25T06:09:00" table:style-name="ce6">
            <text:p>2026-06-25 06:09</text:p>
          </table:table-cell>
          <table:table-cell table:number-columns-repeated="16369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99822442</text:p>
          </table:table-cell>
          <table:table-cell office:value-type="string" table:style-name="ce1">
            <text:p>Juliana Ospina Rojas</text:p>
          </table:table-cell>
          <table:table-cell office:value-type="date" office:date-value="1949-12-19T00:00:00" table:style-name="ce4">
            <text:p>1949-12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9274498</text:p>
          </table:table-cell>
          <table:table-cell office:value-type="string" table:style-name="ce1">
            <text:p>juliana.ospina133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13T15:43:00" table:style-name="ce5">
            <text:p>2026-04-13 15:43</text:p>
          </table:table-cell>
          <table:table-cell office:value-type="date" office:date-value="2026-05-23T23:14:00" table:style-name="ce6">
            <text:p>2026-05-23 23:14</text:p>
          </table:table-cell>
          <table:table-cell table:number-columns-repeated="16369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6636479</text:p>
          </table:table-cell>
          <table:table-cell office:value-type="string" table:style-name="ce1">
            <text:p>Catalina Muñoz Ortiz</text:p>
          </table:table-cell>
          <table:table-cell office:value-type="date" office:date-value="2003-08-29T00:00:00" table:style-name="ce4">
            <text:p>2003-08-2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7333682</text:p>
          </table:table-cell>
          <table:table-cell office:value-type="string" table:style-name="ce1">
            <text:p>catalina.munoz134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3-18T07:27:00" table:style-name="ce5">
            <text:p>2026-03-18 07:27</text:p>
          </table:table-cell>
          <table:table-cell office:value-type="date" office:date-value="2026-03-26T01:27:00" table:style-name="ce6">
            <text:p>2026-03-26 01:27</text:p>
          </table:table-cell>
          <table:table-cell table:number-columns-repeated="16369"/>
        </table:table-row>
        <table:table-row table:style-name="ro1">
          <table:table-cell office:value-type="float" office:value="135" table:style-name="ce3">
            <text:p>13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41806527</text:p>
          </table:table-cell>
          <table:table-cell office:value-type="string" table:style-name="ce1">
            <text:p>Juan Martínez Quintero</text:p>
          </table:table-cell>
          <table:table-cell office:value-type="date" office:date-value="1952-12-21T00:00:00" table:style-name="ce4">
            <text:p>1952-12-2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8224623</text:p>
          </table:table-cell>
          <table:table-cell office:value-type="string" table:style-name="ce1">
            <text:p>juan.martinez135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6-02T13:54:00" table:style-name="ce5">
            <text:p>2026-06-02 13:54</text:p>
          </table:table-cell>
          <table:table-cell office:value-type="date" office:date-value="2026-06-18T05:28:00" table:style-name="ce6">
            <text:p>2026-06-18 05:28</text:p>
          </table:table-cell>
          <table:table-cell table:number-columns-repeated="16369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3884660</text:p>
          </table:table-cell>
          <table:table-cell office:value-type="string" table:style-name="ce1">
            <text:p>María Rodríguez Hernández</text:p>
          </table:table-cell>
          <table:table-cell office:value-type="date" office:date-value="1973-11-18T00:00:00" table:style-name="ce4">
            <text:p>1973-11-1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7579421</text:p>
          </table:table-cell>
          <table:table-cell office:value-type="string" table:style-name="ce1">
            <text:p>maria.rodriguez136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4-03T02:53:00" table:style-name="ce5">
            <text:p>2026-04-03 02:53</text:p>
          </table:table-cell>
          <table:table-cell office:value-type="date" office:date-value="2026-06-25T06:36:00" table:style-name="ce6">
            <text:p>2026-06-25 06:36</text:p>
          </table:table-cell>
          <table:table-cell table:number-columns-repeated="16369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65226404</text:p>
          </table:table-cell>
          <table:table-cell office:value-type="string" table:style-name="ce1">
            <text:p>Andrea Castro Restrepo</text:p>
          </table:table-cell>
          <table:table-cell office:value-type="date" office:date-value="1981-08-06T00:00:00" table:style-name="ce4">
            <text:p>1981-08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4183557</text:p>
          </table:table-cell>
          <table:table-cell office:value-type="string" table:style-name="ce1">
            <text:p>andrea.castro137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5-10T16:03:00" table:style-name="ce5">
            <text:p>2026-05-10 16:03</text:p>
          </table:table-cell>
          <table:table-cell office:value-type="date" office:date-value="2026-07-07T18:41:00" table:style-name="ce6">
            <text:p>2026-07-07 18:41</text:p>
          </table:table-cell>
          <table:table-cell table:number-columns-repeated="16369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398691</text:p>
          </table:table-cell>
          <table:table-cell office:value-type="string" table:style-name="ce1">
            <text:p>Carlos Moreno Valencia</text:p>
          </table:table-cell>
          <table:table-cell office:value-type="date" office:date-value="1953-08-18T00:00:00" table:style-name="ce4">
            <text:p>1953-08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5560724</text:p>
          </table:table-cell>
          <table:table-cell office:value-type="string" table:style-name="ce1">
            <text:p>carlos.moreno138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01T09:19:00" table:style-name="ce5">
            <text:p>2026-06-01 09:19</text:p>
          </table:table-cell>
          <table:table-cell office:value-type="date" office:date-value="2026-06-24T07:10:00" table:style-name="ce6">
            <text:p>2026-06-24 07:10</text:p>
          </table:table-cell>
          <table:table-cell table:number-columns-repeated="16369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36170046</text:p>
          </table:table-cell>
          <table:table-cell office:value-type="string" table:style-name="ce1">
            <text:p>Ricardo Ospina Rojas</text:p>
          </table:table-cell>
          <table:table-cell office:value-type="date" office:date-value="1990-05-15T00:00:00" table:style-name="ce4">
            <text:p>1990-05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8266972</text:p>
          </table:table-cell>
          <table:table-cell office:value-type="string" table:style-name="ce1">
            <text:p>ricardo.ospina139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7-01T18:11:00" table:style-name="ce5">
            <text:p>2026-07-01 18:11</text:p>
          </table:table-cell>
          <table:table-cell office:value-type="date" office:date-value="2026-07-08T08:26:00" table:style-name="ce6">
            <text:p>2026-07-08 08:26</text:p>
          </table:table-cell>
          <table:table-cell table:number-columns-repeated="16369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21168647</text:p>
          </table:table-cell>
          <table:table-cell office:value-type="string" table:style-name="ce1">
            <text:p>Alejandra Hernández Vargas</text:p>
          </table:table-cell>
          <table:table-cell office:value-type="date" office:date-value="1993-07-08T00:00:00" table:style-name="ce4">
            <text:p>1993-07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1879563</text:p>
          </table:table-cell>
          <table:table-cell office:value-type="string" table:style-name="ce1">
            <text:p>alejandra.hernandez140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24T19:08:00" table:style-name="ce5">
            <text:p>2026-05-24 19:08</text:p>
          </table:table-cell>
          <table:table-cell office:value-type="date" office:date-value="2026-06-14T04:29:00" table:style-name="ce6">
            <text:p>2026-06-14 04:29</text:p>
          </table:table-cell>
          <table:table-cell table:number-columns-repeated="16369"/>
        </table:table-row>
        <table:table-row table:style-name="ro1">
          <table:table-cell office:value-type="float" office:value="141" table:style-name="ce3">
            <text:p>14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8392861</text:p>
          </table:table-cell>
          <table:table-cell office:value-type="string" table:style-name="ce1">
            <text:p>Jorge Ospina Quintero</text:p>
          </table:table-cell>
          <table:table-cell office:value-type="date" office:date-value="1945-10-07T00:00:00" table:style-name="ce4">
            <text:p>1945-10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7668498</text:p>
          </table:table-cell>
          <table:table-cell office:value-type="string" table:style-name="ce1">
            <text:p>jorge.ospina141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04T03:00:00" table:style-name="ce5">
            <text:p>2026-05-04 03:00</text:p>
          </table:table-cell>
          <table:table-cell office:value-type="date" office:date-value="2026-06-06T06:46:00" table:style-name="ce6">
            <text:p>2026-06-06 06:46</text:p>
          </table:table-cell>
          <table:table-cell table:number-columns-repeated="16369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91803029</text:p>
          </table:table-cell>
          <table:table-cell office:value-type="string" table:style-name="ce1">
            <text:p>Carolina Giraldo Restrepo</text:p>
          </table:table-cell>
          <table:table-cell office:value-type="date" office:date-value="1973-04-13T00:00:00" table:style-name="ce4">
            <text:p>1973-04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5766506</text:p>
          </table:table-cell>
          <table:table-cell office:value-type="string" table:style-name="ce1">
            <text:p>carolina.giraldo142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16T20:43:00" table:style-name="ce5">
            <text:p>2026-06-16 20:43</text:p>
          </table:table-cell>
          <table:table-cell office:value-type="date" office:date-value="2026-06-19T11:56:00" table:style-name="ce6">
            <text:p>2026-06-19 11:56</text:p>
          </table:table-cell>
          <table:table-cell table:number-columns-repeated="16369"/>
        </table:table-row>
        <table:table-row table:style-name="ro1">
          <table:table-cell office:value-type="float" office:value="143" table:style-name="ce3">
            <text:p>14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15389755</text:p>
          </table:table-cell>
          <table:table-cell office:value-type="string" table:style-name="ce1">
            <text:p>Luisa Vargas Giraldo</text:p>
          </table:table-cell>
          <table:table-cell office:value-type="date" office:date-value="1990-11-08T00:00:00" table:style-name="ce4">
            <text:p>1990-11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7733775</text:p>
          </table:table-cell>
          <table:table-cell office:value-type="string" table:style-name="ce1">
            <text:p>luisa.vargas14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15T02:34:00" table:style-name="ce5">
            <text:p>2026-04-15 02:34</text:p>
          </table:table-cell>
          <table:table-cell office:value-type="date" office:date-value="2026-06-23T07:06:00" table:style-name="ce6">
            <text:p>2026-06-23 07:06</text:p>
          </table:table-cell>
          <table:table-cell table:number-columns-repeated="16369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03352023</text:p>
          </table:table-cell>
          <table:table-cell office:value-type="string" table:style-name="ce1">
            <text:p>Gabriela Ospina Ruiz</text:p>
          </table:table-cell>
          <table:table-cell office:value-type="date" office:date-value="1977-02-24T00:00:00" table:style-name="ce4">
            <text:p>1977-02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3660239</text:p>
          </table:table-cell>
          <table:table-cell office:value-type="string" table:style-name="ce1">
            <text:p>gabriela.ospina144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13T07:07:00" table:style-name="ce5">
            <text:p>2026-05-13 07:07</text:p>
          </table:table-cell>
          <table:table-cell office:value-type="date" office:date-value="2026-07-03T09:30:00" table:style-name="ce6">
            <text:p>2026-07-03 09:30</text:p>
          </table:table-cell>
          <table:table-cell table:number-columns-repeated="16369"/>
        </table:table-row>
        <table:table-row table:style-name="ro1">
          <table:table-cell office:value-type="float" office:value="145" table:style-name="ce3">
            <text:p>145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90698614</text:p>
          </table:table-cell>
          <table:table-cell office:value-type="string" table:style-name="ce1">
            <text:p>Alejandra Silva Hernández</text:p>
          </table:table-cell>
          <table:table-cell office:value-type="date" office:date-value="1992-07-06T00:00:00" table:style-name="ce4">
            <text:p>1992-07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9191333</text:p>
          </table:table-cell>
          <table:table-cell office:value-type="string" table:style-name="ce1">
            <text:p>alejandra.silva145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4-08T18:39:00" table:style-name="ce5">
            <text:p>2026-04-08 18:39</text:p>
          </table:table-cell>
          <table:table-cell office:value-type="date" office:date-value="2026-07-06T13:51:00" table:style-name="ce6">
            <text:p>2026-07-06 13:51</text:p>
          </table:table-cell>
          <table:table-cell table:number-columns-repeated="16369"/>
        </table:table-row>
        <table:table-row table:style-name="ro1">
          <table:table-cell office:value-type="float" office:value="146" table:style-name="ce3">
            <text:p>14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7565728</text:p>
          </table:table-cell>
          <table:table-cell office:value-type="string" table:style-name="ce1">
            <text:p>Jorge Álvarez Rojas</text:p>
          </table:table-cell>
          <table:table-cell office:value-type="date" office:date-value="1985-10-31T00:00:00" table:style-name="ce4">
            <text:p>1985-10-3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9184850</text:p>
          </table:table-cell>
          <table:table-cell office:value-type="string" table:style-name="ce1">
            <text:p>jorge.alvarez14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14T21:09:00" table:style-name="ce5">
            <text:p>2026-04-14 21:09</text:p>
          </table:table-cell>
          <table:table-cell office:value-type="date" office:date-value="2026-04-24T06:03:00" table:style-name="ce6">
            <text:p>2026-04-24 06:03</text:p>
          </table:table-cell>
          <table:table-cell table:number-columns-repeated="16369"/>
        </table:table-row>
        <table:table-row table:style-name="ro1">
          <table:table-cell office:value-type="float" office:value="147" table:style-name="ce3">
            <text:p>14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78769888</text:p>
          </table:table-cell>
          <table:table-cell office:value-type="string" table:style-name="ce1">
            <text:p>Catalina Castro Silva</text:p>
          </table:table-cell>
          <table:table-cell office:value-type="date" office:date-value="1969-11-06T00:00:00" table:style-name="ce4">
            <text:p>1969-11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9655752</text:p>
          </table:table-cell>
          <table:table-cell office:value-type="string" table:style-name="ce1">
            <text:p>catalina.castro14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5-04T12:37:00" table:style-name="ce5">
            <text:p>2026-05-04 12:37</text:p>
          </table:table-cell>
          <table:table-cell office:value-type="date" office:date-value="2026-05-15T15:13:00" table:style-name="ce6">
            <text:p>2026-05-15 15:13</text:p>
          </table:table-cell>
          <table:table-cell table:number-columns-repeated="16369"/>
        </table:table-row>
        <table:table-row table:style-name="ro1">
          <table:table-cell office:value-type="float" office:value="148" table:style-name="ce3">
            <text:p>14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68611671</text:p>
          </table:table-cell>
          <table:table-cell office:value-type="string" table:style-name="ce1">
            <text:p>Alejandro Ramírez Castaño</text:p>
          </table:table-cell>
          <table:table-cell office:value-type="date" office:date-value="1977-08-17T00:00:00" table:style-name="ce4">
            <text:p>1977-08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8206328</text:p>
          </table:table-cell>
          <table:table-cell office:value-type="string" table:style-name="ce1">
            <text:p>alejandro.ramirez14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7-09T07:57:00" table:style-name="ce5">
            <text:p>2026-07-09 07:57</text:p>
          </table:table-cell>
          <table:table-cell office:value-type="date" office:date-value="2026-07-10T03:05:00" table:style-name="ce6">
            <text:p>2026-07-10 03:05</text:p>
          </table:table-cell>
          <table:table-cell table:number-columns-repeated="16369"/>
        </table:table-row>
        <table:table-row table:style-name="ro1">
          <table:table-cell office:value-type="float" office:value="149" table:style-name="ce3">
            <text:p>149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62117766</text:p>
          </table:table-cell>
          <table:table-cell office:value-type="string" table:style-name="ce1">
            <text:p>Alejandra Cárdenas Rojas</text:p>
          </table:table-cell>
          <table:table-cell office:value-type="date" office:date-value="2013-02-16T00:00:00" table:style-name="ce4">
            <text:p>2013-02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9723373</text:p>
          </table:table-cell>
          <table:table-cell office:value-type="string" table:style-name="ce1">
            <text:p>alejandra.cardenas149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3-17T20:02:00" table:style-name="ce5">
            <text:p>2026-03-17 20:02</text:p>
          </table:table-cell>
          <table:table-cell office:value-type="date" office:date-value="2026-06-14T11:43:00" table:style-name="ce6">
            <text:p>2026-06-14 11:43</text:p>
          </table:table-cell>
          <table:table-cell table:number-columns-repeated="16369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55534450</text:p>
          </table:table-cell>
          <table:table-cell office:value-type="string" table:style-name="ce1">
            <text:p>Miguel Castro Ruiz</text:p>
          </table:table-cell>
          <table:table-cell office:value-type="date" office:date-value="1973-09-02T00:00:00" table:style-name="ce4">
            <text:p>1973-09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9962790</text:p>
          </table:table-cell>
          <table:table-cell office:value-type="string" table:style-name="ce1">
            <text:p>miguel.castro150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09T23:42:00" table:style-name="ce5">
            <text:p>2026-04-09 23:42</text:p>
          </table:table-cell>
          <table:table-cell office:value-type="date" office:date-value="2026-06-05T16:12:00" table:style-name="ce6">
            <text:p>2026-06-05 16:12</text:p>
          </table:table-cell>
          <table:table-cell table:number-columns-repeated="16369"/>
        </table:table-row>
        <table:table-row table:style-name="ro1">
          <table:table-cell office:value-type="float" office:value="151" table:style-name="ce3">
            <text:p>151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433360854</text:p>
          </table:table-cell>
          <table:table-cell office:value-type="string" table:style-name="ce1">
            <text:p>Laura Giraldo Jiménez</text:p>
          </table:table-cell>
          <table:table-cell office:value-type="date" office:date-value="1999-03-20T00:00:00" table:style-name="ce4">
            <text:p>1999-03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6450782</text:p>
          </table:table-cell>
          <table:table-cell office:value-type="string" table:style-name="ce1">
            <text:p>laura.giraldo151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4-02T03:29:00" table:style-name="ce5">
            <text:p>2026-04-02 03:29</text:p>
          </table:table-cell>
          <table:table-cell office:value-type="date" office:date-value="2026-04-08T04:10:00" table:style-name="ce6">
            <text:p>2026-04-08 04:10</text:p>
          </table:table-cell>
          <table:table-cell table:number-columns-repeated="16369"/>
        </table:table-row>
        <table:table-row table:style-name="ro1">
          <table:table-cell office:value-type="float" office:value="152" table:style-name="ce3">
            <text:p>15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3493199</text:p>
          </table:table-cell>
          <table:table-cell office:value-type="string" table:style-name="ce1">
            <text:p>Luisa Giraldo Mendoza</text:p>
          </table:table-cell>
          <table:table-cell office:value-type="date" office:date-value="1976-07-16T00:00:00" table:style-name="ce4">
            <text:p>1976-07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3759046</text:p>
          </table:table-cell>
          <table:table-cell office:value-type="string" table:style-name="ce1">
            <text:p>luisa.giraldo152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12T13:09:00" table:style-name="ce5">
            <text:p>2026-04-12 13:09</text:p>
          </table:table-cell>
          <table:table-cell office:value-type="date" office:date-value="2026-07-04T11:49:00" table:style-name="ce6">
            <text:p>2026-07-04 11:49</text:p>
          </table:table-cell>
          <table:table-cell table:number-columns-repeated="16369"/>
        </table:table-row>
        <table:table-row table:style-name="ro1">
          <table:table-cell office:value-type="float" office:value="153" table:style-name="ce3">
            <text:p>15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112104871</text:p>
          </table:table-cell>
          <table:table-cell office:value-type="string" table:style-name="ce1">
            <text:p>Natalia Rodríguez Ortiz</text:p>
          </table:table-cell>
          <table:table-cell office:value-type="date" office:date-value="1991-06-03T00:00:00" table:style-name="ce4">
            <text:p>1991-06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2279174</text:p>
          </table:table-cell>
          <table:table-cell office:value-type="string" table:style-name="ce1">
            <text:p>natalia.rodriguez153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18T22:16:00" table:style-name="ce5">
            <text:p>2026-05-18 22:16</text:p>
          </table:table-cell>
          <table:table-cell office:value-type="date" office:date-value="2026-07-10T09:48:00" table:style-name="ce6">
            <text:p>2026-07-10 09:48</text:p>
          </table:table-cell>
          <table:table-cell table:number-columns-repeated="16369"/>
        </table:table-row>
        <table:table-row table:style-name="ro1">
          <table:table-cell office:value-type="float" office:value="154" table:style-name="ce3">
            <text:p>15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5445585</text:p>
          </table:table-cell>
          <table:table-cell office:value-type="string" table:style-name="ce1">
            <text:p>Mateo Daniel Sánchez Mendoza</text:p>
          </table:table-cell>
          <table:table-cell office:value-type="date" office:date-value="1993-04-14T00:00:00" table:style-name="ce4">
            <text:p>1993-04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7508673</text:p>
          </table:table-cell>
          <table:table-cell office:value-type="string" table:style-name="ce1">
            <text:p>mateo.sanchez15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22T14:23:00" table:style-name="ce5">
            <text:p>2026-06-22 14:23</text:p>
          </table:table-cell>
          <table:table-cell office:value-type="date" office:date-value="2026-07-06T04:54:00" table:style-name="ce6">
            <text:p>2026-07-06 04:54</text:p>
          </table:table-cell>
          <table:table-cell table:number-columns-repeated="16369"/>
        </table:table-row>
        <table:table-row table:style-name="ro1">
          <table:table-cell office:value-type="float" office:value="155" table:style-name="ce3">
            <text:p>15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19818944</text:p>
          </table:table-cell>
          <table:table-cell office:value-type="string" table:style-name="ce1">
            <text:p>Ricardo Juan Díaz Rodríguez</text:p>
          </table:table-cell>
          <table:table-cell office:value-type="date" office:date-value="1985-06-08T00:00:00" table:style-name="ce4">
            <text:p>1985-06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1602010</text:p>
          </table:table-cell>
          <table:table-cell office:value-type="string" table:style-name="ce1">
            <text:p>ricardo.diaz155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7-07T12:07:00" table:style-name="ce5">
            <text:p>2026-07-07 12:07</text:p>
          </table:table-cell>
          <table:table-cell office:value-type="date" office:date-value="2026-07-09T14:56:00" table:style-name="ce6">
            <text:p>2026-07-09 14:56</text:p>
          </table:table-cell>
          <table:table-cell table:number-columns-repeated="16369"/>
        </table:table-row>
        <table:table-row table:style-name="ro1">
          <table:table-cell office:value-type="float" office:value="156" table:style-name="ce3">
            <text:p>156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85408477</text:p>
          </table:table-cell>
          <table:table-cell office:value-type="string" table:style-name="ce1">
            <text:p>Luisa Giraldo Silva</text:p>
          </table:table-cell>
          <table:table-cell office:value-type="date" office:date-value="2008-12-26T00:00:00" table:style-name="ce4">
            <text:p>2008-12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7916430</text:p>
          </table:table-cell>
          <table:table-cell office:value-type="string" table:style-name="ce1">
            <text:p>luisa.giraldo156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5-03T06:40:00" table:style-name="ce5">
            <text:p>2026-05-03 06:40</text:p>
          </table:table-cell>
          <table:table-cell office:value-type="date" office:date-value="2026-05-10T14:55:00" table:style-name="ce6">
            <text:p>2026-05-10 14:55</text:p>
          </table:table-cell>
          <table:table-cell table:number-columns-repeated="16369"/>
        </table:table-row>
        <table:table-row table:style-name="ro1">
          <table:table-cell office:value-type="float" office:value="157" table:style-name="ce3">
            <text:p>15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16709116</text:p>
          </table:table-cell>
          <table:table-cell office:value-type="string" table:style-name="ce1">
            <text:p>Felipe Muñoz Martínez</text:p>
          </table:table-cell>
          <table:table-cell office:value-type="date" office:date-value="1977-05-12T00:00:00" table:style-name="ce4">
            <text:p>1977-05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8701623</text:p>
          </table:table-cell>
          <table:table-cell office:value-type="string" table:style-name="ce1">
            <text:p>felipe.munoz15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4-08T21:43:00" table:style-name="ce5">
            <text:p>2026-04-08 21:43</text:p>
          </table:table-cell>
          <table:table-cell office:value-type="date" office:date-value="2026-07-01T06:17:00" table:style-name="ce6">
            <text:p>2026-07-01 06:17</text:p>
          </table:table-cell>
          <table:table-cell table:number-columns-repeated="16369"/>
        </table:table-row>
        <table:table-row table:style-name="ro1">
          <table:table-cell office:value-type="float" office:value="158" table:style-name="ce3">
            <text:p>15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95118434</text:p>
          </table:table-cell>
          <table:table-cell office:value-type="string" table:style-name="ce1">
            <text:p>Juan Hernández Romero</text:p>
          </table:table-cell>
          <table:table-cell office:value-type="date" office:date-value="2000-05-27T00:00:00" table:style-name="ce4">
            <text:p>2000-05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3005357</text:p>
          </table:table-cell>
          <table:table-cell office:value-type="string" table:style-name="ce1">
            <text:p>juan.hernandez158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4-15T15:06:00" table:style-name="ce5">
            <text:p>2026-04-15 15:06</text:p>
          </table:table-cell>
          <table:table-cell office:value-type="date" office:date-value="2026-07-09T16:03:00" table:style-name="ce6">
            <text:p>2026-07-09 16:03</text:p>
          </table:table-cell>
          <table:table-cell table:number-columns-repeated="16369"/>
        </table:table-row>
        <table:table-row table:style-name="ro1">
          <table:table-cell office:value-type="float" office:value="159" table:style-name="ce3">
            <text:p>15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0572330</text:p>
          </table:table-cell>
          <table:table-cell office:value-type="string" table:style-name="ce1">
            <text:p>Sara Ramírez Ospina</text:p>
          </table:table-cell>
          <table:table-cell office:value-type="date" office:date-value="1980-01-28T00:00:00" table:style-name="ce4">
            <text:p>1980-01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5150743</text:p>
          </table:table-cell>
          <table:table-cell office:value-type="string" table:style-name="ce1">
            <text:p>sara.ramirez159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24T21:25:00" table:style-name="ce5">
            <text:p>2026-04-24 21:25</text:p>
          </table:table-cell>
          <table:table-cell office:value-type="date" office:date-value="2026-04-27T15:50:00" table:style-name="ce6">
            <text:p>2026-04-27 15:50</text:p>
          </table:table-cell>
          <table:table-cell table:number-columns-repeated="16369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69937243</text:p>
          </table:table-cell>
          <table:table-cell office:value-type="string" table:style-name="ce1">
            <text:p>Alejandro David Ortiz García</text:p>
          </table:table-cell>
          <table:table-cell office:value-type="date" office:date-value="1977-03-17T00:00:00" table:style-name="ce4">
            <text:p>1977-03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7221955</text:p>
          </table:table-cell>
          <table:table-cell office:value-type="string" table:style-name="ce1">
            <text:p>alejandro.ortiz160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18T23:04:00" table:style-name="ce5">
            <text:p>2026-05-18 23:04</text:p>
          </table:table-cell>
          <table:table-cell office:value-type="date" office:date-value="2026-05-24T16:57:00" table:style-name="ce6">
            <text:p>2026-05-24 16:57</text:p>
          </table:table-cell>
          <table:table-cell table:number-columns-repeated="16369"/>
        </table:table-row>
        <table:table-row table:style-name="ro1">
          <table:table-cell office:value-type="float" office:value="161" table:style-name="ce3">
            <text:p>16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44173295</text:p>
          </table:table-cell>
          <table:table-cell office:value-type="string" table:style-name="ce1">
            <text:p>Alejandra Rojas Valencia</text:p>
          </table:table-cell>
          <table:table-cell office:value-type="date" office:date-value="1985-07-22T00:00:00" table:style-name="ce4">
            <text:p>1985-07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2183489</text:p>
          </table:table-cell>
          <table:table-cell office:value-type="string" table:style-name="ce1">
            <text:p>alejandra.rojas161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3-23T03:06:00" table:style-name="ce5">
            <text:p>2026-03-23 03:06</text:p>
          </table:table-cell>
          <table:table-cell office:value-type="date" office:date-value="2026-06-08T22:20:00" table:style-name="ce6">
            <text:p>2026-06-08 22:20</text:p>
          </table:table-cell>
          <table:table-cell table:number-columns-repeated="16369"/>
        </table:table-row>
        <table:table-row table:style-name="ro1">
          <table:table-cell office:value-type="float" office:value="162" table:style-name="ce3">
            <text:p>16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01708441</text:p>
          </table:table-cell>
          <table:table-cell office:value-type="string" table:style-name="ce1">
            <text:p>Felipe González Díaz</text:p>
          </table:table-cell>
          <table:table-cell office:value-type="date" office:date-value="1975-01-07T00:00:00" table:style-name="ce4">
            <text:p>1975-01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6716050</text:p>
          </table:table-cell>
          <table:table-cell office:value-type="string" table:style-name="ce1">
            <text:p>felipe.gonzalez162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3-19T16:12:00" table:style-name="ce5">
            <text:p>2026-03-19 16:12</text:p>
          </table:table-cell>
          <table:table-cell office:value-type="date" office:date-value="2026-04-05T20:08:00" table:style-name="ce6">
            <text:p>2026-04-05 20:08</text:p>
          </table:table-cell>
          <table:table-cell table:number-columns-repeated="16369"/>
        </table:table-row>
        <table:table-row table:style-name="ro1">
          <table:table-cell office:value-type="float" office:value="163" table:style-name="ce3">
            <text:p>16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1487652</text:p>
          </table:table-cell>
          <table:table-cell office:value-type="string" table:style-name="ce1">
            <text:p>Gabriela Pérez Quintero</text:p>
          </table:table-cell>
          <table:table-cell office:value-type="date" office:date-value="1946-09-07T00:00:00" table:style-name="ce4">
            <text:p>1946-09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3497526</text:p>
          </table:table-cell>
          <table:table-cell office:value-type="string" table:style-name="ce1">
            <text:p>gabriela.perez16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07T09:16:00" table:style-name="ce5">
            <text:p>2026-06-07 09:16</text:p>
          </table:table-cell>
          <table:table-cell office:value-type="date" office:date-value="2026-06-11T15:26:00" table:style-name="ce6">
            <text:p>2026-06-11 15:26</text:p>
          </table:table-cell>
          <table:table-cell table:number-columns-repeated="16369"/>
        </table:table-row>
        <table:table-row table:style-name="ro1">
          <table:table-cell office:value-type="float" office:value="164" table:style-name="ce3">
            <text:p>16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5193467</text:p>
          </table:table-cell>
          <table:table-cell office:value-type="string" table:style-name="ce1">
            <text:p>Cristian Moreno Castro</text:p>
          </table:table-cell>
          <table:table-cell office:value-type="date" office:date-value="1969-09-03T00:00:00" table:style-name="ce4">
            <text:p>1969-09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7442080</text:p>
          </table:table-cell>
          <table:table-cell office:value-type="string" table:style-name="ce1">
            <text:p>cristian.moreno164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17T12:46:00" table:style-name="ce5">
            <text:p>2026-05-17 12:46</text:p>
          </table:table-cell>
          <table:table-cell office:value-type="date" office:date-value="2026-06-06T16:24:00" table:style-name="ce6">
            <text:p>2026-06-06 16:24</text:p>
          </table:table-cell>
          <table:table-cell table:number-columns-repeated="16369"/>
        </table:table-row>
        <table:table-row table:style-name="ro1">
          <table:table-cell office:value-type="float" office:value="165" table:style-name="ce3">
            <text:p>16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36979307</text:p>
          </table:table-cell>
          <table:table-cell office:value-type="string" table:style-name="ce1">
            <text:p>Juan Romero Moreno</text:p>
          </table:table-cell>
          <table:table-cell office:value-type="date" office:date-value="2002-04-23T00:00:00" table:style-name="ce4">
            <text:p>2002-04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5393538</text:p>
          </table:table-cell>
          <table:table-cell office:value-type="string" table:style-name="ce1">
            <text:p>juan.romero165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25T23:09:00" table:style-name="ce5">
            <text:p>2026-03-25 23:09</text:p>
          </table:table-cell>
          <table:table-cell office:value-type="date" office:date-value="2026-06-12T16:21:00" table:style-name="ce6">
            <text:p>2026-06-12 16:21</text:p>
          </table:table-cell>
          <table:table-cell table:number-columns-repeated="16369"/>
        </table:table-row>
        <table:table-row table:style-name="ro1">
          <table:table-cell office:value-type="float" office:value="166" table:style-name="ce3">
            <text:p>16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1459901</text:p>
          </table:table-cell>
          <table:table-cell office:value-type="string" table:style-name="ce1">
            <text:p>Sebastián Esteban Giraldo Pérez</text:p>
          </table:table-cell>
          <table:table-cell office:value-type="date" office:date-value="1976-12-25T00:00:00" table:style-name="ce4">
            <text:p>1976-12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6699563</text:p>
          </table:table-cell>
          <table:table-cell office:value-type="string" table:style-name="ce1">
            <text:p>sebastian.giraldo166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14T11:50:00" table:style-name="ce5">
            <text:p>2026-04-14 11:50</text:p>
          </table:table-cell>
          <table:table-cell office:value-type="date" office:date-value="2026-05-09T15:08:00" table:style-name="ce6">
            <text:p>2026-05-09 15:08</text:p>
          </table:table-cell>
          <table:table-cell table:number-columns-repeated="16369"/>
        </table:table-row>
        <table:table-row table:style-name="ro1">
          <table:table-cell office:value-type="float" office:value="167" table:style-name="ce3">
            <text:p>16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65802593</text:p>
          </table:table-cell>
          <table:table-cell office:value-type="string" table:style-name="ce1">
            <text:p>José Castaño Cárdenas</text:p>
          </table:table-cell>
          <table:table-cell office:value-type="date" office:date-value="1979-11-11T00:00:00" table:style-name="ce4">
            <text:p>1979-11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2165261</text:p>
          </table:table-cell>
          <table:table-cell office:value-type="string" table:style-name="ce1">
            <text:p>jose.castano167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16T07:35:00" table:style-name="ce5">
            <text:p>2026-04-16 07:35</text:p>
          </table:table-cell>
          <table:table-cell office:value-type="date" office:date-value="2026-05-13T08:41:00" table:style-name="ce6">
            <text:p>2026-05-13 08:41</text:p>
          </table:table-cell>
          <table:table-cell table:number-columns-repeated="16369"/>
        </table:table-row>
        <table:table-row table:style-name="ro1">
          <table:table-cell office:value-type="float" office:value="168" table:style-name="ce3">
            <text:p>168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685357447</text:p>
          </table:table-cell>
          <table:table-cell office:value-type="string" table:style-name="ce1">
            <text:p>David Restrepo Martínez</text:p>
          </table:table-cell>
          <table:table-cell office:value-type="date" office:date-value="1981-11-07T00:00:00" table:style-name="ce4">
            <text:p>1981-11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5799820</text:p>
          </table:table-cell>
          <table:table-cell office:value-type="string" table:style-name="ce1">
            <text:p>david.restrepo168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18T15:50:00" table:style-name="ce5">
            <text:p>2026-04-18 15:50</text:p>
          </table:table-cell>
          <table:table-cell office:value-type="date" office:date-value="2026-06-13T06:10:00" table:style-name="ce6">
            <text:p>2026-06-13 06:10</text:p>
          </table:table-cell>
          <table:table-cell table:number-columns-repeated="16369"/>
        </table:table-row>
        <table:table-row table:style-name="ro1">
          <table:table-cell office:value-type="float" office:value="169" table:style-name="ce3">
            <text:p>16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40353013</text:p>
          </table:table-cell>
          <table:table-cell office:value-type="string" table:style-name="ce1">
            <text:p>Valentina Andrea Vargas Álvarez</text:p>
          </table:table-cell>
          <table:table-cell office:value-type="date" office:date-value="1975-05-06T00:00:00" table:style-name="ce4">
            <text:p>1975-05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3976034</text:p>
          </table:table-cell>
          <table:table-cell office:value-type="string" table:style-name="ce1">
            <text:p>valentina.vargas169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5-13T06:50:00" table:style-name="ce5">
            <text:p>2026-05-13 06:50</text:p>
          </table:table-cell>
          <table:table-cell office:value-type="date" office:date-value="2026-07-03T04:39:00" table:style-name="ce6">
            <text:p>2026-07-03 04:39</text:p>
          </table:table-cell>
          <table:table-cell table:number-columns-repeated="16369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5342655</text:p>
          </table:table-cell>
          <table:table-cell office:value-type="string" table:style-name="ce1">
            <text:p>Andrea González Giraldo</text:p>
          </table:table-cell>
          <table:table-cell office:value-type="date" office:date-value="1996-03-31T00:00:00" table:style-name="ce4">
            <text:p>1996-03-3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9488151</text:p>
          </table:table-cell>
          <table:table-cell office:value-type="string" table:style-name="ce1">
            <text:p>andrea.gonzalez170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7-03T18:27:00" table:style-name="ce5">
            <text:p>2026-07-03 18:27</text:p>
          </table:table-cell>
          <table:table-cell office:value-type="date" office:date-value="2026-07-05T07:36:00" table:style-name="ce6">
            <text:p>2026-07-05 07:36</text:p>
          </table:table-cell>
          <table:table-cell table:number-columns-repeated="16369"/>
        </table:table-row>
        <table:table-row table:style-name="ro1">
          <table:table-cell office:value-type="float" office:value="171" table:style-name="ce3">
            <text:p>17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43362219</text:p>
          </table:table-cell>
          <table:table-cell office:value-type="string" table:style-name="ce1">
            <text:p>José Ruiz Valencia</text:p>
          </table:table-cell>
          <table:table-cell office:value-type="date" office:date-value="1969-06-26T00:00:00" table:style-name="ce4">
            <text:p>1969-06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5895500</text:p>
          </table:table-cell>
          <table:table-cell office:value-type="string" table:style-name="ce1">
            <text:p>jose.ruiz171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09T15:31:00" table:style-name="ce5">
            <text:p>2026-06-09 15:31</text:p>
          </table:table-cell>
          <table:table-cell office:value-type="date" office:date-value="2026-07-04T03:35:00" table:style-name="ce6">
            <text:p>2026-07-04 03:35</text:p>
          </table:table-cell>
          <table:table-cell table:number-columns-repeated="16369"/>
        </table:table-row>
        <table:table-row table:style-name="ro1">
          <table:table-cell office:value-type="float" office:value="172" table:style-name="ce3">
            <text:p>17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77732359</text:p>
          </table:table-cell>
          <table:table-cell office:value-type="string" table:style-name="ce1">
            <text:p>Juan Andrés Silva Castro</text:p>
          </table:table-cell>
          <table:table-cell office:value-type="date" office:date-value="1975-05-04T00:00:00" table:style-name="ce4">
            <text:p>1975-05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5699962</text:p>
          </table:table-cell>
          <table:table-cell office:value-type="string" table:style-name="ce1">
            <text:p>juan.silva17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4-26T14:18:00" table:style-name="ce5">
            <text:p>2026-04-26 14:18</text:p>
          </table:table-cell>
          <table:table-cell office:value-type="date" office:date-value="2026-06-16T22:58:00" table:style-name="ce6">
            <text:p>2026-06-16 22:58</text:p>
          </table:table-cell>
          <table:table-cell table:number-columns-repeated="16369"/>
        </table:table-row>
        <table:table-row table:style-name="ro1">
          <table:table-cell office:value-type="float" office:value="173" table:style-name="ce3">
            <text:p>17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31022591</text:p>
          </table:table-cell>
          <table:table-cell office:value-type="string" table:style-name="ce1">
            <text:p>Gabriela Hernández Díaz</text:p>
          </table:table-cell>
          <table:table-cell office:value-type="date" office:date-value="1993-11-01T00:00:00" table:style-name="ce4">
            <text:p>1993-11-0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2641487</text:p>
          </table:table-cell>
          <table:table-cell office:value-type="string" table:style-name="ce1">
            <text:p>gabriela.hernandez17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19T18:53:00" table:style-name="ce5">
            <text:p>2026-04-19 18:53</text:p>
          </table:table-cell>
          <table:table-cell office:value-type="date" office:date-value="2026-06-15T16:33:00" table:style-name="ce6">
            <text:p>2026-06-15 16:33</text:p>
          </table:table-cell>
          <table:table-cell table:number-columns-repeated="16369"/>
        </table:table-row>
        <table:table-row table:style-name="ro1">
          <table:table-cell office:value-type="float" office:value="174" table:style-name="ce3">
            <text:p>17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57135556</text:p>
          </table:table-cell>
          <table:table-cell office:value-type="string" table:style-name="ce1">
            <text:p>Camila Quintero López</text:p>
          </table:table-cell>
          <table:table-cell office:value-type="date" office:date-value="1981-12-27T00:00:00" table:style-name="ce4">
            <text:p>1981-12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5539921</text:p>
          </table:table-cell>
          <table:table-cell office:value-type="string" table:style-name="ce1">
            <text:p>camila.quintero17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3-29T15:34:00" table:style-name="ce5">
            <text:p>2026-03-29 15:34</text:p>
          </table:table-cell>
          <table:table-cell office:value-type="date" office:date-value="2026-06-11T15:55:00" table:style-name="ce6">
            <text:p>2026-06-11 15:55</text:p>
          </table:table-cell>
          <table:table-cell table:number-columns-repeated="16369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5643865</text:p>
          </table:table-cell>
          <table:table-cell office:value-type="string" table:style-name="ce1">
            <text:p>Natalia Carolina Silva Pérez</text:p>
          </table:table-cell>
          <table:table-cell office:value-type="date" office:date-value="1987-02-18T00:00:00" table:style-name="ce4">
            <text:p>1987-02-1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4672998</text:p>
          </table:table-cell>
          <table:table-cell office:value-type="string" table:style-name="ce1">
            <text:p>natalia.silva175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3-17T18:16:00" table:style-name="ce5">
            <text:p>2026-03-17 18:16</text:p>
          </table:table-cell>
          <table:table-cell office:value-type="date" office:date-value="2026-04-16T12:11:00" table:style-name="ce6">
            <text:p>2026-04-16 12:11</text:p>
          </table:table-cell>
          <table:table-cell table:number-columns-repeated="16369"/>
        </table:table-row>
        <table:table-row table:style-name="ro1">
          <table:table-cell office:value-type="float" office:value="176" table:style-name="ce3">
            <text:p>17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89683419</text:p>
          </table:table-cell>
          <table:table-cell office:value-type="string" table:style-name="ce1">
            <text:p>Natalia Isabella Rojas Restrepo</text:p>
          </table:table-cell>
          <table:table-cell office:value-type="date" office:date-value="1994-10-30T00:00:00" table:style-name="ce4">
            <text:p>1994-10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8843098</text:p>
          </table:table-cell>
          <table:table-cell office:value-type="string" table:style-name="ce1">
            <text:p>natalia.rojas17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7-03T19:26:00" table:style-name="ce5">
            <text:p>2026-07-03 19:26</text:p>
          </table:table-cell>
          <table:table-cell office:value-type="date" office:date-value="2026-07-07T15:46:00" table:style-name="ce6">
            <text:p>2026-07-07 15:46</text:p>
          </table:table-cell>
          <table:table-cell table:number-columns-repeated="16369"/>
        </table:table-row>
        <table:table-row table:style-name="ro1">
          <table:table-cell office:value-type="float" office:value="177" table:style-name="ce3">
            <text:p>17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72053046</text:p>
          </table:table-cell>
          <table:table-cell office:value-type="string" table:style-name="ce1">
            <text:p>Santiago Ramírez Giraldo</text:p>
          </table:table-cell>
          <table:table-cell office:value-type="date" office:date-value="2000-08-30T00:00:00" table:style-name="ce4">
            <text:p>2000-08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7696274</text:p>
          </table:table-cell>
          <table:table-cell office:value-type="string" table:style-name="ce1">
            <text:p>santiago.ramirez177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3-15T03:30:00" table:style-name="ce5">
            <text:p>2026-03-15 03:30</text:p>
          </table:table-cell>
          <table:table-cell office:value-type="date" office:date-value="2026-04-28T16:45:00" table:style-name="ce6">
            <text:p>2026-04-28 16:45</text:p>
          </table:table-cell>
          <table:table-cell table:number-columns-repeated="16369"/>
        </table:table-row>
        <table:table-row table:style-name="ro1">
          <table:table-cell office:value-type="float" office:value="178" table:style-name="ce3">
            <text:p>178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69969364</text:p>
          </table:table-cell>
          <table:table-cell office:value-type="string" table:style-name="ce1">
            <text:p>Esteban Tomás Valencia López</text:p>
          </table:table-cell>
          <table:table-cell office:value-type="date" office:date-value="2022-03-11T00:00:00" table:style-name="ce4">
            <text:p>2022-03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2715389</text:p>
          </table:table-cell>
          <table:table-cell office:value-type="string" table:style-name="ce1">
            <text:p>esteban.valencia17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06T06:22:00" table:style-name="ce5">
            <text:p>2026-04-06 06:22</text:p>
          </table:table-cell>
          <table:table-cell office:value-type="date" office:date-value="2026-04-17T01:07:00" table:style-name="ce6">
            <text:p>2026-04-17 01:07</text:p>
          </table:table-cell>
          <table:table-cell table:number-columns-repeated="16369"/>
        </table:table-row>
        <table:table-row table:style-name="ro1">
          <table:table-cell office:value-type="float" office:value="179" table:style-name="ce3">
            <text:p>17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10978067</text:p>
          </table:table-cell>
          <table:table-cell office:value-type="string" table:style-name="ce1">
            <text:p>Luisa García Giraldo</text:p>
          </table:table-cell>
          <table:table-cell office:value-type="date" office:date-value="1980-02-26T00:00:00" table:style-name="ce4">
            <text:p>1980-02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9090707</text:p>
          </table:table-cell>
          <table:table-cell office:value-type="string" table:style-name="ce1">
            <text:p>luisa.garcia17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6-27T13:36:00" table:style-name="ce5">
            <text:p>2026-06-27 13:36</text:p>
          </table:table-cell>
          <table:table-cell office:value-type="date" office:date-value="2026-06-30T18:25:00" table:style-name="ce6">
            <text:p>2026-06-30 18:25</text:p>
          </table:table-cell>
          <table:table-cell table:number-columns-repeated="16369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42719311</text:p>
          </table:table-cell>
          <table:table-cell office:value-type="string" table:style-name="ce1">
            <text:p>Ana Castro Castaño</text:p>
          </table:table-cell>
          <table:table-cell office:value-type="date" office:date-value="1999-11-27T00:00:00" table:style-name="ce4">
            <text:p>1999-11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6895699</text:p>
          </table:table-cell>
          <table:table-cell office:value-type="string" table:style-name="ce1">
            <text:p>ana.castro180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5-24T00:49:00" table:style-name="ce5">
            <text:p>2026-05-24 00:49</text:p>
          </table:table-cell>
          <table:table-cell office:value-type="date" office:date-value="2026-06-01T08:47:00" table:style-name="ce6">
            <text:p>2026-06-01 08:47</text:p>
          </table:table-cell>
          <table:table-cell table:number-columns-repeated="16369"/>
        </table:table-row>
        <table:table-row table:style-name="ro1">
          <table:table-cell office:value-type="float" office:value="181" table:style-name="ce3">
            <text:p>18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54611929</text:p>
          </table:table-cell>
          <table:table-cell office:value-type="string" table:style-name="ce1">
            <text:p>Catalina Ruiz Valencia</text:p>
          </table:table-cell>
          <table:table-cell office:value-type="date" office:date-value="1968-09-23T00:00:00" table:style-name="ce4">
            <text:p>1968-09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2301107</text:p>
          </table:table-cell>
          <table:table-cell office:value-type="string" table:style-name="ce1">
            <text:p>catalina.ruiz181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5-30T15:48:00" table:style-name="ce5">
            <text:p>2026-05-30 15:48</text:p>
          </table:table-cell>
          <table:table-cell office:value-type="date" office:date-value="2026-06-20T02:46:00" table:style-name="ce6">
            <text:p>2026-06-20 02:46</text:p>
          </table:table-cell>
          <table:table-cell table:number-columns-repeated="16369"/>
        </table:table-row>
        <table:table-row table:style-name="ro1">
          <table:table-cell office:value-type="float" office:value="182" table:style-name="ce3">
            <text:p>18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9048319</text:p>
          </table:table-cell>
          <table:table-cell office:value-type="string" table:style-name="ce1">
            <text:p>Cristian Ruiz Vargas</text:p>
          </table:table-cell>
          <table:table-cell office:value-type="date" office:date-value="1988-03-05T00:00:00" table:style-name="ce4">
            <text:p>1988-03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6099183</text:p>
          </table:table-cell>
          <table:table-cell office:value-type="string" table:style-name="ce1">
            <text:p>cristian.ruiz182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3-28T06:29:00" table:style-name="ce5">
            <text:p>2026-03-28 06:29</text:p>
          </table:table-cell>
          <table:table-cell office:value-type="date" office:date-value="2026-06-26T16:18:00" table:style-name="ce6">
            <text:p>2026-06-26 16:18</text:p>
          </table:table-cell>
          <table:table-cell table:number-columns-repeated="16369"/>
        </table:table-row>
        <table:table-row table:style-name="ro1">
          <table:table-cell office:value-type="float" office:value="183" table:style-name="ce3">
            <text:p>18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41751600</text:p>
          </table:table-cell>
          <table:table-cell office:value-type="string" table:style-name="ce1">
            <text:p>María Castro Álvarez</text:p>
          </table:table-cell>
          <table:table-cell office:value-type="date" office:date-value="1985-11-22T00:00:00" table:style-name="ce4">
            <text:p>1985-11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6324982</text:p>
          </table:table-cell>
          <table:table-cell office:value-type="string" table:style-name="ce1">
            <text:p>maria.castro18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01T07:00:00" table:style-name="ce5">
            <text:p>2026-05-01 07:00</text:p>
          </table:table-cell>
          <table:table-cell office:value-type="date" office:date-value="2026-05-02T02:16:00" table:style-name="ce6">
            <text:p>2026-05-02 02:16</text:p>
          </table:table-cell>
          <table:table-cell table:number-columns-repeated="16369"/>
        </table:table-row>
        <table:table-row table:style-name="ro1">
          <table:table-cell office:value-type="float" office:value="184" table:style-name="ce3">
            <text:p>18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16889094</text:p>
          </table:table-cell>
          <table:table-cell office:value-type="string" table:style-name="ce1">
            <text:p>Alejandra Sánchez González</text:p>
          </table:table-cell>
          <table:table-cell office:value-type="date" office:date-value="1966-09-26T00:00:00" table:style-name="ce4">
            <text:p>1966-09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1576936</text:p>
          </table:table-cell>
          <table:table-cell office:value-type="string" table:style-name="ce1">
            <text:p>alejandra.sanchez184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09T18:49:00" table:style-name="ce5">
            <text:p>2026-05-09 18:49</text:p>
          </table:table-cell>
          <table:table-cell office:value-type="date" office:date-value="2026-07-08T16:44:00" table:style-name="ce6">
            <text:p>2026-07-08 16:44</text:p>
          </table:table-cell>
          <table:table-cell table:number-columns-repeated="16369"/>
        </table:table-row>
        <table:table-row table:style-name="ro1">
          <table:table-cell office:value-type="float" office:value="185" table:style-name="ce3">
            <text:p>18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7997780</text:p>
          </table:table-cell>
          <table:table-cell office:value-type="string" table:style-name="ce1">
            <text:p>Felipe Cristian Hernández Vargas</text:p>
          </table:table-cell>
          <table:table-cell office:value-type="date" office:date-value="1989-09-08T00:00:00" table:style-name="ce4">
            <text:p>1989-09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6292922</text:p>
          </table:table-cell>
          <table:table-cell office:value-type="string" table:style-name="ce1">
            <text:p>felipe.hernandez185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03T14:16:00" table:style-name="ce5">
            <text:p>2026-05-03 14:16</text:p>
          </table:table-cell>
          <table:table-cell office:value-type="date" office:date-value="2026-06-22T09:14:00" table:style-name="ce6">
            <text:p>2026-06-22 09:14</text:p>
          </table:table-cell>
          <table:table-cell table:number-columns-repeated="16369"/>
        </table:table-row>
        <table:table-row table:style-name="ro1">
          <table:table-cell office:value-type="float" office:value="186" table:style-name="ce3">
            <text:p>18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61561990</text:p>
          </table:table-cell>
          <table:table-cell office:value-type="string" table:style-name="ce1">
            <text:p>Catalina Álvarez Moreno</text:p>
          </table:table-cell>
          <table:table-cell office:value-type="date" office:date-value="1972-03-10T00:00:00" table:style-name="ce4">
            <text:p>1972-03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3877495</text:p>
          </table:table-cell>
          <table:table-cell office:value-type="string" table:style-name="ce1">
            <text:p>catalina.alvarez186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7-07T08:14:00" table:style-name="ce5">
            <text:p>2026-07-07 08:14</text:p>
          </table:table-cell>
          <table:table-cell office:value-type="date" office:date-value="2026-07-09T23:19:00" table:style-name="ce6">
            <text:p>2026-07-09 23:19</text:p>
          </table:table-cell>
          <table:table-cell table:number-columns-repeated="16369"/>
        </table:table-row>
        <table:table-row table:style-name="ro1">
          <table:table-cell office:value-type="float" office:value="187" table:style-name="ce3">
            <text:p>18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26139357</text:p>
          </table:table-cell>
          <table:table-cell office:value-type="string" table:style-name="ce1">
            <text:p>Daniela González García</text:p>
          </table:table-cell>
          <table:table-cell office:value-type="date" office:date-value="2003-06-24T00:00:00" table:style-name="ce4">
            <text:p>2003-06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1661652</text:p>
          </table:table-cell>
          <table:table-cell office:value-type="string" table:style-name="ce1">
            <text:p>daniela.gonzalez187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03T11:05:00" table:style-name="ce5">
            <text:p>2026-06-03 11:05</text:p>
          </table:table-cell>
          <table:table-cell office:value-type="date" office:date-value="2026-06-10T06:55:00" table:style-name="ce6">
            <text:p>2026-06-10 06:55</text:p>
          </table:table-cell>
          <table:table-cell table:number-columns-repeated="16369"/>
        </table:table-row>
        <table:table-row table:style-name="ro1">
          <table:table-cell office:value-type="float" office:value="188" table:style-name="ce3">
            <text:p>188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700260673</text:p>
          </table:table-cell>
          <table:table-cell office:value-type="string" table:style-name="ce1">
            <text:p>Carolina Valentina Silva Valencia</text:p>
          </table:table-cell>
          <table:table-cell office:value-type="date" office:date-value="1986-05-22T00:00:00" table:style-name="ce4">
            <text:p>1986-05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2805898</text:p>
          </table:table-cell>
          <table:table-cell office:value-type="string" table:style-name="ce1">
            <text:p>carolina.silva18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17T05:29:00" table:style-name="ce5">
            <text:p>2026-04-17 05:29</text:p>
          </table:table-cell>
          <table:table-cell office:value-type="date" office:date-value="2026-04-21T22:35:00" table:style-name="ce6">
            <text:p>2026-04-21 22:35</text:p>
          </table:table-cell>
          <table:table-cell table:number-columns-repeated="16369"/>
        </table:table-row>
        <table:table-row table:style-name="ro1">
          <table:table-cell office:value-type="float" office:value="189" table:style-name="ce3">
            <text:p>18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08618745</text:p>
          </table:table-cell>
          <table:table-cell office:value-type="string" table:style-name="ce1">
            <text:p>Santiago Ramírez Rojas</text:p>
          </table:table-cell>
          <table:table-cell office:value-type="date" office:date-value="1984-05-06T00:00:00" table:style-name="ce4">
            <text:p>1984-05-06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185707312</text:p>
          </table:table-cell>
          <table:table-cell office:value-type="string" table:style-name="ce1">
            <text:p>santiago.ramirez18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12T01:49:00" table:style-name="ce5">
            <text:p>2026-05-12 01:49</text:p>
          </table:table-cell>
          <table:table-cell office:value-type="date" office:date-value="2026-05-18T04:17:00" table:style-name="ce6">
            <text:p>2026-05-18 04:17</text:p>
          </table:table-cell>
          <table:table-cell table:number-columns-repeated="16369"/>
        </table:table-row>
        <table:table-row table:style-name="ro1">
          <table:table-cell office:value-type="float" office:value="190" table:style-name="ce3">
            <text:p>19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44998955</text:p>
          </table:table-cell>
          <table:table-cell office:value-type="string" table:style-name="ce1">
            <text:p>Sebastián Santiago Álvarez Castro</text:p>
          </table:table-cell>
          <table:table-cell office:value-type="date" office:date-value="2013-02-18T00:00:00" table:style-name="ce4">
            <text:p>2013-02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8936397</text:p>
          </table:table-cell>
          <table:table-cell office:value-type="string" table:style-name="ce1">
            <text:p>sebastian.alvarez19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29T11:49:00" table:style-name="ce5">
            <text:p>2026-04-29 11:49</text:p>
          </table:table-cell>
          <table:table-cell office:value-type="date" office:date-value="2026-05-04T16:07:00" table:style-name="ce6">
            <text:p>2026-05-04 16:07</text:p>
          </table:table-cell>
          <table:table-cell table:number-columns-repeated="16369"/>
        </table:table-row>
        <table:table-row table:style-name="ro1">
          <table:table-cell office:value-type="float" office:value="191" table:style-name="ce3">
            <text:p>19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4606603</text:p>
          </table:table-cell>
          <table:table-cell office:value-type="string" table:style-name="ce1">
            <text:p>Andrés Restrepo Ortiz</text:p>
          </table:table-cell>
          <table:table-cell office:value-type="date" office:date-value="1989-02-11T00:00:00" table:style-name="ce4">
            <text:p>1989-02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7640516</text:p>
          </table:table-cell>
          <table:table-cell office:value-type="string" table:style-name="ce1">
            <text:p>andres.restrepo191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7-05T14:24:00" table:style-name="ce5">
            <text:p>2026-07-05 14:24</text:p>
          </table:table-cell>
          <table:table-cell office:value-type="date" office:date-value="2026-07-07T09:47:00" table:style-name="ce6">
            <text:p>2026-07-07 09:47</text:p>
          </table:table-cell>
          <table:table-cell table:number-columns-repeated="16369"/>
        </table:table-row>
        <table:table-row table:style-name="ro1">
          <table:table-cell office:value-type="float" office:value="192" table:style-name="ce3">
            <text:p>192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236289971</text:p>
          </table:table-cell>
          <table:table-cell office:value-type="string" table:style-name="ce1">
            <text:p>Catalina Hernández González</text:p>
          </table:table-cell>
          <table:table-cell office:value-type="date" office:date-value="2007-01-23T00:00:00" table:style-name="ce4">
            <text:p>2007-01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6616472</text:p>
          </table:table-cell>
          <table:table-cell office:value-type="string" table:style-name="ce1">
            <text:p>catalina.hernandez192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4-13T17:03:00" table:style-name="ce5">
            <text:p>2026-04-13 17:03</text:p>
          </table:table-cell>
          <table:table-cell office:value-type="date" office:date-value="2026-06-27T15:57:00" table:style-name="ce6">
            <text:p>2026-06-27 15:57</text:p>
          </table:table-cell>
          <table:table-cell table:number-columns-repeated="16369"/>
        </table:table-row>
        <table:table-row table:style-name="ro1">
          <table:table-cell office:value-type="float" office:value="193" table:style-name="ce3">
            <text:p>19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0271456</text:p>
          </table:table-cell>
          <table:table-cell office:value-type="string" table:style-name="ce1">
            <text:p>Alejandra Giraldo Romero</text:p>
          </table:table-cell>
          <table:table-cell office:value-type="date" office:date-value="1992-03-19T00:00:00" table:style-name="ce4">
            <text:p>1992-03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7046736</text:p>
          </table:table-cell>
          <table:table-cell office:value-type="string" table:style-name="ce1">
            <text:p>alejandra.giraldo193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6-20T22:27:00" table:style-name="ce5">
            <text:p>2026-06-20 22:27</text:p>
          </table:table-cell>
          <table:table-cell office:value-type="date" office:date-value="2026-07-03T06:44:00" table:style-name="ce6">
            <text:p>2026-07-03 06:44</text:p>
          </table:table-cell>
          <table:table-cell table:number-columns-repeated="16369"/>
        </table:table-row>
        <table:table-row table:style-name="ro1">
          <table:table-cell office:value-type="float" office:value="194" table:style-name="ce3">
            <text:p>19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51635841</text:p>
          </table:table-cell>
          <table:table-cell office:value-type="string" table:style-name="ce1">
            <text:p>Juliana González Díaz</text:p>
          </table:table-cell>
          <table:table-cell office:value-type="date" office:date-value="1976-04-02T00:00:00" table:style-name="ce4">
            <text:p>1976-04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1387048</text:p>
          </table:table-cell>
          <table:table-cell office:value-type="string" table:style-name="ce1">
            <text:p>juliana.gonzalez19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12T18:26:00" table:style-name="ce5">
            <text:p>2026-04-12 18:26</text:p>
          </table:table-cell>
          <table:table-cell office:value-type="date" office:date-value="2026-04-13T01:19:00" table:style-name="ce6">
            <text:p>2026-04-13 01:19</text:p>
          </table:table-cell>
          <table:table-cell table:number-columns-repeated="16369"/>
        </table:table-row>
        <table:table-row table:style-name="ro1">
          <table:table-cell office:value-type="float" office:value="195" table:style-name="ce3">
            <text:p>19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06018321</text:p>
          </table:table-cell>
          <table:table-cell office:value-type="string" table:style-name="ce1">
            <text:p>María Ana García Castro</text:p>
          </table:table-cell>
          <table:table-cell office:value-type="date" office:date-value="1966-10-04T00:00:00" table:style-name="ce4">
            <text:p>1966-10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6215876</text:p>
          </table:table-cell>
          <table:table-cell office:value-type="string" table:style-name="ce1">
            <text:p>maria.garcia195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5-27T04:45:00" table:style-name="ce5">
            <text:p>2026-05-27 04:45</text:p>
          </table:table-cell>
          <table:table-cell office:value-type="date" office:date-value="2026-07-02T06:46:00" table:style-name="ce6">
            <text:p>2026-07-02 06:46</text:p>
          </table:table-cell>
          <table:table-cell table:number-columns-repeated="16369"/>
        </table:table-row>
        <table:table-row table:style-name="ro1">
          <table:table-cell office:value-type="float" office:value="196" table:style-name="ce3">
            <text:p>19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08394004</text:p>
          </table:table-cell>
          <table:table-cell office:value-type="string" table:style-name="ce1">
            <text:p>Esteban Miguel Restrepo Hernández</text:p>
          </table:table-cell>
          <table:table-cell office:value-type="date" office:date-value="1978-03-12T00:00:00" table:style-name="ce4">
            <text:p>1978-03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5164121</text:p>
          </table:table-cell>
          <table:table-cell office:value-type="string" table:style-name="ce1">
            <text:p>esteban.restrepo196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14T05:29:00" table:style-name="ce5">
            <text:p>2026-03-14 05:29</text:p>
          </table:table-cell>
          <table:table-cell office:value-type="date" office:date-value="2026-04-10T13:10:00" table:style-name="ce6">
            <text:p>2026-04-10 13:10</text:p>
          </table:table-cell>
          <table:table-cell table:number-columns-repeated="16369"/>
        </table:table-row>
        <table:table-row table:style-name="ro1">
          <table:table-cell office:value-type="float" office:value="197" table:style-name="ce3">
            <text:p>19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74559412</text:p>
          </table:table-cell>
          <table:table-cell office:value-type="string" table:style-name="ce1">
            <text:p>Jorge Ortiz Ramírez</text:p>
          </table:table-cell>
          <table:table-cell office:value-type="date" office:date-value="1978-02-17T00:00:00" table:style-name="ce4">
            <text:p>1978-02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8687382</text:p>
          </table:table-cell>
          <table:table-cell office:value-type="string" table:style-name="ce1">
            <text:p>jorge.ortiz197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4-25T08:08:00" table:style-name="ce5">
            <text:p>2026-04-25 08:08</text:p>
          </table:table-cell>
          <table:table-cell office:value-type="date" office:date-value="2026-06-01T21:53:00" table:style-name="ce6">
            <text:p>2026-06-01 21:53</text:p>
          </table:table-cell>
          <table:table-cell table:number-columns-repeated="16369"/>
        </table:table-row>
        <table:table-row table:style-name="ro1">
          <table:table-cell office:value-type="float" office:value="198" table:style-name="ce3">
            <text:p>19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65856953</text:p>
          </table:table-cell>
          <table:table-cell office:value-type="string" table:style-name="ce1">
            <text:p>Paula Catalina Ospina Hernández</text:p>
          </table:table-cell>
          <table:table-cell office:value-type="date" office:date-value="1968-06-06T00:00:00" table:style-name="ce4">
            <text:p>1968-06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8510130</text:p>
          </table:table-cell>
          <table:table-cell office:value-type="string" table:style-name="ce1">
            <text:p>paula.ospina198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19T23:23:00" table:style-name="ce5">
            <text:p>2026-04-19 23:23</text:p>
          </table:table-cell>
          <table:table-cell office:value-type="date" office:date-value="2026-06-27T03:27:00" table:style-name="ce6">
            <text:p>2026-06-27 03:27</text:p>
          </table:table-cell>
          <table:table-cell table:number-columns-repeated="16369"/>
        </table:table-row>
        <table:table-row table:style-name="ro1">
          <table:table-cell office:value-type="float" office:value="199" table:style-name="ce3">
            <text:p>19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1618175</text:p>
          </table:table-cell>
          <table:table-cell office:value-type="string" table:style-name="ce1">
            <text:p>Daniel Santiago Castro Restrepo</text:p>
          </table:table-cell>
          <table:table-cell office:value-type="date" office:date-value="2000-04-28T00:00:00" table:style-name="ce4">
            <text:p>2000-04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3289036</text:p>
          </table:table-cell>
          <table:table-cell office:value-type="string" table:style-name="ce1">
            <text:p>daniel.castro199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25T21:05:00" table:style-name="ce5">
            <text:p>2026-06-25 21:05</text:p>
          </table:table-cell>
          <table:table-cell office:value-type="date" office:date-value="2026-07-08T18:06:00" table:style-name="ce6">
            <text:p>2026-07-08 18:06</text:p>
          </table:table-cell>
          <table:table-cell table:number-columns-repeated="16369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83314146</text:p>
          </table:table-cell>
          <table:table-cell office:value-type="string" table:style-name="ce1">
            <text:p>Santiago Torres Sánchez</text:p>
          </table:table-cell>
          <table:table-cell office:value-type="date" office:date-value="1993-10-19T00:00:00" table:style-name="ce4">
            <text:p>1993-10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7925628</text:p>
          </table:table-cell>
          <table:table-cell office:value-type="string" table:style-name="ce1">
            <text:p>santiago.torres200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18T05:04:00" table:style-name="ce5">
            <text:p>2026-05-18 05:04</text:p>
          </table:table-cell>
          <table:table-cell office:value-type="date" office:date-value="2026-06-25T01:52:00" table:style-name="ce6">
            <text:p>2026-06-25 01:52</text:p>
          </table:table-cell>
          <table:table-cell table:number-columns-repeated="16369"/>
        </table:table-row>
        <table:table-row table:style-name="ro1">
          <table:table-cell office:value-type="float" office:value="201" table:style-name="ce3">
            <text:p>20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11823224</text:p>
          </table:table-cell>
          <table:table-cell office:value-type="string" table:style-name="ce1">
            <text:p>Tomás Mateo Silva Sánchez</text:p>
          </table:table-cell>
          <table:table-cell office:value-type="date" office:date-value="1989-05-12T00:00:00" table:style-name="ce4">
            <text:p>1989-05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3758623</text:p>
          </table:table-cell>
          <table:table-cell office:value-type="string" table:style-name="ce1">
            <text:p>tomas.silva201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7-08T17:45:00" table:style-name="ce5">
            <text:p>2026-07-08 17:45</text:p>
          </table:table-cell>
          <table:table-cell office:value-type="date" office:date-value="2026-07-09T00:46:00" table:style-name="ce6">
            <text:p>2026-07-09 00:46</text:p>
          </table:table-cell>
          <table:table-cell table:number-columns-repeated="16369"/>
        </table:table-row>
        <table:table-row table:style-name="ro1">
          <table:table-cell office:value-type="float" office:value="202" table:style-name="ce3">
            <text:p>20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7395329</text:p>
          </table:table-cell>
          <table:table-cell office:value-type="string" table:style-name="ce1">
            <text:p>Andrés Álvarez Jiménez</text:p>
          </table:table-cell>
          <table:table-cell office:value-type="date" office:date-value="1988-05-01T00:00:00" table:style-name="ce4">
            <text:p>1988-05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2813396</text:p>
          </table:table-cell>
          <table:table-cell office:value-type="string" table:style-name="ce1">
            <text:p>andres.alvarez202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01T08:13:00" table:style-name="ce5">
            <text:p>2026-05-01 08:13</text:p>
          </table:table-cell>
          <table:table-cell office:value-type="date" office:date-value="2026-05-31T09:18:00" table:style-name="ce6">
            <text:p>2026-05-31 09:18</text:p>
          </table:table-cell>
          <table:table-cell table:number-columns-repeated="16369"/>
        </table:table-row>
        <table:table-row table:style-name="ro1">
          <table:table-cell office:value-type="float" office:value="203" table:style-name="ce3">
            <text:p>20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8597310</text:p>
          </table:table-cell>
          <table:table-cell office:value-type="string" table:style-name="ce1">
            <text:p>Paula Ruiz Mendoza</text:p>
          </table:table-cell>
          <table:table-cell office:value-type="date" office:date-value="1988-10-07T00:00:00" table:style-name="ce4">
            <text:p>1988-10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5438703</text:p>
          </table:table-cell>
          <table:table-cell office:value-type="string" table:style-name="ce1">
            <text:p>paula.ruiz203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6-12T22:29:00" table:style-name="ce5">
            <text:p>2026-06-12 22:29</text:p>
          </table:table-cell>
          <table:table-cell office:value-type="date" office:date-value="2026-06-17T22:50:00" table:style-name="ce6">
            <text:p>2026-06-17 22:50</text:p>
          </table:table-cell>
          <table:table-cell table:number-columns-repeated="16369"/>
        </table:table-row>
        <table:table-row table:style-name="ro1">
          <table:table-cell office:value-type="float" office:value="204" table:style-name="ce3">
            <text:p>20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61617533</text:p>
          </table:table-cell>
          <table:table-cell office:value-type="string" table:style-name="ce1">
            <text:p>Sara Ana Mendoza Castaño</text:p>
          </table:table-cell>
          <table:table-cell office:value-type="date" office:date-value="1947-01-09T00:00:00" table:style-name="ce4">
            <text:p>1947-01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3148849</text:p>
          </table:table-cell>
          <table:table-cell office:value-type="string" table:style-name="ce1">
            <text:p>sara.mendoza204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05T01:28:00" table:style-name="ce5">
            <text:p>2026-05-05 01:28</text:p>
          </table:table-cell>
          <table:table-cell office:value-type="date" office:date-value="2026-06-29T17:39:00" table:style-name="ce6">
            <text:p>2026-06-29 17:39</text:p>
          </table:table-cell>
          <table:table-cell table:number-columns-repeated="16369"/>
        </table:table-row>
        <table:table-row table:style-name="ro1">
          <table:table-cell office:value-type="float" office:value="205" table:style-name="ce3">
            <text:p>20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66425475</text:p>
          </table:table-cell>
          <table:table-cell office:value-type="string" table:style-name="ce1">
            <text:p>Samuel Muñoz Rodríguez</text:p>
          </table:table-cell>
          <table:table-cell office:value-type="date" office:date-value="1980-11-02T00:00:00" table:style-name="ce4">
            <text:p>1980-11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9704346</text:p>
          </table:table-cell>
          <table:table-cell office:value-type="string" table:style-name="ce1">
            <text:p>samuel.munoz20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20T22:05:00" table:style-name="ce5">
            <text:p>2026-04-20 22:05</text:p>
          </table:table-cell>
          <table:table-cell office:value-type="date" office:date-value="2026-06-03T12:51:00" table:style-name="ce6">
            <text:p>2026-06-03 12:51</text:p>
          </table:table-cell>
          <table:table-cell table:number-columns-repeated="16369"/>
        </table:table-row>
        <table:table-row table:style-name="ro1">
          <table:table-cell office:value-type="float" office:value="206" table:style-name="ce3">
            <text:p>20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36728215</text:p>
          </table:table-cell>
          <table:table-cell office:value-type="string" table:style-name="ce1">
            <text:p>Camila Torres Álvarez</text:p>
          </table:table-cell>
          <table:table-cell office:value-type="date" office:date-value="1996-07-08T00:00:00" table:style-name="ce4">
            <text:p>1996-07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5589836</text:p>
          </table:table-cell>
          <table:table-cell office:value-type="string" table:style-name="ce1">
            <text:p>camila.torres206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25T17:04:00" table:style-name="ce5">
            <text:p>2026-06-25 17:04</text:p>
          </table:table-cell>
          <table:table-cell office:value-type="date" office:date-value="2026-07-03T01:37:00" table:style-name="ce6">
            <text:p>2026-07-03 01:37</text:p>
          </table:table-cell>
          <table:table-cell table:number-columns-repeated="16369"/>
        </table:table-row>
        <table:table-row table:style-name="ro1">
          <table:table-cell office:value-type="float" office:value="207" table:style-name="ce3">
            <text:p>20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944293</text:p>
          </table:table-cell>
          <table:table-cell office:value-type="string" table:style-name="ce1">
            <text:p>Santiago Sánchez Romero</text:p>
          </table:table-cell>
          <table:table-cell office:value-type="date" office:date-value="1990-03-04T00:00:00" table:style-name="ce4">
            <text:p>1990-03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5159447</text:p>
          </table:table-cell>
          <table:table-cell office:value-type="string" table:style-name="ce1">
            <text:p>santiago.sanchez20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07T20:35:00" table:style-name="ce5">
            <text:p>2026-06-07 20:35</text:p>
          </table:table-cell>
          <table:table-cell office:value-type="date" office:date-value="2026-06-21T07:25:00" table:style-name="ce6">
            <text:p>2026-06-21 07:25</text:p>
          </table:table-cell>
          <table:table-cell table:number-columns-repeated="16369"/>
        </table:table-row>
        <table:table-row table:style-name="ro1">
          <table:table-cell office:value-type="float" office:value="208" table:style-name="ce3">
            <text:p>20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0127909</text:p>
          </table:table-cell>
          <table:table-cell office:value-type="string" table:style-name="ce1">
            <text:p>Alejandra García Martínez</text:p>
          </table:table-cell>
          <table:table-cell office:value-type="date" office:date-value="1990-11-02T00:00:00" table:style-name="ce4">
            <text:p>1990-11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5634535</text:p>
          </table:table-cell>
          <table:table-cell office:value-type="string" table:style-name="ce1">
            <text:p>alejandra.garcia208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15T02:31:00" table:style-name="ce5">
            <text:p>2026-05-15 02:31</text:p>
          </table:table-cell>
          <table:table-cell office:value-type="date" office:date-value="2026-05-21T12:23:00" table:style-name="ce6">
            <text:p>2026-05-21 12:23</text:p>
          </table:table-cell>
          <table:table-cell table:number-columns-repeated="16369"/>
        </table:table-row>
        <table:table-row table:style-name="ro1">
          <table:table-cell office:value-type="float" office:value="209" table:style-name="ce3">
            <text:p>20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01869618</text:p>
          </table:table-cell>
          <table:table-cell office:value-type="string" table:style-name="ce1">
            <text:p>Mateo Quintero Mendoza</text:p>
          </table:table-cell>
          <table:table-cell office:value-type="date" office:date-value="1947-09-08T00:00:00" table:style-name="ce4">
            <text:p>1947-09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5178992</text:p>
          </table:table-cell>
          <table:table-cell office:value-type="string" table:style-name="ce1">
            <text:p>mateo.quintero209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06T07:58:00" table:style-name="ce5">
            <text:p>2026-06-06 07:58</text:p>
          </table:table-cell>
          <table:table-cell office:value-type="date" office:date-value="2026-06-16T19:23:00" table:style-name="ce6">
            <text:p>2026-06-16 19:23</text:p>
          </table:table-cell>
          <table:table-cell table:number-columns-repeated="16369"/>
        </table:table-row>
        <table:table-row table:style-name="ro1">
          <table:table-cell office:value-type="float" office:value="210" table:style-name="ce3">
            <text:p>21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86480726</text:p>
          </table:table-cell>
          <table:table-cell office:value-type="string" table:style-name="ce1">
            <text:p>Alejandro Ruiz Giraldo</text:p>
          </table:table-cell>
          <table:table-cell office:value-type="date" office:date-value="1992-12-19T00:00:00" table:style-name="ce4">
            <text:p>1992-12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6941261</text:p>
          </table:table-cell>
          <table:table-cell office:value-type="string" table:style-name="ce1">
            <text:p>alejandro.ruiz21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5-04T19:08:00" table:style-name="ce5">
            <text:p>2026-05-04 19:08</text:p>
          </table:table-cell>
          <table:table-cell office:value-type="date" office:date-value="2026-06-16T02:10:00" table:style-name="ce6">
            <text:p>2026-06-16 02:10</text:p>
          </table:table-cell>
          <table:table-cell table:number-columns-repeated="16369"/>
        </table:table-row>
        <table:table-row table:style-name="ro1">
          <table:table-cell office:value-type="float" office:value="211" table:style-name="ce3">
            <text:p>21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9296592</text:p>
          </table:table-cell>
          <table:table-cell office:value-type="string" table:style-name="ce1">
            <text:p>Daniel Rojas López</text:p>
          </table:table-cell>
          <table:table-cell office:value-type="date" office:date-value="1955-11-12T00:00:00" table:style-name="ce4">
            <text:p>1955-11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9265896</text:p>
          </table:table-cell>
          <table:table-cell office:value-type="string" table:style-name="ce1">
            <text:p>daniel.rojas211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27T19:08:00" table:style-name="ce5">
            <text:p>2026-05-27 19:08</text:p>
          </table:table-cell>
          <table:table-cell office:value-type="date" office:date-value="2026-06-20T00:28:00" table:style-name="ce6">
            <text:p>2026-06-20 00:28</text:p>
          </table:table-cell>
          <table:table-cell table:number-columns-repeated="16369"/>
        </table:table-row>
        <table:table-row table:style-name="ro1">
          <table:table-cell office:value-type="float" office:value="212" table:style-name="ce3">
            <text:p>21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44009785</text:p>
          </table:table-cell>
          <table:table-cell office:value-type="string" table:style-name="ce1">
            <text:p>Mateo Hernández Moreno</text:p>
          </table:table-cell>
          <table:table-cell office:value-type="date" office:date-value="1983-02-12T00:00:00" table:style-name="ce4">
            <text:p>1983-02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9276724</text:p>
          </table:table-cell>
          <table:table-cell office:value-type="string" table:style-name="ce1">
            <text:p>mateo.hernandez212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4-15T11:29:00" table:style-name="ce5">
            <text:p>2026-04-15 11:29</text:p>
          </table:table-cell>
          <table:table-cell office:value-type="date" office:date-value="2026-04-24T18:12:00" table:style-name="ce6">
            <text:p>2026-04-24 18:12</text:p>
          </table:table-cell>
          <table:table-cell table:number-columns-repeated="16369"/>
        </table:table-row>
        <table:table-row table:style-name="ro1">
          <table:table-cell office:value-type="float" office:value="213" table:style-name="ce3">
            <text:p>21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1932220</text:p>
          </table:table-cell>
          <table:table-cell office:value-type="string" table:style-name="ce1">
            <text:p>Santiago Tomás Silva Ruiz</text:p>
          </table:table-cell>
          <table:table-cell office:value-type="date" office:date-value="1958-01-02T00:00:00" table:style-name="ce4">
            <text:p>1958-01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2128913</text:p>
          </table:table-cell>
          <table:table-cell office:value-type="string" table:style-name="ce1">
            <text:p>santiago.silva213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3-14T08:01:00" table:style-name="ce5">
            <text:p>2026-03-14 08:01</text:p>
          </table:table-cell>
          <table:table-cell office:value-type="date" office:date-value="2026-03-20T15:42:00" table:style-name="ce6">
            <text:p>2026-03-20 15:42</text:p>
          </table:table-cell>
          <table:table-cell table:number-columns-repeated="16369"/>
        </table:table-row>
        <table:table-row table:style-name="ro1">
          <table:table-cell office:value-type="float" office:value="214" table:style-name="ce3">
            <text:p>21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28342087</text:p>
          </table:table-cell>
          <table:table-cell office:value-type="string" table:style-name="ce1">
            <text:p>Julián Nicolás Moreno García</text:p>
          </table:table-cell>
          <table:table-cell office:value-type="date" office:date-value="2008-06-27T00:00:00" table:style-name="ce4">
            <text:p>2008-06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7842660</text:p>
          </table:table-cell>
          <table:table-cell office:value-type="string" table:style-name="ce1">
            <text:p>julian.moreno214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04T14:08:00" table:style-name="ce5">
            <text:p>2026-04-04 14:08</text:p>
          </table:table-cell>
          <table:table-cell office:value-type="date" office:date-value="2026-04-05T06:38:00" table:style-name="ce6">
            <text:p>2026-04-05 06:38</text:p>
          </table:table-cell>
          <table:table-cell table:number-columns-repeated="16369"/>
        </table:table-row>
        <table:table-row table:style-name="ro1">
          <table:table-cell office:value-type="float" office:value="215" table:style-name="ce3">
            <text:p>21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385940</text:p>
          </table:table-cell>
          <table:table-cell office:value-type="string" table:style-name="ce1">
            <text:p>Isabella Cárdenas Silva</text:p>
          </table:table-cell>
          <table:table-cell office:value-type="date" office:date-value="1979-06-27T00:00:00" table:style-name="ce4">
            <text:p>1979-06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3343894</text:p>
          </table:table-cell>
          <table:table-cell office:value-type="string" table:style-name="ce1">
            <text:p>isabella.cardenas215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6-02T06:00:00" table:style-name="ce5">
            <text:p>2026-06-02 06:00</text:p>
          </table:table-cell>
          <table:table-cell office:value-type="date" office:date-value="2026-06-05T14:35:00" table:style-name="ce6">
            <text:p>2026-06-05 14:35</text:p>
          </table:table-cell>
          <table:table-cell table:number-columns-repeated="16369"/>
        </table:table-row>
        <table:table-row table:style-name="ro1">
          <table:table-cell office:value-type="float" office:value="216" table:style-name="ce3">
            <text:p>21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45739218</text:p>
          </table:table-cell>
          <table:table-cell office:value-type="string" table:style-name="ce1">
            <text:p>Santiago Vargas Hernández</text:p>
          </table:table-cell>
          <table:table-cell office:value-type="date" office:date-value="1944-08-06T00:00:00" table:style-name="ce4">
            <text:p>1944-08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5076248</text:p>
          </table:table-cell>
          <table:table-cell office:value-type="string" table:style-name="ce1">
            <text:p>santiago.vargas21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4-08T09:24:00" table:style-name="ce5">
            <text:p>2026-04-08 09:24</text:p>
          </table:table-cell>
          <table:table-cell office:value-type="date" office:date-value="2026-07-02T13:57:00" table:style-name="ce6">
            <text:p>2026-07-02 13:57</text:p>
          </table:table-cell>
          <table:table-cell table:number-columns-repeated="16369"/>
        </table:table-row>
        <table:table-row table:style-name="ro1">
          <table:table-cell office:value-type="float" office:value="217" table:style-name="ce3">
            <text:p>21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8831554</text:p>
          </table:table-cell>
          <table:table-cell office:value-type="string" table:style-name="ce1">
            <text:p>Alejandro David Quintero Díaz</text:p>
          </table:table-cell>
          <table:table-cell office:value-type="date" office:date-value="1987-07-08T00:00:00" table:style-name="ce4">
            <text:p>1987-07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9577834</text:p>
          </table:table-cell>
          <table:table-cell office:value-type="string" table:style-name="ce1">
            <text:p>alejandro.quintero217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6-13T03:34:00" table:style-name="ce5">
            <text:p>2026-06-13 03:34</text:p>
          </table:table-cell>
          <table:table-cell office:value-type="date" office:date-value="2026-06-23T12:51:00" table:style-name="ce6">
            <text:p>2026-06-23 12:51</text:p>
          </table:table-cell>
          <table:table-cell table:number-columns-repeated="16369"/>
        </table:table-row>
        <table:table-row table:style-name="ro1">
          <table:table-cell office:value-type="float" office:value="218" table:style-name="ce3">
            <text:p>21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48763369</text:p>
          </table:table-cell>
          <table:table-cell office:value-type="string" table:style-name="ce1">
            <text:p>Samuel Restrepo Díaz</text:p>
          </table:table-cell>
          <table:table-cell office:value-type="date" office:date-value="1997-06-06T00:00:00" table:style-name="ce4">
            <text:p>1997-06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2517943</text:p>
          </table:table-cell>
          <table:table-cell office:value-type="string" table:style-name="ce1">
            <text:p>samuel.restrepo218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13T03:18:00" table:style-name="ce5">
            <text:p>2026-04-13 03:18</text:p>
          </table:table-cell>
          <table:table-cell office:value-type="date" office:date-value="2026-05-20T22:38:00" table:style-name="ce6">
            <text:p>2026-05-20 22:38</text:p>
          </table:table-cell>
          <table:table-cell table:number-columns-repeated="16369"/>
        </table:table-row>
        <table:table-row table:style-name="ro1">
          <table:table-cell office:value-type="float" office:value="219" table:style-name="ce3">
            <text:p>21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80745687</text:p>
          </table:table-cell>
          <table:table-cell office:value-type="string" table:style-name="ce1">
            <text:p>Julián Rojas Sánchez</text:p>
          </table:table-cell>
          <table:table-cell office:value-type="date" office:date-value="1994-06-26T00:00:00" table:style-name="ce4">
            <text:p>1994-06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1366750</text:p>
          </table:table-cell>
          <table:table-cell office:value-type="string" table:style-name="ce1">
            <text:p>julian.rojas219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7-05T00:30:00" table:style-name="ce5">
            <text:p>2026-07-05 00:30</text:p>
          </table:table-cell>
          <table:table-cell office:value-type="date" office:date-value="2026-07-08T17:56:00" table:style-name="ce6">
            <text:p>2026-07-08 17:56</text:p>
          </table:table-cell>
          <table:table-cell table:number-columns-repeated="16369"/>
        </table:table-row>
        <table:table-row table:style-name="ro1">
          <table:table-cell office:value-type="float" office:value="220" table:style-name="ce3">
            <text:p>22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85005457</text:p>
          </table:table-cell>
          <table:table-cell office:value-type="string" table:style-name="ce1">
            <text:p>Valentina Muñoz Quintero</text:p>
          </table:table-cell>
          <table:table-cell office:value-type="date" office:date-value="1969-07-09T00:00:00" table:style-name="ce4">
            <text:p>1969-07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6241228</text:p>
          </table:table-cell>
          <table:table-cell office:value-type="string" table:style-name="ce1">
            <text:p>valentina.munoz22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13T03:05:00" table:style-name="ce5">
            <text:p>2026-05-13 03:05</text:p>
          </table:table-cell>
          <table:table-cell office:value-type="date" office:date-value="2026-05-31T11:25:00" table:style-name="ce6">
            <text:p>2026-05-31 11:25</text:p>
          </table:table-cell>
          <table:table-cell table:number-columns-repeated="16369"/>
        </table:table-row>
        <table:table-row table:style-name="ro1">
          <table:table-cell office:value-type="float" office:value="221" table:style-name="ce3">
            <text:p>22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3161110</text:p>
          </table:table-cell>
          <table:table-cell office:value-type="string" table:style-name="ce1">
            <text:p>Carolina Romero Álvarez</text:p>
          </table:table-cell>
          <table:table-cell office:value-type="date" office:date-value="1966-11-08T00:00:00" table:style-name="ce4">
            <text:p>1966-11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4749390</text:p>
          </table:table-cell>
          <table:table-cell office:value-type="string" table:style-name="ce1">
            <text:p>carolina.romero221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3-22T21:24:00" table:style-name="ce5">
            <text:p>2026-03-22 21:24</text:p>
          </table:table-cell>
          <table:table-cell office:value-type="date" office:date-value="2026-06-10T23:23:00" table:style-name="ce6">
            <text:p>2026-06-10 23:23</text:p>
          </table:table-cell>
          <table:table-cell table:number-columns-repeated="16369"/>
        </table:table-row>
        <table:table-row table:style-name="ro1">
          <table:table-cell office:value-type="float" office:value="222" table:style-name="ce3">
            <text:p>222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498655960</text:p>
          </table:table-cell>
          <table:table-cell office:value-type="string" table:style-name="ce1">
            <text:p>Alejandro Rojas Restrepo</text:p>
          </table:table-cell>
          <table:table-cell office:value-type="date" office:date-value="1980-10-15T00:00:00" table:style-name="ce4">
            <text:p>1980-10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5926284</text:p>
          </table:table-cell>
          <table:table-cell office:value-type="string" table:style-name="ce1">
            <text:p>alejandro.rojas222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6-04T03:26:00" table:style-name="ce5">
            <text:p>2026-06-04 03:26</text:p>
          </table:table-cell>
          <table:table-cell office:value-type="date" office:date-value="2026-06-05T07:00:00" table:style-name="ce6">
            <text:p>2026-06-05 07:00</text:p>
          </table:table-cell>
          <table:table-cell table:number-columns-repeated="16369"/>
        </table:table-row>
        <table:table-row table:style-name="ro1">
          <table:table-cell office:value-type="float" office:value="223" table:style-name="ce3">
            <text:p>22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46787124</text:p>
          </table:table-cell>
          <table:table-cell office:value-type="string" table:style-name="ce1">
            <text:p>Carlos Muñoz Ortiz</text:p>
          </table:table-cell>
          <table:table-cell office:value-type="date" office:date-value="1960-09-05T00:00:00" table:style-name="ce4">
            <text:p>1960-09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6308789</text:p>
          </table:table-cell>
          <table:table-cell office:value-type="string" table:style-name="ce1">
            <text:p>carlos.munoz223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07T18:43:00" table:style-name="ce5">
            <text:p>2026-05-07 18:43</text:p>
          </table:table-cell>
          <table:table-cell office:value-type="date" office:date-value="2026-05-15T16:00:00" table:style-name="ce6">
            <text:p>2026-05-15 16:00</text:p>
          </table:table-cell>
          <table:table-cell table:number-columns-repeated="16369"/>
        </table:table-row>
        <table:table-row table:style-name="ro1">
          <table:table-cell office:value-type="float" office:value="224" table:style-name="ce3">
            <text:p>22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20119940</text:p>
          </table:table-cell>
          <table:table-cell office:value-type="string" table:style-name="ce1">
            <text:p>Cristian García Jiménez</text:p>
          </table:table-cell>
          <table:table-cell office:value-type="date" office:date-value="2009-10-01T00:00:00" table:style-name="ce4">
            <text:p>2009-10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9115473</text:p>
          </table:table-cell>
          <table:table-cell office:value-type="string" table:style-name="ce1">
            <text:p>cristian.garcia224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30T07:43:00" table:style-name="ce5">
            <text:p>2026-06-30 07:43</text:p>
          </table:table-cell>
          <table:table-cell office:value-type="date" office:date-value="2026-07-09T07:50:00" table:style-name="ce6">
            <text:p>2026-07-09 07:50</text:p>
          </table:table-cell>
          <table:table-cell table:number-columns-repeated="16369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27530091</text:p>
          </table:table-cell>
          <table:table-cell office:value-type="string" table:style-name="ce1">
            <text:p>Natalia Castro Torres</text:p>
          </table:table-cell>
          <table:table-cell office:value-type="date" office:date-value="1990-06-28T00:00:00" table:style-name="ce4">
            <text:p>1990-06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5552175</text:p>
          </table:table-cell>
          <table:table-cell office:value-type="string" table:style-name="ce1">
            <text:p>natalia.castro225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19T18:52:00" table:style-name="ce5">
            <text:p>2026-03-19 18:52</text:p>
          </table:table-cell>
          <table:table-cell office:value-type="date" office:date-value="2026-06-11T07:03:00" table:style-name="ce6">
            <text:p>2026-06-11 07:03</text:p>
          </table:table-cell>
          <table:table-cell table:number-columns-repeated="16369"/>
        </table:table-row>
        <table:table-row table:style-name="ro1">
          <table:table-cell office:value-type="float" office:value="226" table:style-name="ce3">
            <text:p>22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42276506</text:p>
          </table:table-cell>
          <table:table-cell office:value-type="string" table:style-name="ce1">
            <text:p>Alejandra Quintero Vargas</text:p>
          </table:table-cell>
          <table:table-cell office:value-type="date" office:date-value="1995-12-28T00:00:00" table:style-name="ce4">
            <text:p>1995-12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3937549</text:p>
          </table:table-cell>
          <table:table-cell office:value-type="string" table:style-name="ce1">
            <text:p>alejandra.quintero22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3-24T10:03:00" table:style-name="ce5">
            <text:p>2026-03-24 10:03</text:p>
          </table:table-cell>
          <table:table-cell office:value-type="date" office:date-value="2026-06-11T14:30:00" table:style-name="ce6">
            <text:p>2026-06-11 14:30</text:p>
          </table:table-cell>
          <table:table-cell table:number-columns-repeated="16369"/>
        </table:table-row>
        <table:table-row table:style-name="ro1">
          <table:table-cell office:value-type="float" office:value="227" table:style-name="ce3">
            <text:p>22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42483887</text:p>
          </table:table-cell>
          <table:table-cell office:value-type="string" table:style-name="ce1">
            <text:p>Andrea Jiménez Torres</text:p>
          </table:table-cell>
          <table:table-cell office:value-type="date" office:date-value="1993-11-01T00:00:00" table:style-name="ce4">
            <text:p>1993-11-0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6751832</text:p>
          </table:table-cell>
          <table:table-cell office:value-type="string" table:style-name="ce1">
            <text:p>andrea.jimenez227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28T19:49:00" table:style-name="ce5">
            <text:p>2026-05-28 19:49</text:p>
          </table:table-cell>
          <table:table-cell office:value-type="date" office:date-value="2026-06-19T21:12:00" table:style-name="ce6">
            <text:p>2026-06-19 21:12</text:p>
          </table:table-cell>
          <table:table-cell table:number-columns-repeated="16369"/>
        </table:table-row>
        <table:table-row table:style-name="ro1">
          <table:table-cell office:value-type="float" office:value="228" table:style-name="ce3">
            <text:p>22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3036765</text:p>
          </table:table-cell>
          <table:table-cell office:value-type="string" table:style-name="ce1">
            <text:p>Sofía Vargas Romero</text:p>
          </table:table-cell>
          <table:table-cell office:value-type="date" office:date-value="1982-12-28T00:00:00" table:style-name="ce4">
            <text:p>1982-12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6317345</text:p>
          </table:table-cell>
          <table:table-cell office:value-type="string" table:style-name="ce1">
            <text:p>sofia.vargas22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3-25T14:40:00" table:style-name="ce5">
            <text:p>2026-03-25 14:40</text:p>
          </table:table-cell>
          <table:table-cell office:value-type="date" office:date-value="2026-03-29T17:22:00" table:style-name="ce6">
            <text:p>2026-03-29 17:22</text:p>
          </table:table-cell>
          <table:table-cell table:number-columns-repeated="16369"/>
        </table:table-row>
        <table:table-row table:style-name="ro1">
          <table:table-cell office:value-type="float" office:value="229" table:style-name="ce3">
            <text:p>22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66474035</text:p>
          </table:table-cell>
          <table:table-cell office:value-type="string" table:style-name="ce1">
            <text:p>Isabella Valencia Martínez</text:p>
          </table:table-cell>
          <table:table-cell office:value-type="date" office:date-value="1983-02-05T00:00:00" table:style-name="ce4">
            <text:p>1983-02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9780232</text:p>
          </table:table-cell>
          <table:table-cell office:value-type="string" table:style-name="ce1">
            <text:p>isabella.valencia229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28T08:33:00" table:style-name="ce5">
            <text:p>2026-06-28 08:33</text:p>
          </table:table-cell>
          <table:table-cell office:value-type="date" office:date-value="2026-07-05T13:42:00" table:style-name="ce6">
            <text:p>2026-07-05 13:42</text:p>
          </table:table-cell>
          <table:table-cell table:number-columns-repeated="16369"/>
        </table:table-row>
        <table:table-row table:style-name="ro1">
          <table:table-cell office:value-type="float" office:value="230" table:style-name="ce3">
            <text:p>23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7872709</text:p>
          </table:table-cell>
          <table:table-cell office:value-type="string" table:style-name="ce1">
            <text:p>Jorge Martínez Ortiz</text:p>
          </table:table-cell>
          <table:table-cell office:value-type="date" office:date-value="1986-11-22T00:00:00" table:style-name="ce4">
            <text:p>1986-11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3161631</text:p>
          </table:table-cell>
          <table:table-cell office:value-type="string" table:style-name="ce1">
            <text:p>jorge.martinez230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7-04T05:58:00" table:style-name="ce5">
            <text:p>2026-07-04 05:58</text:p>
          </table:table-cell>
          <table:table-cell office:value-type="date" office:date-value="2026-07-07T05:24:00" table:style-name="ce6">
            <text:p>2026-07-07 05:24</text:p>
          </table:table-cell>
          <table:table-cell table:number-columns-repeated="16369"/>
        </table:table-row>
        <table:table-row table:style-name="ro1">
          <table:table-cell office:value-type="float" office:value="231" table:style-name="ce3">
            <text:p>23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52391916</text:p>
          </table:table-cell>
          <table:table-cell office:value-type="string" table:style-name="ce1">
            <text:p>Daniel Rojas Quintero</text:p>
          </table:table-cell>
          <table:table-cell office:value-type="date" office:date-value="1995-09-15T00:00:00" table:style-name="ce4">
            <text:p>1995-09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1357818</text:p>
          </table:table-cell>
          <table:table-cell office:value-type="string" table:style-name="ce1">
            <text:p>daniel.rojas231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13T00:15:00" table:style-name="ce5">
            <text:p>2026-04-13 00:15</text:p>
          </table:table-cell>
          <table:table-cell office:value-type="date" office:date-value="2026-05-18T11:54:00" table:style-name="ce6">
            <text:p>2026-05-18 11:54</text:p>
          </table:table-cell>
          <table:table-cell table:number-columns-repeated="16369"/>
        </table:table-row>
        <table:table-row table:style-name="ro1">
          <table:table-cell office:value-type="float" office:value="232" table:style-name="ce3">
            <text:p>23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4186693</text:p>
          </table:table-cell>
          <table:table-cell office:value-type="string" table:style-name="ce1">
            <text:p>Gabriela Quintero Martínez</text:p>
          </table:table-cell>
          <table:table-cell office:value-type="date" office:date-value="1959-06-10T00:00:00" table:style-name="ce4">
            <text:p>1959-06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5359816</text:p>
          </table:table-cell>
          <table:table-cell office:value-type="string" table:style-name="ce1">
            <text:p>gabriela.quintero232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7-07T00:25:00" table:style-name="ce5">
            <text:p>2026-07-07 00:25</text:p>
          </table:table-cell>
          <table:table-cell office:value-type="date" office:date-value="2026-07-09T13:13:00" table:style-name="ce6">
            <text:p>2026-07-09 13:13</text:p>
          </table:table-cell>
          <table:table-cell table:number-columns-repeated="16369"/>
        </table:table-row>
        <table:table-row table:style-name="ro1">
          <table:table-cell office:value-type="float" office:value="233" table:style-name="ce3">
            <text:p>23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94093801</text:p>
          </table:table-cell>
          <table:table-cell office:value-type="string" table:style-name="ce1">
            <text:p>Luisa Mendoza Pérez</text:p>
          </table:table-cell>
          <table:table-cell office:value-type="date" office:date-value="1983-03-09T00:00:00" table:style-name="ce4">
            <text:p>1983-03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9209827</text:p>
          </table:table-cell>
          <table:table-cell office:value-type="string" table:style-name="ce1">
            <text:p>luisa.mendoza23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11T20:26:00" table:style-name="ce5">
            <text:p>2026-05-11 20:26</text:p>
          </table:table-cell>
          <table:table-cell office:value-type="date" office:date-value="2026-05-16T13:36:00" table:style-name="ce6">
            <text:p>2026-05-16 13:36</text:p>
          </table:table-cell>
          <table:table-cell table:number-columns-repeated="16369"/>
        </table:table-row>
        <table:table-row table:style-name="ro1">
          <table:table-cell office:value-type="float" office:value="234" table:style-name="ce3">
            <text:p>23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74243686</text:p>
          </table:table-cell>
          <table:table-cell office:value-type="string" table:style-name="ce1">
            <text:p>David Valencia García</text:p>
          </table:table-cell>
          <table:table-cell office:value-type="date" office:date-value="1968-12-13T00:00:00" table:style-name="ce4">
            <text:p>1968-12-13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205021525</text:p>
          </table:table-cell>
          <table:table-cell office:value-type="string" table:style-name="ce1">
            <text:p>david.valencia23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25T11:32:00" table:style-name="ce5">
            <text:p>2026-06-25 11:32</text:p>
          </table:table-cell>
          <table:table-cell office:value-type="date" office:date-value="2026-07-03T13:33:00" table:style-name="ce6">
            <text:p>2026-07-03 13:33</text:p>
          </table:table-cell>
          <table:table-cell table:number-columns-repeated="16369"/>
        </table:table-row>
        <table:table-row table:style-name="ro1">
          <table:table-cell office:value-type="float" office:value="235" table:style-name="ce3">
            <text:p>23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6625312</text:p>
          </table:table-cell>
          <table:table-cell office:value-type="string" table:style-name="ce1">
            <text:p>Luisa Álvarez Ortiz</text:p>
          </table:table-cell>
          <table:table-cell office:value-type="date" office:date-value="1986-03-24T00:00:00" table:style-name="ce4">
            <text:p>1986-03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1234194</text:p>
          </table:table-cell>
          <table:table-cell office:value-type="string" table:style-name="ce1">
            <text:p>luisa.alvarez23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3-19T08:15:00" table:style-name="ce5">
            <text:p>2026-03-19 08:15</text:p>
          </table:table-cell>
          <table:table-cell office:value-type="date" office:date-value="2026-04-15T04:54:00" table:style-name="ce6">
            <text:p>2026-04-15 04:54</text:p>
          </table:table-cell>
          <table:table-cell table:number-columns-repeated="16369"/>
        </table:table-row>
        <table:table-row table:style-name="ro1">
          <table:table-cell office:value-type="float" office:value="236" table:style-name="ce3">
            <text:p>23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92281528</text:p>
          </table:table-cell>
          <table:table-cell office:value-type="string" table:style-name="ce1">
            <text:p>Valentina Andrea Silva Muñoz</text:p>
          </table:table-cell>
          <table:table-cell office:value-type="date" office:date-value="1987-09-06T00:00:00" table:style-name="ce4">
            <text:p>1987-09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3738455</text:p>
          </table:table-cell>
          <table:table-cell office:value-type="string" table:style-name="ce1">
            <text:p>valentina.silva23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24T08:29:00" table:style-name="ce5">
            <text:p>2026-03-24 08:29</text:p>
          </table:table-cell>
          <table:table-cell office:value-type="date" office:date-value="2026-04-26T05:46:00" table:style-name="ce6">
            <text:p>2026-04-26 05:46</text:p>
          </table:table-cell>
          <table:table-cell table:number-columns-repeated="16369"/>
        </table:table-row>
        <table:table-row table:style-name="ro1">
          <table:table-cell office:value-type="float" office:value="237" table:style-name="ce3">
            <text:p>23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579608</text:p>
          </table:table-cell>
          <table:table-cell office:value-type="string" table:style-name="ce1">
            <text:p>José Quintero Ospina</text:p>
          </table:table-cell>
          <table:table-cell office:value-type="date" office:date-value="2005-05-24T00:00:00" table:style-name="ce4">
            <text:p>2005-05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4841620</text:p>
          </table:table-cell>
          <table:table-cell office:value-type="string" table:style-name="ce1">
            <text:p>jose.quintero237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5-29T02:03:00" table:style-name="ce5">
            <text:p>2026-05-29 02:03</text:p>
          </table:table-cell>
          <table:table-cell office:value-type="date" office:date-value="2026-07-03T04:33:00" table:style-name="ce6">
            <text:p>2026-07-03 04:33</text:p>
          </table:table-cell>
          <table:table-cell table:number-columns-repeated="16369"/>
        </table:table-row>
        <table:table-row table:style-name="ro1">
          <table:table-cell office:value-type="float" office:value="238" table:style-name="ce3">
            <text:p>23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13705711</text:p>
          </table:table-cell>
          <table:table-cell office:value-type="string" table:style-name="ce1">
            <text:p>Sofía Daniela Cárdenas Pérez</text:p>
          </table:table-cell>
          <table:table-cell office:value-type="date" office:date-value="1989-05-31T00:00:00" table:style-name="ce4">
            <text:p>1989-05-3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6078670</text:p>
          </table:table-cell>
          <table:table-cell office:value-type="string" table:style-name="ce1">
            <text:p>sofia.cardenas238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01T13:14:00" table:style-name="ce5">
            <text:p>2026-06-01 13:14</text:p>
          </table:table-cell>
          <table:table-cell office:value-type="date" office:date-value="2026-06-21T21:21:00" table:style-name="ce6">
            <text:p>2026-06-21 21:21</text:p>
          </table:table-cell>
          <table:table-cell table:number-columns-repeated="16369"/>
        </table:table-row>
        <table:table-row table:style-name="ro1">
          <table:table-cell office:value-type="float" office:value="239" table:style-name="ce3">
            <text:p>23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121100</text:p>
          </table:table-cell>
          <table:table-cell office:value-type="string" table:style-name="ce1">
            <text:p>Alejandra Valencia Martínez</text:p>
          </table:table-cell>
          <table:table-cell office:value-type="date" office:date-value="1967-04-05T00:00:00" table:style-name="ce4">
            <text:p>1967-04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4735566</text:p>
          </table:table-cell>
          <table:table-cell office:value-type="string" table:style-name="ce1">
            <text:p>alejandra.valencia239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29T11:02:00" table:style-name="ce5">
            <text:p>2026-04-29 11:02</text:p>
          </table:table-cell>
          <table:table-cell office:value-type="date" office:date-value="2026-05-14T23:02:00" table:style-name="ce6">
            <text:p>2026-05-14 23:02</text:p>
          </table:table-cell>
          <table:table-cell table:number-columns-repeated="16369"/>
        </table:table-row>
        <table:table-row table:style-name="ro1">
          <table:table-cell office:value-type="float" office:value="240" table:style-name="ce3">
            <text:p>24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29002268</text:p>
          </table:table-cell>
          <table:table-cell office:value-type="string" table:style-name="ce1">
            <text:p>Daniela Mendoza Ortiz</text:p>
          </table:table-cell>
          <table:table-cell office:value-type="date" office:date-value="2004-06-23T00:00:00" table:style-name="ce4">
            <text:p>2004-06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8135144</text:p>
          </table:table-cell>
          <table:table-cell office:value-type="string" table:style-name="ce1">
            <text:p>daniela.mendoza240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28T04:48:00" table:style-name="ce5">
            <text:p>2026-05-28 04:48</text:p>
          </table:table-cell>
          <table:table-cell office:value-type="date" office:date-value="2026-06-22T03:55:00" table:style-name="ce6">
            <text:p>2026-06-22 03:55</text:p>
          </table:table-cell>
          <table:table-cell table:number-columns-repeated="16369"/>
        </table:table-row>
        <table:table-row table:style-name="ro1">
          <table:table-cell office:value-type="float" office:value="241" table:style-name="ce3">
            <text:p>241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993363333</text:p>
          </table:table-cell>
          <table:table-cell office:value-type="string" table:style-name="ce1">
            <text:p>Santiago Castro Muñoz</text:p>
          </table:table-cell>
          <table:table-cell office:value-type="date" office:date-value="1997-01-29T00:00:00" table:style-name="ce4">
            <text:p>1997-01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5609759</text:p>
          </table:table-cell>
          <table:table-cell office:value-type="string" table:style-name="ce1">
            <text:p>santiago.castro241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12T18:44:00" table:style-name="ce5">
            <text:p>2026-06-12 18:44</text:p>
          </table:table-cell>
          <table:table-cell office:value-type="date" office:date-value="2026-06-29T17:31:00" table:style-name="ce6">
            <text:p>2026-06-29 17:31</text:p>
          </table:table-cell>
          <table:table-cell table:number-columns-repeated="16369"/>
        </table:table-row>
        <table:table-row table:style-name="ro1">
          <table:table-cell office:value-type="float" office:value="242" table:style-name="ce3">
            <text:p>24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78608107</text:p>
          </table:table-cell>
          <table:table-cell office:value-type="string" table:style-name="ce1">
            <text:p>Alejandro Romero Sánchez</text:p>
          </table:table-cell>
          <table:table-cell office:value-type="date" office:date-value="1987-01-26T00:00:00" table:style-name="ce4">
            <text:p>1987-01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9057806</text:p>
          </table:table-cell>
          <table:table-cell office:value-type="string" table:style-name="ce1">
            <text:p>alejandro.romero242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31T19:16:00" table:style-name="ce5">
            <text:p>2026-05-31 19:16</text:p>
          </table:table-cell>
          <table:table-cell office:value-type="date" office:date-value="2026-06-10T09:04:00" table:style-name="ce6">
            <text:p>2026-06-10 09:04</text:p>
          </table:table-cell>
          <table:table-cell table:number-columns-repeated="16369"/>
        </table:table-row>
        <table:table-row table:style-name="ro1">
          <table:table-cell office:value-type="float" office:value="243" table:style-name="ce3">
            <text:p>24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55580710</text:p>
          </table:table-cell>
          <table:table-cell office:value-type="string" table:style-name="ce1">
            <text:p>David Pérez Sánchez</text:p>
          </table:table-cell>
          <table:table-cell office:value-type="date" office:date-value="1949-07-30T00:00:00" table:style-name="ce4">
            <text:p>1949-07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6865503</text:p>
          </table:table-cell>
          <table:table-cell office:value-type="string" table:style-name="ce1">
            <text:p>david.perez243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10T00:00:00" table:style-name="ce5">
            <text:p>2026-06-10 00:00</text:p>
          </table:table-cell>
          <table:table-cell office:value-type="date" office:date-value="2026-06-16T07:40:00" table:style-name="ce6">
            <text:p>2026-06-16 07:40</text:p>
          </table:table-cell>
          <table:table-cell table:number-columns-repeated="16369"/>
        </table:table-row>
        <table:table-row table:style-name="ro1">
          <table:table-cell office:value-type="float" office:value="244" table:style-name="ce3">
            <text:p>24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61126424</text:p>
          </table:table-cell>
          <table:table-cell office:value-type="string" table:style-name="ce1">
            <text:p>Diana Restrepo Díaz</text:p>
          </table:table-cell>
          <table:table-cell office:value-type="date" office:date-value="2011-11-06T00:00:00" table:style-name="ce4">
            <text:p>2011-11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9835431</text:p>
          </table:table-cell>
          <table:table-cell office:value-type="string" table:style-name="ce1">
            <text:p>diana.restrepo244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07T21:00:00" table:style-name="ce5">
            <text:p>2026-04-07 21:00</text:p>
          </table:table-cell>
          <table:table-cell office:value-type="date" office:date-value="2026-07-04T12:49:00" table:style-name="ce6">
            <text:p>2026-07-04 12:49</text:p>
          </table:table-cell>
          <table:table-cell table:number-columns-repeated="16369"/>
        </table:table-row>
        <table:table-row table:style-name="ro1">
          <table:table-cell office:value-type="float" office:value="245" table:style-name="ce3">
            <text:p>24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35675572</text:p>
          </table:table-cell>
          <table:table-cell office:value-type="string" table:style-name="ce1">
            <text:p>Sebastián López Torres</text:p>
          </table:table-cell>
          <table:table-cell office:value-type="date" office:date-value="1985-04-04T00:00:00" table:style-name="ce4">
            <text:p>1985-04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4996263</text:p>
          </table:table-cell>
          <table:table-cell office:value-type="string" table:style-name="ce1">
            <text:p>sebastian.lopez24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17T18:53:00" table:style-name="ce5">
            <text:p>2026-04-17 18:53</text:p>
          </table:table-cell>
          <table:table-cell office:value-type="date" office:date-value="2026-06-18T22:23:00" table:style-name="ce6">
            <text:p>2026-06-18 22:23</text:p>
          </table:table-cell>
          <table:table-cell table:number-columns-repeated="16369"/>
        </table:table-row>
        <table:table-row table:style-name="ro1">
          <table:table-cell office:value-type="float" office:value="246" table:style-name="ce3">
            <text:p>24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16854219</text:p>
          </table:table-cell>
          <table:table-cell office:value-type="string" table:style-name="ce1">
            <text:p>Alejandra Torres Castro</text:p>
          </table:table-cell>
          <table:table-cell office:value-type="date" office:date-value="1983-07-04T00:00:00" table:style-name="ce4">
            <text:p>1983-07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6859365</text:p>
          </table:table-cell>
          <table:table-cell office:value-type="string" table:style-name="ce1">
            <text:p>alejandra.torres246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28T12:59:00" table:style-name="ce5">
            <text:p>2026-04-28 12:59</text:p>
          </table:table-cell>
          <table:table-cell office:value-type="date" office:date-value="2026-05-03T15:17:00" table:style-name="ce6">
            <text:p>2026-05-03 15:17</text:p>
          </table:table-cell>
          <table:table-cell table:number-columns-repeated="16369"/>
        </table:table-row>
        <table:table-row table:style-name="ro1">
          <table:table-cell office:value-type="float" office:value="247" table:style-name="ce3">
            <text:p>24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3154569</text:p>
          </table:table-cell>
          <table:table-cell office:value-type="string" table:style-name="ce1">
            <text:p>Mateo Cárdenas Muñoz</text:p>
          </table:table-cell>
          <table:table-cell office:value-type="date" office:date-value="1978-10-13T00:00:00" table:style-name="ce4">
            <text:p>1978-10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6027264</text:p>
          </table:table-cell>
          <table:table-cell office:value-type="string" table:style-name="ce1">
            <text:p>mateo.cardenas247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23T16:43:00" table:style-name="ce5">
            <text:p>2026-06-23 16:43</text:p>
          </table:table-cell>
          <table:table-cell office:value-type="date" office:date-value="2026-06-30T02:55:00" table:style-name="ce6">
            <text:p>2026-06-30 02:55</text:p>
          </table:table-cell>
          <table:table-cell table:number-columns-repeated="16369"/>
        </table:table-row>
        <table:table-row table:style-name="ro1">
          <table:table-cell office:value-type="float" office:value="248" table:style-name="ce3">
            <text:p>24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70152336</text:p>
          </table:table-cell>
          <table:table-cell office:value-type="string" table:style-name="ce1">
            <text:p>Juliana Andrea Ospina Jiménez</text:p>
          </table:table-cell>
          <table:table-cell office:value-type="date" office:date-value="1988-05-23T00:00:00" table:style-name="ce4">
            <text:p>1988-05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7222972</text:p>
          </table:table-cell>
          <table:table-cell office:value-type="string" table:style-name="ce1">
            <text:p>juliana.ospina248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22T20:16:00" table:style-name="ce5">
            <text:p>2026-05-22 20:16</text:p>
          </table:table-cell>
          <table:table-cell office:value-type="date" office:date-value="2026-07-04T19:27:00" table:style-name="ce6">
            <text:p>2026-07-04 19:27</text:p>
          </table:table-cell>
          <table:table-cell table:number-columns-repeated="16369"/>
        </table:table-row>
        <table:table-row table:style-name="ro1">
          <table:table-cell office:value-type="float" office:value="249" table:style-name="ce3">
            <text:p>24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10524372</text:p>
          </table:table-cell>
          <table:table-cell office:value-type="string" table:style-name="ce1">
            <text:p>Sofía Ana Castro Torres</text:p>
          </table:table-cell>
          <table:table-cell office:value-type="date" office:date-value="1986-12-06T00:00:00" table:style-name="ce4">
            <text:p>1986-12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2550648</text:p>
          </table:table-cell>
          <table:table-cell office:value-type="string" table:style-name="ce1">
            <text:p>sofia.castro249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4-20T14:41:00" table:style-name="ce5">
            <text:p>2026-04-20 14:41</text:p>
          </table:table-cell>
          <table:table-cell office:value-type="date" office:date-value="2026-05-10T11:58:00" table:style-name="ce6">
            <text:p>2026-05-10 11:58</text:p>
          </table:table-cell>
          <table:table-cell table:number-columns-repeated="16369"/>
        </table:table-row>
        <table:table-row table:style-name="ro1">
          <table:table-cell office:value-type="float" office:value="250" table:style-name="ce3">
            <text:p>25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2633540</text:p>
          </table:table-cell>
          <table:table-cell office:value-type="string" table:style-name="ce1">
            <text:p>Catalina Romero Ramírez</text:p>
          </table:table-cell>
          <table:table-cell office:value-type="date" office:date-value="1958-08-18T00:00:00" table:style-name="ce4">
            <text:p>1958-08-1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5674619</text:p>
          </table:table-cell>
          <table:table-cell office:value-type="string" table:style-name="ce1">
            <text:p>catalina.romero250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01T06:01:00" table:style-name="ce5">
            <text:p>2026-04-01 06:01</text:p>
          </table:table-cell>
          <table:table-cell office:value-type="date" office:date-value="2026-05-19T08:25:00" table:style-name="ce6">
            <text:p>2026-05-19 08:25</text:p>
          </table:table-cell>
          <table:table-cell table:number-columns-repeated="16369"/>
        </table:table-row>
        <table:table-row table:style-name="ro1">
          <table:table-cell office:value-type="float" office:value="251" table:style-name="ce3">
            <text:p>25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54934231</text:p>
          </table:table-cell>
          <table:table-cell office:value-type="string" table:style-name="ce1">
            <text:p>Gabriela Valencia Romero</text:p>
          </table:table-cell>
          <table:table-cell office:value-type="date" office:date-value="1986-07-12T00:00:00" table:style-name="ce4">
            <text:p>1986-07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1270701</text:p>
          </table:table-cell>
          <table:table-cell office:value-type="string" table:style-name="ce1">
            <text:p>gabriela.valencia251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07T15:30:00" table:style-name="ce5">
            <text:p>2026-06-07 15:30</text:p>
          </table:table-cell>
          <table:table-cell office:value-type="date" office:date-value="2026-06-14T08:04:00" table:style-name="ce6">
            <text:p>2026-06-14 08:04</text:p>
          </table:table-cell>
          <table:table-cell table:number-columns-repeated="16369"/>
        </table:table-row>
        <table:table-row table:style-name="ro1">
          <table:table-cell office:value-type="float" office:value="252" table:style-name="ce3">
            <text:p>25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52856565</text:p>
          </table:table-cell>
          <table:table-cell office:value-type="string" table:style-name="ce1">
            <text:p>Diana Romero Cárdenas</text:p>
          </table:table-cell>
          <table:table-cell office:value-type="date" office:date-value="1976-07-29T00:00:00" table:style-name="ce4">
            <text:p>1976-07-2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8622515</text:p>
          </table:table-cell>
          <table:table-cell office:value-type="string" table:style-name="ce1">
            <text:p>diana.romero252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05T01:32:00" table:style-name="ce5">
            <text:p>2026-04-05 01:32</text:p>
          </table:table-cell>
          <table:table-cell office:value-type="date" office:date-value="2026-06-15T12:04:00" table:style-name="ce6">
            <text:p>2026-06-15 12:04</text:p>
          </table:table-cell>
          <table:table-cell table:number-columns-repeated="16369"/>
        </table:table-row>
        <table:table-row table:style-name="ro1">
          <table:table-cell office:value-type="float" office:value="253" table:style-name="ce3">
            <text:p>253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23581038</text:p>
          </table:table-cell>
          <table:table-cell office:value-type="string" table:style-name="ce1">
            <text:p>Julián Moreno Mendoza</text:p>
          </table:table-cell>
          <table:table-cell office:value-type="date" office:date-value="2015-01-30T00:00:00" table:style-name="ce4">
            <text:p>2015-01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7703882</text:p>
          </table:table-cell>
          <table:table-cell office:value-type="string" table:style-name="ce1">
            <text:p>julian.moreno253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4-15T20:45:00" table:style-name="ce5">
            <text:p>2026-04-15 20:45</text:p>
          </table:table-cell>
          <table:table-cell office:value-type="date" office:date-value="2026-05-08T19:56:00" table:style-name="ce6">
            <text:p>2026-05-08 19:56</text:p>
          </table:table-cell>
          <table:table-cell table:number-columns-repeated="16369"/>
        </table:table-row>
        <table:table-row table:style-name="ro1">
          <table:table-cell office:value-type="float" office:value="254" table:style-name="ce3">
            <text:p>25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08624492</text:p>
          </table:table-cell>
          <table:table-cell office:value-type="string" table:style-name="ce1">
            <text:p>Diana Giraldo Valencia</text:p>
          </table:table-cell>
          <table:table-cell office:value-type="date" office:date-value="2000-04-09T00:00:00" table:style-name="ce4">
            <text:p>2000-04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1617279</text:p>
          </table:table-cell>
          <table:table-cell office:value-type="string" table:style-name="ce1">
            <text:p>diana.giraldo254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7-05T08:23:00" table:style-name="ce5">
            <text:p>2026-07-05 08:23</text:p>
          </table:table-cell>
          <table:table-cell office:value-type="date" office:date-value="2026-07-09T23:28:00" table:style-name="ce6">
            <text:p>2026-07-09 23:28</text:p>
          </table:table-cell>
          <table:table-cell table:number-columns-repeated="16369"/>
        </table:table-row>
        <table:table-row table:style-name="ro1">
          <table:table-cell office:value-type="float" office:value="255" table:style-name="ce3">
            <text:p>25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8985027</text:p>
          </table:table-cell>
          <table:table-cell office:value-type="string" table:style-name="ce1">
            <text:p>Santiago Esteban Ortiz Castaño</text:p>
          </table:table-cell>
          <table:table-cell office:value-type="date" office:date-value="1969-10-06T00:00:00" table:style-name="ce4">
            <text:p>1969-10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2276379</text:p>
          </table:table-cell>
          <table:table-cell office:value-type="string" table:style-name="ce1">
            <text:p>santiago.ortiz25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07T07:47:00" table:style-name="ce5">
            <text:p>2026-05-07 07:47</text:p>
          </table:table-cell>
          <table:table-cell office:value-type="date" office:date-value="2026-05-09T00:44:00" table:style-name="ce6">
            <text:p>2026-05-09 00:44</text:p>
          </table:table-cell>
          <table:table-cell table:number-columns-repeated="16369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9520773</text:p>
          </table:table-cell>
          <table:table-cell office:value-type="string" table:style-name="ce1">
            <text:p>Luisa García Castro</text:p>
          </table:table-cell>
          <table:table-cell office:value-type="date" office:date-value="1985-04-10T00:00:00" table:style-name="ce4">
            <text:p>1985-04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7354073</text:p>
          </table:table-cell>
          <table:table-cell office:value-type="string" table:style-name="ce1">
            <text:p>luisa.garcia256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29T21:10:00" table:style-name="ce5">
            <text:p>2026-03-29 21:10</text:p>
          </table:table-cell>
          <table:table-cell office:value-type="date" office:date-value="2026-05-28T15:45:00" table:style-name="ce6">
            <text:p>2026-05-28 15:45</text:p>
          </table:table-cell>
          <table:table-cell table:number-columns-repeated="16369"/>
        </table:table-row>
        <table:table-row table:style-name="ro1">
          <table:table-cell office:value-type="float" office:value="257" table:style-name="ce3">
            <text:p>25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87587952</text:p>
          </table:table-cell>
          <table:table-cell office:value-type="string" table:style-name="ce1">
            <text:p>María Ospina Muñoz</text:p>
          </table:table-cell>
          <table:table-cell office:value-type="date" office:date-value="1994-10-26T00:00:00" table:style-name="ce4">
            <text:p>1994-10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7593520</text:p>
          </table:table-cell>
          <table:table-cell office:value-type="string" table:style-name="ce1">
            <text:p>maria.ospina25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02T05:16:00" table:style-name="ce5">
            <text:p>2026-05-02 05:16</text:p>
          </table:table-cell>
          <table:table-cell office:value-type="date" office:date-value="2026-07-06T08:36:00" table:style-name="ce6">
            <text:p>2026-07-06 08:36</text:p>
          </table:table-cell>
          <table:table-cell table:number-columns-repeated="16369"/>
        </table:table-row>
        <table:table-row table:style-name="ro1">
          <table:table-cell office:value-type="float" office:value="258" table:style-name="ce3">
            <text:p>25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73678264</text:p>
          </table:table-cell>
          <table:table-cell office:value-type="string" table:style-name="ce1">
            <text:p>Nicolás Hernández Díaz</text:p>
          </table:table-cell>
          <table:table-cell office:value-type="date" office:date-value="2001-01-14T00:00:00" table:style-name="ce4">
            <text:p>2001-01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4456788</text:p>
          </table:table-cell>
          <table:table-cell office:value-type="string" table:style-name="ce1">
            <text:p>nicolas.hernandez258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3-21T10:15:00" table:style-name="ce5">
            <text:p>2026-03-21 10:15</text:p>
          </table:table-cell>
          <table:table-cell office:value-type="date" office:date-value="2026-03-31T06:31:00" table:style-name="ce6">
            <text:p>2026-03-31 06:31</text:p>
          </table:table-cell>
          <table:table-cell table:number-columns-repeated="16369"/>
        </table:table-row>
        <table:table-row table:style-name="ro1">
          <table:table-cell office:value-type="float" office:value="259" table:style-name="ce3">
            <text:p>25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21630364</text:p>
          </table:table-cell>
          <table:table-cell office:value-type="string" table:style-name="ce1">
            <text:p>Juan Silva García</text:p>
          </table:table-cell>
          <table:table-cell office:value-type="date" office:date-value="1950-02-05T00:00:00" table:style-name="ce4">
            <text:p>1950-02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8426815</text:p>
          </table:table-cell>
          <table:table-cell office:value-type="string" table:style-name="ce1">
            <text:p>juan.silva259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6-12T16:30:00" table:style-name="ce5">
            <text:p>2026-06-12 16:30</text:p>
          </table:table-cell>
          <table:table-cell office:value-type="date" office:date-value="2026-06-16T07:46:00" table:style-name="ce6">
            <text:p>2026-06-16 07:46</text:p>
          </table:table-cell>
          <table:table-cell table:number-columns-repeated="16369"/>
        </table:table-row>
        <table:table-row table:style-name="ro1">
          <table:table-cell office:value-type="float" office:value="260" table:style-name="ce3">
            <text:p>26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027550264</text:p>
          </table:table-cell>
          <table:table-cell office:value-type="string" table:style-name="ce1">
            <text:p>Julián Rodríguez Vargas</text:p>
          </table:table-cell>
          <table:table-cell office:value-type="date" office:date-value="2012-08-03T00:00:00" table:style-name="ce4">
            <text:p>2012-08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7338264</text:p>
          </table:table-cell>
          <table:table-cell office:value-type="string" table:style-name="ce1">
            <text:p>julian.rodriguez260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26T21:10:00" table:style-name="ce5">
            <text:p>2026-04-26 21:10</text:p>
          </table:table-cell>
          <table:table-cell office:value-type="date" office:date-value="2026-05-06T04:25:00" table:style-name="ce6">
            <text:p>2026-05-06 04:25</text:p>
          </table:table-cell>
          <table:table-cell table:number-columns-repeated="16369"/>
        </table:table-row>
        <table:table-row table:style-name="ro1">
          <table:table-cell office:value-type="float" office:value="261" table:style-name="ce3">
            <text:p>261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83265641</text:p>
          </table:table-cell>
          <table:table-cell office:value-type="string" table:style-name="ce1">
            <text:p>Sofía Rodríguez García</text:p>
          </table:table-cell>
          <table:table-cell office:value-type="date" office:date-value="2010-07-31T00:00:00" table:style-name="ce4">
            <text:p>2010-07-3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5887060</text:p>
          </table:table-cell>
          <table:table-cell office:value-type="string" table:style-name="ce1">
            <text:p>sofia.rodriguez261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27T21:36:00" table:style-name="ce5">
            <text:p>2026-06-27 21:36</text:p>
          </table:table-cell>
          <table:table-cell office:value-type="date" office:date-value="2026-07-03T17:45:00" table:style-name="ce6">
            <text:p>2026-07-03 17:45</text:p>
          </table:table-cell>
          <table:table-cell table:number-columns-repeated="16369"/>
        </table:table-row>
        <table:table-row table:style-name="ro1">
          <table:table-cell office:value-type="float" office:value="262" table:style-name="ce3">
            <text:p>26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80078594</text:p>
          </table:table-cell>
          <table:table-cell office:value-type="string" table:style-name="ce1">
            <text:p>Juan David Ruiz Giraldo</text:p>
          </table:table-cell>
          <table:table-cell office:value-type="date" office:date-value="1989-03-17T00:00:00" table:style-name="ce4">
            <text:p>1989-03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6995780</text:p>
          </table:table-cell>
          <table:table-cell office:value-type="string" table:style-name="ce1">
            <text:p>juan.ruiz262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7-03T06:48:00" table:style-name="ce5">
            <text:p>2026-07-03 06:48</text:p>
          </table:table-cell>
          <table:table-cell office:value-type="date" office:date-value="2026-07-04T00:01:00" table:style-name="ce6">
            <text:p>2026-07-04 00:01</text:p>
          </table:table-cell>
          <table:table-cell table:number-columns-repeated="16369"/>
        </table:table-row>
        <table:table-row table:style-name="ro1">
          <table:table-cell office:value-type="float" office:value="263" table:style-name="ce3">
            <text:p>26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22656325</text:p>
          </table:table-cell>
          <table:table-cell office:value-type="string" table:style-name="ce1">
            <text:p>María Castaño González</text:p>
          </table:table-cell>
          <table:table-cell office:value-type="date" office:date-value="1973-05-26T00:00:00" table:style-name="ce4">
            <text:p>1973-05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9253228</text:p>
          </table:table-cell>
          <table:table-cell office:value-type="string" table:style-name="ce1">
            <text:p>maria.castano26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6-23T20:48:00" table:style-name="ce5">
            <text:p>2026-06-23 20:48</text:p>
          </table:table-cell>
          <table:table-cell office:value-type="date" office:date-value="2026-06-25T03:45:00" table:style-name="ce6">
            <text:p>2026-06-25 03:45</text:p>
          </table:table-cell>
          <table:table-cell table:number-columns-repeated="16369"/>
        </table:table-row>
        <table:table-row table:style-name="ro1">
          <table:table-cell office:value-type="float" office:value="264" table:style-name="ce3">
            <text:p>26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15649976</text:p>
          </table:table-cell>
          <table:table-cell office:value-type="string" table:style-name="ce1">
            <text:p>Diana García Ortiz</text:p>
          </table:table-cell>
          <table:table-cell office:value-type="date" office:date-value="2009-09-15T00:00:00" table:style-name="ce4">
            <text:p>2009-09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9435357</text:p>
          </table:table-cell>
          <table:table-cell office:value-type="string" table:style-name="ce1">
            <text:p>diana.garcia26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16T03:37:00" table:style-name="ce5">
            <text:p>2026-03-16 03:37</text:p>
          </table:table-cell>
          <table:table-cell office:value-type="date" office:date-value="2026-05-01T18:59:00" table:style-name="ce6">
            <text:p>2026-05-01 18:59</text:p>
          </table:table-cell>
          <table:table-cell table:number-columns-repeated="16369"/>
        </table:table-row>
        <table:table-row table:style-name="ro1">
          <table:table-cell office:value-type="float" office:value="265" table:style-name="ce3">
            <text:p>26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27589184</text:p>
          </table:table-cell>
          <table:table-cell office:value-type="string" table:style-name="ce1">
            <text:p>Tomás Romero Castro</text:p>
          </table:table-cell>
          <table:table-cell office:value-type="date" office:date-value="1961-11-06T00:00:00" table:style-name="ce4">
            <text:p>1961-11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3872646</text:p>
          </table:table-cell>
          <table:table-cell office:value-type="string" table:style-name="ce1">
            <text:p>tomas.romero265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08T10:07:00" table:style-name="ce5">
            <text:p>2026-04-08 10:07</text:p>
          </table:table-cell>
          <table:table-cell office:value-type="date" office:date-value="2026-06-19T16:47:00" table:style-name="ce6">
            <text:p>2026-06-19 16:47</text:p>
          </table:table-cell>
          <table:table-cell table:number-columns-repeated="16369"/>
        </table:table-row>
        <table:table-row table:style-name="ro1">
          <table:table-cell office:value-type="float" office:value="266" table:style-name="ce3">
            <text:p>26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18075257</text:p>
          </table:table-cell>
          <table:table-cell office:value-type="string" table:style-name="ce1">
            <text:p>Sofía Vargas Rodríguez</text:p>
          </table:table-cell>
          <table:table-cell office:value-type="date" office:date-value="1998-07-10T00:00:00" table:style-name="ce4">
            <text:p>1998-07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8309025</text:p>
          </table:table-cell>
          <table:table-cell office:value-type="string" table:style-name="ce1">
            <text:p>sofia.vargas266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23T09:01:00" table:style-name="ce5">
            <text:p>2026-06-23 09:01</text:p>
          </table:table-cell>
          <table:table-cell office:value-type="date" office:date-value="2026-06-27T02:26:00" table:style-name="ce6">
            <text:p>2026-06-27 02:26</text:p>
          </table:table-cell>
          <table:table-cell table:number-columns-repeated="16369"/>
        </table:table-row>
        <table:table-row table:style-name="ro1">
          <table:table-cell office:value-type="float" office:value="267" table:style-name="ce3">
            <text:p>26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67847684</text:p>
          </table:table-cell>
          <table:table-cell office:value-type="string" table:style-name="ce1">
            <text:p>Alejandro López Álvarez</text:p>
          </table:table-cell>
          <table:table-cell office:value-type="date" office:date-value="1995-12-08T00:00:00" table:style-name="ce4">
            <text:p>1995-12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3779963</text:p>
          </table:table-cell>
          <table:table-cell office:value-type="string" table:style-name="ce1">
            <text:p>alejandro.lopez267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23T00:19:00" table:style-name="ce5">
            <text:p>2026-05-23 00:19</text:p>
          </table:table-cell>
          <table:table-cell office:value-type="date" office:date-value="2026-07-07T10:35:00" table:style-name="ce6">
            <text:p>2026-07-07 10:35</text:p>
          </table:table-cell>
          <table:table-cell table:number-columns-repeated="16369"/>
        </table:table-row>
        <table:table-row table:style-name="ro1">
          <table:table-cell office:value-type="float" office:value="268" table:style-name="ce3">
            <text:p>26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5232401</text:p>
          </table:table-cell>
          <table:table-cell office:value-type="string" table:style-name="ce1">
            <text:p>Laura Martínez Vargas</text:p>
          </table:table-cell>
          <table:table-cell office:value-type="date" office:date-value="1967-11-10T00:00:00" table:style-name="ce4">
            <text:p>1967-11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5256900</text:p>
          </table:table-cell>
          <table:table-cell office:value-type="string" table:style-name="ce1">
            <text:p>laura.martinez268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05T20:55:00" table:style-name="ce5">
            <text:p>2026-04-05 20:55</text:p>
          </table:table-cell>
          <table:table-cell office:value-type="date" office:date-value="2026-05-30T19:13:00" table:style-name="ce6">
            <text:p>2026-05-30 19:13</text:p>
          </table:table-cell>
          <table:table-cell table:number-columns-repeated="16369"/>
        </table:table-row>
        <table:table-row table:style-name="ro1">
          <table:table-cell office:value-type="float" office:value="269" table:style-name="ce3">
            <text:p>26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1947174</text:p>
          </table:table-cell>
          <table:table-cell office:value-type="string" table:style-name="ce1">
            <text:p>Manuela Romero Valencia</text:p>
          </table:table-cell>
          <table:table-cell office:value-type="date" office:date-value="1969-02-22T00:00:00" table:style-name="ce4">
            <text:p>1969-02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1617493</text:p>
          </table:table-cell>
          <table:table-cell office:value-type="string" table:style-name="ce1">
            <text:p>manuela.romero269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5-05T17:38:00" table:style-name="ce5">
            <text:p>2026-05-05 17:38</text:p>
          </table:table-cell>
          <table:table-cell office:value-type="date" office:date-value="2026-05-14T06:08:00" table:style-name="ce6">
            <text:p>2026-05-14 06:08</text:p>
          </table:table-cell>
          <table:table-cell table:number-columns-repeated="16369"/>
        </table:table-row>
        <table:table-row table:style-name="ro1">
          <table:table-cell office:value-type="float" office:value="270" table:style-name="ce3">
            <text:p>27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03506534</text:p>
          </table:table-cell>
          <table:table-cell office:value-type="string" table:style-name="ce1">
            <text:p>Cristian Castro Ospina</text:p>
          </table:table-cell>
          <table:table-cell office:value-type="date" office:date-value="1960-09-10T00:00:00" table:style-name="ce4">
            <text:p>1960-09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5218580</text:p>
          </table:table-cell>
          <table:table-cell office:value-type="string" table:style-name="ce1">
            <text:p>cristian.castro27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10T22:50:00" table:style-name="ce5">
            <text:p>2026-04-10 22:50</text:p>
          </table:table-cell>
          <table:table-cell office:value-type="date" office:date-value="2026-04-16T16:49:00" table:style-name="ce6">
            <text:p>2026-04-16 16:49</text:p>
          </table:table-cell>
          <table:table-cell table:number-columns-repeated="16369"/>
        </table:table-row>
        <table:table-row table:style-name="ro1">
          <table:table-cell office:value-type="float" office:value="271" table:style-name="ce3">
            <text:p>27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3500864</text:p>
          </table:table-cell>
          <table:table-cell office:value-type="string" table:style-name="ce1">
            <text:p>Carolina Laura Rojas López</text:p>
          </table:table-cell>
          <table:table-cell office:value-type="date" office:date-value="1962-09-04T00:00:00" table:style-name="ce4">
            <text:p>1962-09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6222092</text:p>
          </table:table-cell>
          <table:table-cell office:value-type="string" table:style-name="ce1">
            <text:p>carolina.rojas27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12T04:07:00" table:style-name="ce5">
            <text:p>2026-05-12 04:07</text:p>
          </table:table-cell>
          <table:table-cell office:value-type="date" office:date-value="2026-06-12T03:41:00" table:style-name="ce6">
            <text:p>2026-06-12 03:41</text:p>
          </table:table-cell>
          <table:table-cell table:number-columns-repeated="16369"/>
        </table:table-row>
        <table:table-row table:style-name="ro1">
          <table:table-cell office:value-type="float" office:value="272" table:style-name="ce3">
            <text:p>27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51036057</text:p>
          </table:table-cell>
          <table:table-cell office:value-type="string" table:style-name="ce1">
            <text:p>Sofía Pérez Ramírez</text:p>
          </table:table-cell>
          <table:table-cell office:value-type="date" office:date-value="1950-11-27T00:00:00" table:style-name="ce4">
            <text:p>1950-11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3892986</text:p>
          </table:table-cell>
          <table:table-cell office:value-type="string" table:style-name="ce1">
            <text:p>sofia.perez27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09T07:42:00" table:style-name="ce5">
            <text:p>2026-04-09 07:42</text:p>
          </table:table-cell>
          <table:table-cell office:value-type="date" office:date-value="2026-06-27T09:33:00" table:style-name="ce6">
            <text:p>2026-06-27 09:33</text:p>
          </table:table-cell>
          <table:table-cell table:number-columns-repeated="16369"/>
        </table:table-row>
        <table:table-row table:style-name="ro1">
          <table:table-cell office:value-type="float" office:value="273" table:style-name="ce3">
            <text:p>27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35319183</text:p>
          </table:table-cell>
          <table:table-cell office:value-type="string" table:style-name="ce1">
            <text:p>María Rodríguez Ortiz</text:p>
          </table:table-cell>
          <table:table-cell office:value-type="date" office:date-value="1982-05-30T00:00:00" table:style-name="ce4">
            <text:p>1982-05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2082087</text:p>
          </table:table-cell>
          <table:table-cell office:value-type="string" table:style-name="ce1">
            <text:p>maria.rodriguez27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4-09T14:32:00" table:style-name="ce5">
            <text:p>2026-04-09 14:32</text:p>
          </table:table-cell>
          <table:table-cell office:value-type="date" office:date-value="2026-04-14T05:53:00" table:style-name="ce6">
            <text:p>2026-04-14 05:53</text:p>
          </table:table-cell>
          <table:table-cell table:number-columns-repeated="16369"/>
        </table:table-row>
        <table:table-row table:style-name="ro1">
          <table:table-cell office:value-type="float" office:value="274" table:style-name="ce3">
            <text:p>27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60257791</text:p>
          </table:table-cell>
          <table:table-cell office:value-type="string" table:style-name="ce1">
            <text:p>Julián Cárdenas Sánchez</text:p>
          </table:table-cell>
          <table:table-cell office:value-type="date" office:date-value="1976-01-14T00:00:00" table:style-name="ce4">
            <text:p>1976-01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3345906</text:p>
          </table:table-cell>
          <table:table-cell office:value-type="string" table:style-name="ce1">
            <text:p>julian.cardenas27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4-01T04:06:00" table:style-name="ce5">
            <text:p>2026-04-01 04:06</text:p>
          </table:table-cell>
          <table:table-cell office:value-type="date" office:date-value="2026-06-10T15:46:00" table:style-name="ce6">
            <text:p>2026-06-10 15:46</text:p>
          </table:table-cell>
          <table:table-cell table:number-columns-repeated="16369"/>
        </table:table-row>
        <table:table-row table:style-name="ro1">
          <table:table-cell office:value-type="float" office:value="275" table:style-name="ce3">
            <text:p>27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71207325</text:p>
          </table:table-cell>
          <table:table-cell office:value-type="string" table:style-name="ce1">
            <text:p>Juliana Ramírez Ruiz</text:p>
          </table:table-cell>
          <table:table-cell office:value-type="date" office:date-value="1990-08-23T00:00:00" table:style-name="ce4">
            <text:p>1990-08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4473794</text:p>
          </table:table-cell>
          <table:table-cell office:value-type="string" table:style-name="ce1">
            <text:p>juliana.ramirez27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5-19T17:55:00" table:style-name="ce5">
            <text:p>2026-05-19 17:55</text:p>
          </table:table-cell>
          <table:table-cell office:value-type="date" office:date-value="2026-07-02T19:52:00" table:style-name="ce6">
            <text:p>2026-07-02 19:52</text:p>
          </table:table-cell>
          <table:table-cell table:number-columns-repeated="16369"/>
        </table:table-row>
        <table:table-row table:style-name="ro1">
          <table:table-cell office:value-type="float" office:value="276" table:style-name="ce3">
            <text:p>27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65391940</text:p>
          </table:table-cell>
          <table:table-cell office:value-type="string" table:style-name="ce1">
            <text:p>Paula Ramírez Giraldo</text:p>
          </table:table-cell>
          <table:table-cell office:value-type="date" office:date-value="1996-04-27T00:00:00" table:style-name="ce4">
            <text:p>1996-04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7659024</text:p>
          </table:table-cell>
          <table:table-cell office:value-type="string" table:style-name="ce1">
            <text:p>paula.ramirez27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03T03:52:00" table:style-name="ce5">
            <text:p>2026-04-03 03:52</text:p>
          </table:table-cell>
          <table:table-cell office:value-type="date" office:date-value="2026-05-23T23:20:00" table:style-name="ce6">
            <text:p>2026-05-23 23:20</text:p>
          </table:table-cell>
          <table:table-cell table:number-columns-repeated="16369"/>
        </table:table-row>
        <table:table-row table:style-name="ro1">
          <table:table-cell office:value-type="float" office:value="277" table:style-name="ce3">
            <text:p>27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1383310</text:p>
          </table:table-cell>
          <table:table-cell office:value-type="string" table:style-name="ce1">
            <text:p>Samuel Romero Ramírez</text:p>
          </table:table-cell>
          <table:table-cell office:value-type="date" office:date-value="1965-06-22T00:00:00" table:style-name="ce4">
            <text:p>1965-06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8086618</text:p>
          </table:table-cell>
          <table:table-cell office:value-type="string" table:style-name="ce1">
            <text:p>samuel.romero277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10T23:37:00" table:style-name="ce5">
            <text:p>2026-06-10 23:37</text:p>
          </table:table-cell>
          <table:table-cell office:value-type="date" office:date-value="2026-06-25T03:25:00" table:style-name="ce6">
            <text:p>2026-06-25 03:25</text:p>
          </table:table-cell>
          <table:table-cell table:number-columns-repeated="16369"/>
        </table:table-row>
        <table:table-row table:style-name="ro1">
          <table:table-cell office:value-type="float" office:value="278" table:style-name="ce3">
            <text:p>27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18435333</text:p>
          </table:table-cell>
          <table:table-cell office:value-type="string" table:style-name="ce1">
            <text:p>Samuel Vargas Ruiz</text:p>
          </table:table-cell>
          <table:table-cell office:value-type="date" office:date-value="1961-06-08T00:00:00" table:style-name="ce4">
            <text:p>1961-06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6756215</text:p>
          </table:table-cell>
          <table:table-cell office:value-type="string" table:style-name="ce1">
            <text:p>samuel.vargas278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6-01T20:59:00" table:style-name="ce5">
            <text:p>2026-06-01 20:59</text:p>
          </table:table-cell>
          <table:table-cell office:value-type="date" office:date-value="2026-06-28T10:55:00" table:style-name="ce6">
            <text:p>2026-06-28 10:55</text:p>
          </table:table-cell>
          <table:table-cell table:number-columns-repeated="16369"/>
        </table:table-row>
        <table:table-row table:style-name="ro1">
          <table:table-cell office:value-type="float" office:value="279" table:style-name="ce3">
            <text:p>27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4788074</text:p>
          </table:table-cell>
          <table:table-cell office:value-type="string" table:style-name="ce1">
            <text:p>Samuel Torres Ramírez</text:p>
          </table:table-cell>
          <table:table-cell office:value-type="date" office:date-value="2008-04-20T00:00:00" table:style-name="ce4">
            <text:p>2008-04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8505758</text:p>
          </table:table-cell>
          <table:table-cell office:value-type="string" table:style-name="ce1">
            <text:p>samuel.torres27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4-17T04:44:00" table:style-name="ce5">
            <text:p>2026-04-17 04:44</text:p>
          </table:table-cell>
          <table:table-cell office:value-type="date" office:date-value="2026-04-29T13:42:00" table:style-name="ce6">
            <text:p>2026-04-29 13:42</text:p>
          </table:table-cell>
          <table:table-cell table:number-columns-repeated="16369"/>
        </table:table-row>
        <table:table-row table:style-name="ro1">
          <table:table-cell office:value-type="float" office:value="280" table:style-name="ce3">
            <text:p>28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98567385</text:p>
          </table:table-cell>
          <table:table-cell office:value-type="string" table:style-name="ce1">
            <text:p>Sebastián Giraldo García</text:p>
          </table:table-cell>
          <table:table-cell office:value-type="date" office:date-value="1998-07-03T00:00:00" table:style-name="ce4">
            <text:p>1998-07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8942627</text:p>
          </table:table-cell>
          <table:table-cell office:value-type="string" table:style-name="ce1">
            <text:p>sebastian.giraldo28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14T02:09:00" table:style-name="ce5">
            <text:p>2026-06-14 02:09</text:p>
          </table:table-cell>
          <table:table-cell office:value-type="date" office:date-value="2026-06-30T08:02:00" table:style-name="ce6">
            <text:p>2026-06-30 08:02</text:p>
          </table:table-cell>
          <table:table-cell table:number-columns-repeated="16369"/>
        </table:table-row>
        <table:table-row table:style-name="ro1">
          <table:table-cell office:value-type="float" office:value="281" table:style-name="ce3">
            <text:p>28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27585044</text:p>
          </table:table-cell>
          <table:table-cell office:value-type="string" table:style-name="ce1">
            <text:p>Samuel Rojas Cárdenas</text:p>
          </table:table-cell>
          <table:table-cell office:value-type="date" office:date-value="1978-09-06T00:00:00" table:style-name="ce4">
            <text:p>1978-09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5993044</text:p>
          </table:table-cell>
          <table:table-cell office:value-type="string" table:style-name="ce1">
            <text:p>samuel.rojas281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3-20T09:37:00" table:style-name="ce5">
            <text:p>2026-03-20 09:37</text:p>
          </table:table-cell>
          <table:table-cell office:value-type="date" office:date-value="2026-07-05T10:10:00" table:style-name="ce6">
            <text:p>2026-07-05 10:10</text:p>
          </table:table-cell>
          <table:table-cell table:number-columns-repeated="16369"/>
        </table:table-row>
        <table:table-row table:style-name="ro1">
          <table:table-cell office:value-type="float" office:value="282" table:style-name="ce3">
            <text:p>28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56184285</text:p>
          </table:table-cell>
          <table:table-cell office:value-type="string" table:style-name="ce1">
            <text:p>Gabriela Díaz Giraldo</text:p>
          </table:table-cell>
          <table:table-cell office:value-type="date" office:date-value="2005-03-26T00:00:00" table:style-name="ce4">
            <text:p>2005-03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7105075</text:p>
          </table:table-cell>
          <table:table-cell office:value-type="string" table:style-name="ce1">
            <text:p>gabriela.diaz282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19T18:28:00" table:style-name="ce5">
            <text:p>2026-04-19 18:28</text:p>
          </table:table-cell>
          <table:table-cell office:value-type="date" office:date-value="2026-05-19T17:00:00" table:style-name="ce6">
            <text:p>2026-05-19 17:00</text:p>
          </table:table-cell>
          <table:table-cell table:number-columns-repeated="16369"/>
        </table:table-row>
        <table:table-row table:style-name="ro1">
          <table:table-cell office:value-type="float" office:value="283" table:style-name="ce3">
            <text:p>28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78996144</text:p>
          </table:table-cell>
          <table:table-cell office:value-type="string" table:style-name="ce1">
            <text:p>Santiago Silva Sánchez</text:p>
          </table:table-cell>
          <table:table-cell office:value-type="date" office:date-value="1993-12-19T00:00:00" table:style-name="ce4">
            <text:p>1993-12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3104805</text:p>
          </table:table-cell>
          <table:table-cell office:value-type="string" table:style-name="ce1">
            <text:p>santiago.silva28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30T20:20:00" table:style-name="ce5">
            <text:p>2026-05-30 20:20</text:p>
          </table:table-cell>
          <table:table-cell office:value-type="date" office:date-value="2026-06-29T03:32:00" table:style-name="ce6">
            <text:p>2026-06-29 03:32</text:p>
          </table:table-cell>
          <table:table-cell table:number-columns-repeated="16369"/>
        </table:table-row>
        <table:table-row table:style-name="ro1">
          <table:table-cell office:value-type="float" office:value="284" table:style-name="ce3">
            <text:p>28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91687982</text:p>
          </table:table-cell>
          <table:table-cell office:value-type="string" table:style-name="ce1">
            <text:p>José Muñoz López</text:p>
          </table:table-cell>
          <table:table-cell office:value-type="date" office:date-value="1990-06-30T00:00:00" table:style-name="ce4">
            <text:p>1990-06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5203561</text:p>
          </table:table-cell>
          <table:table-cell office:value-type="string" table:style-name="ce1">
            <text:p>jose.munoz284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7-02T16:17:00" table:style-name="ce5">
            <text:p>2026-07-02 16:17</text:p>
          </table:table-cell>
          <table:table-cell office:value-type="date" office:date-value="2026-07-05T05:24:00" table:style-name="ce6">
            <text:p>2026-07-05 05:24</text:p>
          </table:table-cell>
          <table:table-cell table:number-columns-repeated="16369"/>
        </table:table-row>
        <table:table-row table:style-name="ro1">
          <table:table-cell office:value-type="float" office:value="285" table:style-name="ce3">
            <text:p>28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45687462</text:p>
          </table:table-cell>
          <table:table-cell office:value-type="string" table:style-name="ce1">
            <text:p>Andrés Muñoz Ortiz</text:p>
          </table:table-cell>
          <table:table-cell office:value-type="date" office:date-value="1993-08-30T00:00:00" table:style-name="ce4">
            <text:p>1993-08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9931325</text:p>
          </table:table-cell>
          <table:table-cell office:value-type="string" table:style-name="ce1">
            <text:p>andres.munoz285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03T04:17:00" table:style-name="ce5">
            <text:p>2026-06-03 04:17</text:p>
          </table:table-cell>
          <table:table-cell office:value-type="date" office:date-value="2026-06-27T06:44:00" table:style-name="ce6">
            <text:p>2026-06-27 06:44</text:p>
          </table:table-cell>
          <table:table-cell table:number-columns-repeated="16369"/>
        </table:table-row>
        <table:table-row table:style-name="ro1">
          <table:table-cell office:value-type="float" office:value="286" table:style-name="ce3">
            <text:p>28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81920847</text:p>
          </table:table-cell>
          <table:table-cell office:value-type="string" table:style-name="ce1">
            <text:p>Julián Jiménez Díaz</text:p>
          </table:table-cell>
          <table:table-cell office:value-type="date" office:date-value="2005-11-20T00:00:00" table:style-name="ce4">
            <text:p>2005-11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9407083</text:p>
          </table:table-cell>
          <table:table-cell office:value-type="string" table:style-name="ce1">
            <text:p>julian.jimenez28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3-27T07:08:00" table:style-name="ce5">
            <text:p>2026-03-27 07:08</text:p>
          </table:table-cell>
          <table:table-cell office:value-type="date" office:date-value="2026-04-24T08:28:00" table:style-name="ce6">
            <text:p>2026-04-24 08:28</text:p>
          </table:table-cell>
          <table:table-cell table:number-columns-repeated="16369"/>
        </table:table-row>
        <table:table-row table:style-name="ro1">
          <table:table-cell office:value-type="float" office:value="287" table:style-name="ce3">
            <text:p>28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82284969</text:p>
          </table:table-cell>
          <table:table-cell office:value-type="string" table:style-name="ce1">
            <text:p>Miguel Santiago Vargas Ortiz</text:p>
          </table:table-cell>
          <table:table-cell office:value-type="date" office:date-value="1996-04-12T00:00:00" table:style-name="ce4">
            <text:p>1996-04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4855878</text:p>
          </table:table-cell>
          <table:table-cell office:value-type="string" table:style-name="ce1">
            <text:p>miguel.vargas28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6-23T02:49:00" table:style-name="ce5">
            <text:p>2026-06-23 02:49</text:p>
          </table:table-cell>
          <table:table-cell office:value-type="date" office:date-value="2026-07-10T04:30:00" table:style-name="ce6">
            <text:p>2026-07-10 04:30</text:p>
          </table:table-cell>
          <table:table-cell table:number-columns-repeated="16369"/>
        </table:table-row>
        <table:table-row table:style-name="ro1">
          <table:table-cell office:value-type="float" office:value="288" table:style-name="ce3">
            <text:p>28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27365524</text:p>
          </table:table-cell>
          <table:table-cell office:value-type="string" table:style-name="ce1">
            <text:p>Santiago Álvarez Hernández</text:p>
          </table:table-cell>
          <table:table-cell office:value-type="date" office:date-value="1981-09-06T00:00:00" table:style-name="ce4">
            <text:p>1981-09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1223096</text:p>
          </table:table-cell>
          <table:table-cell office:value-type="string" table:style-name="ce1">
            <text:p>santiago.alvarez28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21T04:25:00" table:style-name="ce5">
            <text:p>2026-04-21 04:25</text:p>
          </table:table-cell>
          <table:table-cell office:value-type="date" office:date-value="2026-05-10T21:26:00" table:style-name="ce6">
            <text:p>2026-05-10 21:26</text:p>
          </table:table-cell>
          <table:table-cell table:number-columns-repeated="16369"/>
        </table:table-row>
        <table:table-row table:style-name="ro1">
          <table:table-cell office:value-type="float" office:value="289" table:style-name="ce3">
            <text:p>28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3332127</text:p>
          </table:table-cell>
          <table:table-cell office:value-type="string" table:style-name="ce1">
            <text:p>Juliana Isabella García Moreno</text:p>
          </table:table-cell>
          <table:table-cell office:value-type="date" office:date-value="1972-06-26T00:00:00" table:style-name="ce4">
            <text:p>1972-06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8936271</text:p>
          </table:table-cell>
          <table:table-cell office:value-type="string" table:style-name="ce1">
            <text:p>juliana.garcia28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23T13:18:00" table:style-name="ce5">
            <text:p>2026-04-23 13:18</text:p>
          </table:table-cell>
          <table:table-cell office:value-type="date" office:date-value="2026-06-03T01:16:00" table:style-name="ce6">
            <text:p>2026-06-03 01:16</text:p>
          </table:table-cell>
          <table:table-cell table:number-columns-repeated="16369"/>
        </table:table-row>
        <table:table-row table:style-name="ro1">
          <table:table-cell office:value-type="float" office:value="290" table:style-name="ce3">
            <text:p>29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59709681</text:p>
          </table:table-cell>
          <table:table-cell office:value-type="string" table:style-name="ce1">
            <text:p>Alejandra Moreno Ramírez</text:p>
          </table:table-cell>
          <table:table-cell office:value-type="date" office:date-value="2010-12-29T00:00:00" table:style-name="ce4">
            <text:p>2010-12-2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1593222</text:p>
          </table:table-cell>
          <table:table-cell office:value-type="string" table:style-name="ce1">
            <text:p>alejandra.moreno290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28T07:28:00" table:style-name="ce5">
            <text:p>2026-06-28 07:28</text:p>
          </table:table-cell>
          <table:table-cell office:value-type="date" office:date-value="2026-06-30T10:52:00" table:style-name="ce6">
            <text:p>2026-06-30 10:52</text:p>
          </table:table-cell>
          <table:table-cell table:number-columns-repeated="16369"/>
        </table:table-row>
        <table:table-row table:style-name="ro1">
          <table:table-cell office:value-type="float" office:value="291" table:style-name="ce3">
            <text:p>29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8974487</text:p>
          </table:table-cell>
          <table:table-cell office:value-type="string" table:style-name="ce1">
            <text:p>Mateo Rojas Hernández</text:p>
          </table:table-cell>
          <table:table-cell office:value-type="date" office:date-value="1990-02-19T00:00:00" table:style-name="ce4">
            <text:p>1990-02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8113357</text:p>
          </table:table-cell>
          <table:table-cell office:value-type="string" table:style-name="ce1">
            <text:p>mateo.rojas291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6-21T23:54:00" table:style-name="ce5">
            <text:p>2026-06-21 23:54</text:p>
          </table:table-cell>
          <table:table-cell office:value-type="date" office:date-value="2026-07-09T23:39:00" table:style-name="ce6">
            <text:p>2026-07-09 23:39</text:p>
          </table:table-cell>
          <table:table-cell table:number-columns-repeated="16369"/>
        </table:table-row>
        <table:table-row table:style-name="ro1">
          <table:table-cell office:value-type="float" office:value="292" table:style-name="ce3">
            <text:p>29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51250326</text:p>
          </table:table-cell>
          <table:table-cell office:value-type="string" table:style-name="ce1">
            <text:p>Carlos Castro Pérez</text:p>
          </table:table-cell>
          <table:table-cell office:value-type="date" office:date-value="1951-11-17T00:00:00" table:style-name="ce4">
            <text:p>1951-11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7935384</text:p>
          </table:table-cell>
          <table:table-cell office:value-type="string" table:style-name="ce1">
            <text:p>carlos.castro292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08T21:25:00" table:style-name="ce5">
            <text:p>2026-05-08 21:25</text:p>
          </table:table-cell>
          <table:table-cell office:value-type="date" office:date-value="2026-05-25T19:27:00" table:style-name="ce6">
            <text:p>2026-05-25 19:27</text:p>
          </table:table-cell>
          <table:table-cell table:number-columns-repeated="16369"/>
        </table:table-row>
        <table:table-row table:style-name="ro1">
          <table:table-cell office:value-type="float" office:value="293" table:style-name="ce3">
            <text:p>29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61301630</text:p>
          </table:table-cell>
          <table:table-cell office:value-type="string" table:style-name="ce1">
            <text:p>Samuel González Jiménez</text:p>
          </table:table-cell>
          <table:table-cell office:value-type="date" office:date-value="2005-12-27T00:00:00" table:style-name="ce4">
            <text:p>2005-12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6599189</text:p>
          </table:table-cell>
          <table:table-cell office:value-type="string" table:style-name="ce1">
            <text:p>samuel.gonzalez293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07T09:42:00" table:style-name="ce5">
            <text:p>2026-04-07 09:42</text:p>
          </table:table-cell>
          <table:table-cell office:value-type="date" office:date-value="2026-04-30T23:25:00" table:style-name="ce6">
            <text:p>2026-04-30 23:25</text:p>
          </table:table-cell>
          <table:table-cell table:number-columns-repeated="16369"/>
        </table:table-row>
        <table:table-row table:style-name="ro1">
          <table:table-cell office:value-type="float" office:value="294" table:style-name="ce3">
            <text:p>29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83596762</text:p>
          </table:table-cell>
          <table:table-cell office:value-type="string" table:style-name="ce1">
            <text:p>José Esteban Muñoz Álvarez</text:p>
          </table:table-cell>
          <table:table-cell office:value-type="date" office:date-value="1978-11-22T00:00:00" table:style-name="ce4">
            <text:p>1978-11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9720117</text:p>
          </table:table-cell>
          <table:table-cell office:value-type="string" table:style-name="ce1">
            <text:p>jose.munoz294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26T06:17:00" table:style-name="ce5">
            <text:p>2026-06-26 06:17</text:p>
          </table:table-cell>
          <table:table-cell office:value-type="date" office:date-value="2026-06-26T17:16:00" table:style-name="ce6">
            <text:p>2026-06-26 17:16</text:p>
          </table:table-cell>
          <table:table-cell table:number-columns-repeated="16369"/>
        </table:table-row>
        <table:table-row table:style-name="ro1">
          <table:table-cell office:value-type="float" office:value="295" table:style-name="ce3">
            <text:p>295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30499833</text:p>
          </table:table-cell>
          <table:table-cell office:value-type="string" table:style-name="ce1">
            <text:p>Nicolás Álvarez Torres</text:p>
          </table:table-cell>
          <table:table-cell office:value-type="date" office:date-value="2014-04-14T00:00:00" table:style-name="ce4">
            <text:p>2014-04-14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3223572251</text:p>
          </table:table-cell>
          <table:table-cell office:value-type="string" table:style-name="ce1">
            <text:p>nicolas.alvarez29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22T06:45:00" table:style-name="ce5">
            <text:p>2026-05-22 06:45</text:p>
          </table:table-cell>
          <table:table-cell office:value-type="date" office:date-value="2026-06-04T23:49:00" table:style-name="ce6">
            <text:p>2026-06-04 23:49</text:p>
          </table:table-cell>
          <table:table-cell table:number-columns-repeated="16369"/>
        </table:table-row>
        <table:table-row table:style-name="ro1">
          <table:table-cell office:value-type="float" office:value="296" table:style-name="ce3">
            <text:p>29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6558926</text:p>
          </table:table-cell>
          <table:table-cell office:value-type="string" table:style-name="ce1">
            <text:p>Santiago Ortiz Cárdenas</text:p>
          </table:table-cell>
          <table:table-cell office:value-type="date" office:date-value="1971-03-24T00:00:00" table:style-name="ce4">
            <text:p>1971-03-24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157984235</text:p>
          </table:table-cell>
          <table:table-cell office:value-type="string" table:style-name="ce1">
            <text:p>santiago.ortiz29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07T16:54:00" table:style-name="ce5">
            <text:p>2026-05-07 16:54</text:p>
          </table:table-cell>
          <table:table-cell office:value-type="date" office:date-value="2026-06-29T10:52:00" table:style-name="ce6">
            <text:p>2026-06-29 10:52</text:p>
          </table:table-cell>
          <table:table-cell table:number-columns-repeated="16369"/>
        </table:table-row>
        <table:table-row table:style-name="ro1">
          <table:table-cell office:value-type="float" office:value="297" table:style-name="ce3">
            <text:p>29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6561832</text:p>
          </table:table-cell>
          <table:table-cell office:value-type="string" table:style-name="ce1">
            <text:p>Gabriela Luisa Castro Giraldo</text:p>
          </table:table-cell>
          <table:table-cell office:value-type="date" office:date-value="2001-04-17T00:00:00" table:style-name="ce4">
            <text:p>2001-04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7772439</text:p>
          </table:table-cell>
          <table:table-cell office:value-type="string" table:style-name="ce1">
            <text:p>gabriela.castro297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4-09T12:30:00" table:style-name="ce5">
            <text:p>2026-04-09 12:30</text:p>
          </table:table-cell>
          <table:table-cell office:value-type="date" office:date-value="2026-05-05T06:15:00" table:style-name="ce6">
            <text:p>2026-05-05 06:15</text:p>
          </table:table-cell>
          <table:table-cell table:number-columns-repeated="16369"/>
        </table:table-row>
        <table:table-row table:style-name="ro1">
          <table:table-cell office:value-type="float" office:value="298" table:style-name="ce3">
            <text:p>29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36920003</text:p>
          </table:table-cell>
          <table:table-cell office:value-type="string" table:style-name="ce1">
            <text:p>Cristian Ramírez López</text:p>
          </table:table-cell>
          <table:table-cell office:value-type="date" office:date-value="2003-10-29T00:00:00" table:style-name="ce4">
            <text:p>2003-10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7309141</text:p>
          </table:table-cell>
          <table:table-cell office:value-type="string" table:style-name="ce1">
            <text:p>cristian.ramirez298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7-08T22:38:00" table:style-name="ce5">
            <text:p>2026-07-08 22:38</text:p>
          </table:table-cell>
          <table:table-cell office:value-type="date" office:date-value="2026-07-10T07:04:00" table:style-name="ce6">
            <text:p>2026-07-10 07:04</text:p>
          </table:table-cell>
          <table:table-cell table:number-columns-repeated="16369"/>
        </table:table-row>
        <table:table-row table:style-name="ro1">
          <table:table-cell office:value-type="float" office:value="299" table:style-name="ce3">
            <text:p>299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935287998</text:p>
          </table:table-cell>
          <table:table-cell office:value-type="string" table:style-name="ce1">
            <text:p>Juan Hernández Castro</text:p>
          </table:table-cell>
          <table:table-cell office:value-type="date" office:date-value="1991-05-05T00:00:00" table:style-name="ce4">
            <text:p>1991-05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8108092</text:p>
          </table:table-cell>
          <table:table-cell office:value-type="string" table:style-name="ce1">
            <text:p>juan.hernandez29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09T18:06:00" table:style-name="ce5">
            <text:p>2026-06-09 18:06</text:p>
          </table:table-cell>
          <table:table-cell office:value-type="date" office:date-value="2026-06-21T20:37:00" table:style-name="ce6">
            <text:p>2026-06-21 20:37</text:p>
          </table:table-cell>
          <table:table-cell table:number-columns-repeated="16369"/>
        </table:table-row>
        <table:table-row table:style-name="ro1">
          <table:table-cell office:value-type="float" office:value="300" table:style-name="ce3">
            <text:p>30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8520317</text:p>
          </table:table-cell>
          <table:table-cell office:value-type="string" table:style-name="ce1">
            <text:p>Tomás Ruiz Silva</text:p>
          </table:table-cell>
          <table:table-cell office:value-type="date" office:date-value="1969-01-21T00:00:00" table:style-name="ce4">
            <text:p>1969-01-2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9182290</text:p>
          </table:table-cell>
          <table:table-cell office:value-type="string" table:style-name="ce1">
            <text:p>tomas.ruiz300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7-04T23:27:00" table:style-name="ce5">
            <text:p>2026-07-04 23:27</text:p>
          </table:table-cell>
          <table:table-cell office:value-type="date" office:date-value="2026-07-09T05:19:00" table:style-name="ce6">
            <text:p>2026-07-09 05:19</text:p>
          </table:table-cell>
          <table:table-cell table:number-columns-repeated="16369"/>
        </table:table-row>
        <table:table-row table:style-name="ro1">
          <table:table-cell office:value-type="float" office:value="301" table:style-name="ce3">
            <text:p>30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63193853</text:p>
          </table:table-cell>
          <table:table-cell office:value-type="string" table:style-name="ce1">
            <text:p>Juliana Ramírez Álvarez</text:p>
          </table:table-cell>
          <table:table-cell office:value-type="date" office:date-value="1945-10-03T00:00:00" table:style-name="ce4">
            <text:p>1945-10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7591343</text:p>
          </table:table-cell>
          <table:table-cell office:value-type="string" table:style-name="ce1">
            <text:p>juliana.ramirez30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28T01:48:00" table:style-name="ce5">
            <text:p>2026-04-28 01:48</text:p>
          </table:table-cell>
          <table:table-cell office:value-type="date" office:date-value="2026-05-08T22:06:00" table:style-name="ce6">
            <text:p>2026-05-08 22:06</text:p>
          </table:table-cell>
          <table:table-cell table:number-columns-repeated="16369"/>
        </table:table-row>
        <table:table-row table:style-name="ro1">
          <table:table-cell office:value-type="float" office:value="302" table:style-name="ce3">
            <text:p>30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76228409</text:p>
          </table:table-cell>
          <table:table-cell office:value-type="string" table:style-name="ce1">
            <text:p>Tomás Silva González</text:p>
          </table:table-cell>
          <table:table-cell office:value-type="date" office:date-value="1967-02-06T00:00:00" table:style-name="ce4">
            <text:p>1967-02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8384678</text:p>
          </table:table-cell>
          <table:table-cell office:value-type="string" table:style-name="ce1">
            <text:p>tomas.silva30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5-04T05:20:00" table:style-name="ce5">
            <text:p>2026-05-04 05:20</text:p>
          </table:table-cell>
          <table:table-cell office:value-type="date" office:date-value="2026-05-26T15:31:00" table:style-name="ce6">
            <text:p>2026-05-26 15:31</text:p>
          </table:table-cell>
          <table:table-cell table:number-columns-repeated="16369"/>
        </table:table-row>
        <table:table-row table:style-name="ro1">
          <table:table-cell office:value-type="float" office:value="303" table:style-name="ce3">
            <text:p>30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5323468</text:p>
          </table:table-cell>
          <table:table-cell office:value-type="string" table:style-name="ce1">
            <text:p>Jorge Daniel Ortiz Giraldo</text:p>
          </table:table-cell>
          <table:table-cell office:value-type="date" office:date-value="1995-09-06T00:00:00" table:style-name="ce4">
            <text:p>1995-09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9282317</text:p>
          </table:table-cell>
          <table:table-cell office:value-type="string" table:style-name="ce1">
            <text:p>jorge.ortiz30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7-07T13:33:00" table:style-name="ce5">
            <text:p>2026-07-07 13:33</text:p>
          </table:table-cell>
          <table:table-cell office:value-type="date" office:date-value="2026-07-09T09:54:00" table:style-name="ce6">
            <text:p>2026-07-09 09:54</text:p>
          </table:table-cell>
          <table:table-cell table:number-columns-repeated="16369"/>
        </table:table-row>
        <table:table-row table:style-name="ro1">
          <table:table-cell office:value-type="float" office:value="304" table:style-name="ce3">
            <text:p>30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66401676</text:p>
          </table:table-cell>
          <table:table-cell office:value-type="string" table:style-name="ce1">
            <text:p>Juan Carlos García Vargas</text:p>
          </table:table-cell>
          <table:table-cell office:value-type="date" office:date-value="2005-12-31T00:00:00" table:style-name="ce4">
            <text:p>2005-12-3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8416378</text:p>
          </table:table-cell>
          <table:table-cell office:value-type="string" table:style-name="ce1">
            <text:p>juan.garcia304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06T11:20:00" table:style-name="ce5">
            <text:p>2026-06-06 11:20</text:p>
          </table:table-cell>
          <table:table-cell office:value-type="date" office:date-value="2026-06-27T16:25:00" table:style-name="ce6">
            <text:p>2026-06-27 16:25</text:p>
          </table:table-cell>
          <table:table-cell table:number-columns-repeated="16369"/>
        </table:table-row>
        <table:table-row table:style-name="ro1">
          <table:table-cell office:value-type="float" office:value="305" table:style-name="ce3">
            <text:p>30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8357911</text:p>
          </table:table-cell>
          <table:table-cell office:value-type="string" table:style-name="ce1">
            <text:p>Carlos Vargas Rodríguez</text:p>
          </table:table-cell>
          <table:table-cell office:value-type="date" office:date-value="1999-08-05T00:00:00" table:style-name="ce4">
            <text:p>1999-08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7847479</text:p>
          </table:table-cell>
          <table:table-cell office:value-type="string" table:style-name="ce1">
            <text:p>carlos.vargas305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7-06T06:28:00" table:style-name="ce5">
            <text:p>2026-07-06 06:28</text:p>
          </table:table-cell>
          <table:table-cell office:value-type="date" office:date-value="2026-07-09T02:57:00" table:style-name="ce6">
            <text:p>2026-07-09 02:57</text:p>
          </table:table-cell>
          <table:table-cell table:number-columns-repeated="16369"/>
        </table:table-row>
        <table:table-row table:style-name="ro1">
          <table:table-cell office:value-type="float" office:value="306" table:style-name="ce3">
            <text:p>30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5091369</text:p>
          </table:table-cell>
          <table:table-cell office:value-type="string" table:style-name="ce1">
            <text:p>Diana Silva González</text:p>
          </table:table-cell>
          <table:table-cell office:value-type="date" office:date-value="1974-01-24T00:00:00" table:style-name="ce4">
            <text:p>1974-01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2333624</text:p>
          </table:table-cell>
          <table:table-cell office:value-type="string" table:style-name="ce1">
            <text:p>diana.silva30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04T16:26:00" table:style-name="ce5">
            <text:p>2026-04-04 16:26</text:p>
          </table:table-cell>
          <table:table-cell office:value-type="date" office:date-value="2026-04-05T17:16:00" table:style-name="ce6">
            <text:p>2026-04-05 17:16</text:p>
          </table:table-cell>
          <table:table-cell table:number-columns-repeated="16369"/>
        </table:table-row>
        <table:table-row table:style-name="ro1">
          <table:table-cell office:value-type="float" office:value="307" table:style-name="ce3">
            <text:p>30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5981069</text:p>
          </table:table-cell>
          <table:table-cell office:value-type="string" table:style-name="ce1">
            <text:p>Julián Quintero Cárdenas</text:p>
          </table:table-cell>
          <table:table-cell office:value-type="date" office:date-value="1991-05-26T00:00:00" table:style-name="ce4">
            <text:p>1991-05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6958758</text:p>
          </table:table-cell>
          <table:table-cell office:value-type="string" table:style-name="ce1">
            <text:p>julian.quintero307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16T08:45:00" table:style-name="ce5">
            <text:p>2026-05-16 08:45</text:p>
          </table:table-cell>
          <table:table-cell office:value-type="date" office:date-value="2026-07-05T15:30:00" table:style-name="ce6">
            <text:p>2026-07-05 15:30</text:p>
          </table:table-cell>
          <table:table-cell table:number-columns-repeated="16369"/>
        </table:table-row>
        <table:table-row table:style-name="ro1">
          <table:table-cell office:value-type="float" office:value="308" table:style-name="ce3">
            <text:p>30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78132459</text:p>
          </table:table-cell>
          <table:table-cell office:value-type="string" table:style-name="ce1">
            <text:p>Manuela Jiménez Romero</text:p>
          </table:table-cell>
          <table:table-cell office:value-type="date" office:date-value="1968-02-29T00:00:00" table:style-name="ce4">
            <text:p>1968-02-2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2045121</text:p>
          </table:table-cell>
          <table:table-cell office:value-type="string" table:style-name="ce1">
            <text:p>manuela.jimenez308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7-08T07:31:00" table:style-name="ce5">
            <text:p>2026-07-08 07:31</text:p>
          </table:table-cell>
          <table:table-cell office:value-type="date" office:date-value="2026-07-09T09:33:00" table:style-name="ce6">
            <text:p>2026-07-09 09:33</text:p>
          </table:table-cell>
          <table:table-cell table:number-columns-repeated="16369"/>
        </table:table-row>
        <table:table-row table:style-name="ro1">
          <table:table-cell office:value-type="float" office:value="309" table:style-name="ce3">
            <text:p>30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31947595</text:p>
          </table:table-cell>
          <table:table-cell office:value-type="string" table:style-name="ce1">
            <text:p>Nicolás Rodríguez López</text:p>
          </table:table-cell>
          <table:table-cell office:value-type="date" office:date-value="1961-07-14T00:00:00" table:style-name="ce4">
            <text:p>1961-07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9524034</text:p>
          </table:table-cell>
          <table:table-cell office:value-type="string" table:style-name="ce1">
            <text:p>nicolas.rodriguez309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3-27T01:18:00" table:style-name="ce5">
            <text:p>2026-03-27 01:18</text:p>
          </table:table-cell>
          <table:table-cell office:value-type="date" office:date-value="2026-06-26T13:46:00" table:style-name="ce6">
            <text:p>2026-06-26 13:46</text:p>
          </table:table-cell>
          <table:table-cell table:number-columns-repeated="16369"/>
        </table:table-row>
        <table:table-row table:style-name="ro1">
          <table:table-cell office:value-type="float" office:value="310" table:style-name="ce3">
            <text:p>31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57936816</text:p>
          </table:table-cell>
          <table:table-cell office:value-type="string" table:style-name="ce1">
            <text:p>Carolina Quintero Moreno</text:p>
          </table:table-cell>
          <table:table-cell office:value-type="date" office:date-value="1951-04-27T00:00:00" table:style-name="ce4">
            <text:p>1951-04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3998935</text:p>
          </table:table-cell>
          <table:table-cell office:value-type="string" table:style-name="ce1">
            <text:p>carolina.quintero310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07T06:50:00" table:style-name="ce5">
            <text:p>2026-06-07 06:50</text:p>
          </table:table-cell>
          <table:table-cell office:value-type="date" office:date-value="2026-06-26T14:40:00" table:style-name="ce6">
            <text:p>2026-06-26 14:40</text:p>
          </table:table-cell>
          <table:table-cell table:number-columns-repeated="16369"/>
        </table:table-row>
        <table:table-row table:style-name="ro1">
          <table:table-cell office:value-type="float" office:value="311" table:style-name="ce3">
            <text:p>31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56588270</text:p>
          </table:table-cell>
          <table:table-cell office:value-type="string" table:style-name="ce1">
            <text:p>María Sánchez Pérez</text:p>
          </table:table-cell>
          <table:table-cell office:value-type="date" office:date-value="1982-03-12T00:00:00" table:style-name="ce4">
            <text:p>1982-03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5471844</text:p>
          </table:table-cell>
          <table:table-cell office:value-type="string" table:style-name="ce1">
            <text:p>maria.sanchez311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10T06:34:00" table:style-name="ce5">
            <text:p>2026-05-10 06:34</text:p>
          </table:table-cell>
          <table:table-cell office:value-type="date" office:date-value="2026-05-17T22:32:00" table:style-name="ce6">
            <text:p>2026-05-17 22:32</text:p>
          </table:table-cell>
          <table:table-cell table:number-columns-repeated="16369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968646787</text:p>
          </table:table-cell>
          <table:table-cell office:value-type="string" table:style-name="ce1">
            <text:p>Nicolás Romero Sánchez</text:p>
          </table:table-cell>
          <table:table-cell office:value-type="date" office:date-value="1994-08-24T00:00:00" table:style-name="ce4">
            <text:p>1994-08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7229558</text:p>
          </table:table-cell>
          <table:table-cell office:value-type="string" table:style-name="ce1">
            <text:p>nicolas.romero312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7-03T23:22:00" table:style-name="ce5">
            <text:p>2026-07-03 23:22</text:p>
          </table:table-cell>
          <table:table-cell office:value-type="date" office:date-value="2026-07-07T10:09:00" table:style-name="ce6">
            <text:p>2026-07-07 10:09</text:p>
          </table:table-cell>
          <table:table-cell table:number-columns-repeated="16369"/>
        </table:table-row>
        <table:table-row table:style-name="ro1">
          <table:table-cell office:value-type="float" office:value="313" table:style-name="ce3">
            <text:p>31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51808336</text:p>
          </table:table-cell>
          <table:table-cell office:value-type="string" table:style-name="ce1">
            <text:p>Samuel Ortiz Castro</text:p>
          </table:table-cell>
          <table:table-cell office:value-type="date" office:date-value="1952-05-19T00:00:00" table:style-name="ce4">
            <text:p>1952-05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1379963</text:p>
          </table:table-cell>
          <table:table-cell office:value-type="string" table:style-name="ce1">
            <text:p>samuel.ortiz31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08T13:11:00" table:style-name="ce5">
            <text:p>2026-04-08 13:11</text:p>
          </table:table-cell>
          <table:table-cell office:value-type="date" office:date-value="2026-05-20T16:38:00" table:style-name="ce6">
            <text:p>2026-05-20 16:38</text:p>
          </table:table-cell>
          <table:table-cell table:number-columns-repeated="16369"/>
        </table:table-row>
        <table:table-row table:style-name="ro1">
          <table:table-cell office:value-type="float" office:value="314" table:style-name="ce3">
            <text:p>31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6328346</text:p>
          </table:table-cell>
          <table:table-cell office:value-type="string" table:style-name="ce1">
            <text:p>Valentina Moreno Martínez</text:p>
          </table:table-cell>
          <table:table-cell office:value-type="date" office:date-value="1978-08-10T00:00:00" table:style-name="ce4">
            <text:p>1978-08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5970386</text:p>
          </table:table-cell>
          <table:table-cell office:value-type="string" table:style-name="ce1">
            <text:p>valentina.moreno314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4-25T20:25:00" table:style-name="ce5">
            <text:p>2026-04-25 20:25</text:p>
          </table:table-cell>
          <table:table-cell office:value-type="date" office:date-value="2026-06-29T03:58:00" table:style-name="ce6">
            <text:p>2026-06-29 03:58</text:p>
          </table:table-cell>
          <table:table-cell table:number-columns-repeated="16369"/>
        </table:table-row>
        <table:table-row table:style-name="ro1">
          <table:table-cell office:value-type="float" office:value="315" table:style-name="ce3">
            <text:p>31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93547059</text:p>
          </table:table-cell>
          <table:table-cell office:value-type="string" table:style-name="ce1">
            <text:p>Sebastián Díaz Martínez</text:p>
          </table:table-cell>
          <table:table-cell office:value-type="date" office:date-value="1985-11-09T00:00:00" table:style-name="ce4">
            <text:p>1985-11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8070734</text:p>
          </table:table-cell>
          <table:table-cell office:value-type="string" table:style-name="ce1">
            <text:p>sebastian.diaz315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3-27T13:14:00" table:style-name="ce5">
            <text:p>2026-03-27 13:14</text:p>
          </table:table-cell>
          <table:table-cell office:value-type="date" office:date-value="2026-04-17T19:29:00" table:style-name="ce6">
            <text:p>2026-04-17 19:29</text:p>
          </table:table-cell>
          <table:table-cell table:number-columns-repeated="16369"/>
        </table:table-row>
        <table:table-row table:style-name="ro1">
          <table:table-cell office:value-type="float" office:value="316" table:style-name="ce3">
            <text:p>316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85859280</text:p>
          </table:table-cell>
          <table:table-cell office:value-type="string" table:style-name="ce1">
            <text:p>Isabella Ortiz González</text:p>
          </table:table-cell>
          <table:table-cell office:value-type="date" office:date-value="1991-04-20T00:00:00" table:style-name="ce4">
            <text:p>1991-04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4362524</text:p>
          </table:table-cell>
          <table:table-cell office:value-type="string" table:style-name="ce1">
            <text:p>isabella.ortiz316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22T05:10:00" table:style-name="ce5">
            <text:p>2026-06-22 05:10</text:p>
          </table:table-cell>
          <table:table-cell office:value-type="date" office:date-value="2026-06-26T03:40:00" table:style-name="ce6">
            <text:p>2026-06-26 03:40</text:p>
          </table:table-cell>
          <table:table-cell table:number-columns-repeated="16369"/>
        </table:table-row>
        <table:table-row table:style-name="ro1">
          <table:table-cell office:value-type="float" office:value="317" table:style-name="ce3">
            <text:p>31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98220053</text:p>
          </table:table-cell>
          <table:table-cell office:value-type="string" table:style-name="ce1">
            <text:p>Julián López Díaz</text:p>
          </table:table-cell>
          <table:table-cell office:value-type="date" office:date-value="1966-12-03T00:00:00" table:style-name="ce4">
            <text:p>1966-12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5193478</text:p>
          </table:table-cell>
          <table:table-cell office:value-type="string" table:style-name="ce1">
            <text:p>julian.lopez31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04T03:17:00" table:style-name="ce5">
            <text:p>2026-06-04 03:17</text:p>
          </table:table-cell>
          <table:table-cell office:value-type="date" office:date-value="2026-07-02T03:36:00" table:style-name="ce6">
            <text:p>2026-07-02 03:36</text:p>
          </table:table-cell>
          <table:table-cell table:number-columns-repeated="16369"/>
        </table:table-row>
        <table:table-row table:style-name="ro1">
          <table:table-cell office:value-type="float" office:value="318" table:style-name="ce3">
            <text:p>31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78238612</text:p>
          </table:table-cell>
          <table:table-cell office:value-type="string" table:style-name="ce1">
            <text:p>María Vargas Rodríguez</text:p>
          </table:table-cell>
          <table:table-cell office:value-type="date" office:date-value="1962-09-12T00:00:00" table:style-name="ce4">
            <text:p>1962-09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1861140</text:p>
          </table:table-cell>
          <table:table-cell office:value-type="string" table:style-name="ce1">
            <text:p>maria.vargas318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6-26T10:13:00" table:style-name="ce5">
            <text:p>2026-06-26 10:13</text:p>
          </table:table-cell>
          <table:table-cell office:value-type="date" office:date-value="2026-07-08T02:58:00" table:style-name="ce6">
            <text:p>2026-07-08 02:58</text:p>
          </table:table-cell>
          <table:table-cell table:number-columns-repeated="16369"/>
        </table:table-row>
        <table:table-row table:style-name="ro1">
          <table:table-cell office:value-type="float" office:value="319" table:style-name="ce3">
            <text:p>31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6299482</text:p>
          </table:table-cell>
          <table:table-cell office:value-type="string" table:style-name="ce1">
            <text:p>Esteban Santiago Restrepo Valencia</text:p>
          </table:table-cell>
          <table:table-cell office:value-type="date" office:date-value="1943-01-31T00:00:00" table:style-name="ce4">
            <text:p>1943-01-3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3249685</text:p>
          </table:table-cell>
          <table:table-cell office:value-type="string" table:style-name="ce1">
            <text:p>esteban.restrepo31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21T17:39:00" table:style-name="ce5">
            <text:p>2026-05-21 17:39</text:p>
          </table:table-cell>
          <table:table-cell office:value-type="date" office:date-value="2026-07-09T20:46:00" table:style-name="ce6">
            <text:p>2026-07-09 20:46</text:p>
          </table:table-cell>
          <table:table-cell table:number-columns-repeated="16369"/>
        </table:table-row>
        <table:table-row table:style-name="ro1">
          <table:table-cell office:value-type="float" office:value="320" table:style-name="ce3">
            <text:p>32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36503724</text:p>
          </table:table-cell>
          <table:table-cell office:value-type="string" table:style-name="ce1">
            <text:p>Daniela Manuela Ruiz Rodríguez</text:p>
          </table:table-cell>
          <table:table-cell office:value-type="date" office:date-value="1999-10-25T00:00:00" table:style-name="ce4">
            <text:p>1999-10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2431582</text:p>
          </table:table-cell>
          <table:table-cell office:value-type="string" table:style-name="ce1">
            <text:p>daniela.ruiz320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7-05T20:48:00" table:style-name="ce5">
            <text:p>2026-07-05 20:48</text:p>
          </table:table-cell>
          <table:table-cell office:value-type="date" office:date-value="2026-07-06T10:47:00" table:style-name="ce6">
            <text:p>2026-07-06 10:47</text:p>
          </table:table-cell>
          <table:table-cell table:number-columns-repeated="16369"/>
        </table:table-row>
        <table:table-row table:style-name="ro1">
          <table:table-cell office:value-type="float" office:value="321" table:style-name="ce3">
            <text:p>32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94316785</text:p>
          </table:table-cell>
          <table:table-cell office:value-type="string" table:style-name="ce1">
            <text:p>Felipe Martínez García</text:p>
          </table:table-cell>
          <table:table-cell office:value-type="date" office:date-value="1991-10-18T00:00:00" table:style-name="ce4">
            <text:p>1991-10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3532634</text:p>
          </table:table-cell>
          <table:table-cell office:value-type="string" table:style-name="ce1">
            <text:p>felipe.martinez321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6-26T11:38:00" table:style-name="ce5">
            <text:p>2026-06-26 11:38</text:p>
          </table:table-cell>
          <table:table-cell office:value-type="date" office:date-value="2026-07-03T01:21:00" table:style-name="ce6">
            <text:p>2026-07-03 01:21</text:p>
          </table:table-cell>
          <table:table-cell table:number-columns-repeated="16369"/>
        </table:table-row>
        <table:table-row table:style-name="ro1">
          <table:table-cell office:value-type="float" office:value="322" table:style-name="ce3">
            <text:p>32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22591284</text:p>
          </table:table-cell>
          <table:table-cell office:value-type="string" table:style-name="ce1">
            <text:p>Ricardo Tomás Ospina Martínez</text:p>
          </table:table-cell>
          <table:table-cell office:value-type="date" office:date-value="1995-01-16T00:00:00" table:style-name="ce4">
            <text:p>1995-01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2712775</text:p>
          </table:table-cell>
          <table:table-cell office:value-type="string" table:style-name="ce1">
            <text:p>ricardo.ospina322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18T03:49:00" table:style-name="ce5">
            <text:p>2026-05-18 03:49</text:p>
          </table:table-cell>
          <table:table-cell office:value-type="date" office:date-value="2026-06-01T12:20:00" table:style-name="ce6">
            <text:p>2026-06-01 12:20</text:p>
          </table:table-cell>
          <table:table-cell table:number-columns-repeated="16369"/>
        </table:table-row>
        <table:table-row table:style-name="ro1">
          <table:table-cell office:value-type="float" office:value="323" table:style-name="ce3">
            <text:p>32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66588426</text:p>
          </table:table-cell>
          <table:table-cell office:value-type="string" table:style-name="ce1">
            <text:p>David Rojas Muñoz</text:p>
          </table:table-cell>
          <table:table-cell office:value-type="date" office:date-value="1985-10-29T00:00:00" table:style-name="ce4">
            <text:p>1985-10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1228884</text:p>
          </table:table-cell>
          <table:table-cell office:value-type="string" table:style-name="ce1">
            <text:p>david.rojas323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22T03:13:00" table:style-name="ce5">
            <text:p>2026-05-22 03:13</text:p>
          </table:table-cell>
          <table:table-cell office:value-type="date" office:date-value="2026-05-26T18:02:00" table:style-name="ce6">
            <text:p>2026-05-26 18:02</text:p>
          </table:table-cell>
          <table:table-cell table:number-columns-repeated="16369"/>
        </table:table-row>
        <table:table-row table:style-name="ro1">
          <table:table-cell office:value-type="float" office:value="324" table:style-name="ce3">
            <text:p>32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8057132</text:p>
          </table:table-cell>
          <table:table-cell office:value-type="string" table:style-name="ce1">
            <text:p>Catalina Sánchez Muñoz</text:p>
          </table:table-cell>
          <table:table-cell office:value-type="date" office:date-value="1985-08-25T00:00:00" table:style-name="ce4">
            <text:p>1985-08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7045527</text:p>
          </table:table-cell>
          <table:table-cell office:value-type="string" table:style-name="ce1">
            <text:p>catalina.sanchez324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3-16T16:41:00" table:style-name="ce5">
            <text:p>2026-03-16 16:41</text:p>
          </table:table-cell>
          <table:table-cell office:value-type="date" office:date-value="2026-07-08T18:16:00" table:style-name="ce6">
            <text:p>2026-07-08 18:16</text:p>
          </table:table-cell>
          <table:table-cell table:number-columns-repeated="16369"/>
        </table:table-row>
        <table:table-row table:style-name="ro1">
          <table:table-cell office:value-type="float" office:value="325" table:style-name="ce3">
            <text:p>32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36011991</text:p>
          </table:table-cell>
          <table:table-cell office:value-type="string" table:style-name="ce1">
            <text:p>Juan Jorge Quintero Muñoz</text:p>
          </table:table-cell>
          <table:table-cell office:value-type="date" office:date-value="2001-01-22T00:00:00" table:style-name="ce4">
            <text:p>2001-01-22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169240645</text:p>
          </table:table-cell>
          <table:table-cell office:value-type="string" table:style-name="ce1">
            <text:p>juan.quintero325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08T02:51:00" table:style-name="ce5">
            <text:p>2026-06-08 02:51</text:p>
          </table:table-cell>
          <table:table-cell office:value-type="date" office:date-value="2026-06-14T19:59:00" table:style-name="ce6">
            <text:p>2026-06-14 19:59</text:p>
          </table:table-cell>
          <table:table-cell table:number-columns-repeated="16369"/>
        </table:table-row>
        <table:table-row table:style-name="ro1">
          <table:table-cell office:value-type="float" office:value="326" table:style-name="ce3">
            <text:p>326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551592144</text:p>
          </table:table-cell>
          <table:table-cell office:value-type="string" table:style-name="ce1">
            <text:p>Gabriela Isabella Cárdenas Rojas</text:p>
          </table:table-cell>
          <table:table-cell office:value-type="date" office:date-value="1966-03-08T00:00:00" table:style-name="ce4">
            <text:p>1966-03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7116100</text:p>
          </table:table-cell>
          <table:table-cell office:value-type="string" table:style-name="ce1">
            <text:p>gabriela.cardenas32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21T20:44:00" table:style-name="ce5">
            <text:p>2026-04-21 20:44</text:p>
          </table:table-cell>
          <table:table-cell office:value-type="date" office:date-value="2026-04-26T16:00:00" table:style-name="ce6">
            <text:p>2026-04-26 16:00</text:p>
          </table:table-cell>
          <table:table-cell table:number-columns-repeated="16369"/>
        </table:table-row>
        <table:table-row table:style-name="ro1">
          <table:table-cell office:value-type="float" office:value="327" table:style-name="ce3">
            <text:p>32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7361574</text:p>
          </table:table-cell>
          <table:table-cell office:value-type="string" table:style-name="ce1">
            <text:p>Alejandro Rojas Díaz</text:p>
          </table:table-cell>
          <table:table-cell office:value-type="date" office:date-value="1974-11-15T00:00:00" table:style-name="ce4">
            <text:p>1974-11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6821208</text:p>
          </table:table-cell>
          <table:table-cell office:value-type="string" table:style-name="ce1">
            <text:p>alejandro.rojas327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6-05T11:41:00" table:style-name="ce5">
            <text:p>2026-06-05 11:41</text:p>
          </table:table-cell>
          <table:table-cell office:value-type="date" office:date-value="2026-06-26T12:38:00" table:style-name="ce6">
            <text:p>2026-06-26 12:38</text:p>
          </table:table-cell>
          <table:table-cell table:number-columns-repeated="16369"/>
        </table:table-row>
        <table:table-row table:style-name="ro1">
          <table:table-cell office:value-type="float" office:value="328" table:style-name="ce3">
            <text:p>32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7979036</text:p>
          </table:table-cell>
          <table:table-cell office:value-type="string" table:style-name="ce1">
            <text:p>Carlos Rodríguez Díaz</text:p>
          </table:table-cell>
          <table:table-cell office:value-type="date" office:date-value="1992-06-05T00:00:00" table:style-name="ce4">
            <text:p>1992-06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7622728</text:p>
          </table:table-cell>
          <table:table-cell office:value-type="string" table:style-name="ce1">
            <text:p>carlos.rodriguez32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27T16:01:00" table:style-name="ce5">
            <text:p>2026-05-27 16:01</text:p>
          </table:table-cell>
          <table:table-cell office:value-type="date" office:date-value="2026-07-07T17:00:00" table:style-name="ce6">
            <text:p>2026-07-07 17:00</text:p>
          </table:table-cell>
          <table:table-cell table:number-columns-repeated="16369"/>
        </table:table-row>
        <table:table-row table:style-name="ro1">
          <table:table-cell office:value-type="float" office:value="329" table:style-name="ce3">
            <text:p>32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35540132</text:p>
          </table:table-cell>
          <table:table-cell office:value-type="string" table:style-name="ce1">
            <text:p>Carolina Cárdenas Restrepo</text:p>
          </table:table-cell>
          <table:table-cell office:value-type="date" office:date-value="1989-07-17T00:00:00" table:style-name="ce4">
            <text:p>1989-07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7200411</text:p>
          </table:table-cell>
          <table:table-cell office:value-type="string" table:style-name="ce1">
            <text:p>carolina.cardenas329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21T10:02:00" table:style-name="ce5">
            <text:p>2026-05-21 10:02</text:p>
          </table:table-cell>
          <table:table-cell office:value-type="date" office:date-value="2026-06-22T08:36:00" table:style-name="ce6">
            <text:p>2026-06-22 08:36</text:p>
          </table:table-cell>
          <table:table-cell table:number-columns-repeated="16369"/>
        </table:table-row>
        <table:table-row table:style-name="ro1">
          <table:table-cell office:value-type="float" office:value="330" table:style-name="ce3">
            <text:p>33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25678415</text:p>
          </table:table-cell>
          <table:table-cell office:value-type="string" table:style-name="ce1">
            <text:p>Carlos Samuel Díaz Castaño</text:p>
          </table:table-cell>
          <table:table-cell office:value-type="date" office:date-value="1965-03-14T00:00:00" table:style-name="ce4">
            <text:p>1965-03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1786517</text:p>
          </table:table-cell>
          <table:table-cell office:value-type="string" table:style-name="ce1">
            <text:p>carlos.diaz33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3-25T06:00:00" table:style-name="ce5">
            <text:p>2026-03-25 06:00</text:p>
          </table:table-cell>
          <table:table-cell office:value-type="date" office:date-value="2026-05-29T00:15:00" table:style-name="ce6">
            <text:p>2026-05-29 00:15</text:p>
          </table:table-cell>
          <table:table-cell table:number-columns-repeated="16369"/>
        </table:table-row>
        <table:table-row table:style-name="ro1">
          <table:table-cell office:value-type="float" office:value="331" table:style-name="ce3">
            <text:p>331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323109355</text:p>
          </table:table-cell>
          <table:table-cell office:value-type="string" table:style-name="ce1">
            <text:p>Andrea Martínez García</text:p>
          </table:table-cell>
          <table:table-cell office:value-type="date" office:date-value="1964-09-09T00:00:00" table:style-name="ce4">
            <text:p>1964-09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9270073</text:p>
          </table:table-cell>
          <table:table-cell office:value-type="string" table:style-name="ce1">
            <text:p>andrea.martinez331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3-19T01:21:00" table:style-name="ce5">
            <text:p>2026-03-19 01:21</text:p>
          </table:table-cell>
          <table:table-cell office:value-type="date" office:date-value="2026-05-10T10:17:00" table:style-name="ce6">
            <text:p>2026-05-10 10:17</text:p>
          </table:table-cell>
          <table:table-cell table:number-columns-repeated="16369"/>
        </table:table-row>
        <table:table-row table:style-name="ro1">
          <table:table-cell office:value-type="float" office:value="332" table:style-name="ce3">
            <text:p>33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15662672</text:p>
          </table:table-cell>
          <table:table-cell office:value-type="string" table:style-name="ce1">
            <text:p>Carolina Muñoz Ospina</text:p>
          </table:table-cell>
          <table:table-cell office:value-type="date" office:date-value="1987-11-07T00:00:00" table:style-name="ce4">
            <text:p>1987-11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3393633</text:p>
          </table:table-cell>
          <table:table-cell office:value-type="string" table:style-name="ce1">
            <text:p>carolina.munoz33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23T11:10:00" table:style-name="ce5">
            <text:p>2026-04-23 11:10</text:p>
          </table:table-cell>
          <table:table-cell office:value-type="date" office:date-value="2026-04-30T16:49:00" table:style-name="ce6">
            <text:p>2026-04-30 16:49</text:p>
          </table:table-cell>
          <table:table-cell table:number-columns-repeated="16369"/>
        </table:table-row>
        <table:table-row table:style-name="ro1">
          <table:table-cell office:value-type="float" office:value="333" table:style-name="ce3">
            <text:p>33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1194473</text:p>
          </table:table-cell>
          <table:table-cell office:value-type="string" table:style-name="ce1">
            <text:p>Sofía Ramírez Mendoza</text:p>
          </table:table-cell>
          <table:table-cell office:value-type="date" office:date-value="2000-03-25T00:00:00" table:style-name="ce4">
            <text:p>2000-03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2253817</text:p>
          </table:table-cell>
          <table:table-cell office:value-type="string" table:style-name="ce1">
            <text:p>sofia.ramirez333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7-09T20:13:00" table:style-name="ce5">
            <text:p>2026-07-09 20:13</text:p>
          </table:table-cell>
          <table:table-cell office:value-type="date" office:date-value="2026-07-09T23:47:00" table:style-name="ce6">
            <text:p>2026-07-09 23:47</text:p>
          </table:table-cell>
          <table:table-cell table:number-columns-repeated="16369"/>
        </table:table-row>
        <table:table-row table:style-name="ro1">
          <table:table-cell office:value-type="float" office:value="334" table:style-name="ce3">
            <text:p>33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92647779</text:p>
          </table:table-cell>
          <table:table-cell office:value-type="string" table:style-name="ce1">
            <text:p>Catalina Valencia Díaz</text:p>
          </table:table-cell>
          <table:table-cell office:value-type="date" office:date-value="2001-01-12T00:00:00" table:style-name="ce4">
            <text:p>2001-01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2590672</text:p>
          </table:table-cell>
          <table:table-cell office:value-type="string" table:style-name="ce1">
            <text:p>catalina.valencia334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6-04T10:17:00" table:style-name="ce5">
            <text:p>2026-06-04 10:17</text:p>
          </table:table-cell>
          <table:table-cell office:value-type="date" office:date-value="2026-06-10T18:27:00" table:style-name="ce6">
            <text:p>2026-06-10 18:27</text:p>
          </table:table-cell>
          <table:table-cell table:number-columns-repeated="16369"/>
        </table:table-row>
        <table:table-row table:style-name="ro1">
          <table:table-cell office:value-type="float" office:value="335" table:style-name="ce3">
            <text:p>33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69885347</text:p>
          </table:table-cell>
          <table:table-cell office:value-type="string" table:style-name="ce1">
            <text:p>Santiago Díaz Castro</text:p>
          </table:table-cell>
          <table:table-cell office:value-type="date" office:date-value="1981-12-18T00:00:00" table:style-name="ce4">
            <text:p>1981-12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2038376</text:p>
          </table:table-cell>
          <table:table-cell office:value-type="string" table:style-name="ce1">
            <text:p>santiago.diaz335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4-15T18:21:00" table:style-name="ce5">
            <text:p>2026-04-15 18:21</text:p>
          </table:table-cell>
          <table:table-cell office:value-type="date" office:date-value="2026-05-20T02:29:00" table:style-name="ce6">
            <text:p>2026-05-20 02:29</text:p>
          </table:table-cell>
          <table:table-cell table:number-columns-repeated="16369"/>
        </table:table-row>
        <table:table-row table:style-name="ro1">
          <table:table-cell office:value-type="float" office:value="336" table:style-name="ce3">
            <text:p>33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44611697</text:p>
          </table:table-cell>
          <table:table-cell office:value-type="string" table:style-name="ce1">
            <text:p>Samuel Ospina Valencia</text:p>
          </table:table-cell>
          <table:table-cell office:value-type="date" office:date-value="1987-01-01T00:00:00" table:style-name="ce4">
            <text:p>1987-01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8275115</text:p>
          </table:table-cell>
          <table:table-cell office:value-type="string" table:style-name="ce1">
            <text:p>samuel.ospina33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23T19:42:00" table:style-name="ce5">
            <text:p>2026-06-23 19:42</text:p>
          </table:table-cell>
          <table:table-cell office:value-type="date" office:date-value="2026-06-26T16:22:00" table:style-name="ce6">
            <text:p>2026-06-26 16:22</text:p>
          </table:table-cell>
          <table:table-cell table:number-columns-repeated="16369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25164272</text:p>
          </table:table-cell>
          <table:table-cell office:value-type="string" table:style-name="ce1">
            <text:p>Diana Rodríguez Cárdenas</text:p>
          </table:table-cell>
          <table:table-cell office:value-type="date" office:date-value="1972-06-18T00:00:00" table:style-name="ce4">
            <text:p>1972-06-1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5541128</text:p>
          </table:table-cell>
          <table:table-cell office:value-type="string" table:style-name="ce1">
            <text:p>diana.rodriguez337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30T16:51:00" table:style-name="ce5">
            <text:p>2026-03-30 16:51</text:p>
          </table:table-cell>
          <table:table-cell office:value-type="date" office:date-value="2026-06-16T20:41:00" table:style-name="ce6">
            <text:p>2026-06-16 20:41</text:p>
          </table:table-cell>
          <table:table-cell table:number-columns-repeated="16369"/>
        </table:table-row>
        <table:table-row table:style-name="ro1">
          <table:table-cell office:value-type="float" office:value="338" table:style-name="ce3">
            <text:p>33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00843145</text:p>
          </table:table-cell>
          <table:table-cell office:value-type="string" table:style-name="ce1">
            <text:p>Santiago García Muñoz</text:p>
          </table:table-cell>
          <table:table-cell office:value-type="date" office:date-value="1959-02-16T00:00:00" table:style-name="ce4">
            <text:p>1959-02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7805483</text:p>
          </table:table-cell>
          <table:table-cell office:value-type="string" table:style-name="ce1">
            <text:p>santiago.garcia33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3-23T07:13:00" table:style-name="ce5">
            <text:p>2026-03-23 07:13</text:p>
          </table:table-cell>
          <table:table-cell office:value-type="date" office:date-value="2026-07-05T18:59:00" table:style-name="ce6">
            <text:p>2026-07-05 18:59</text:p>
          </table:table-cell>
          <table:table-cell table:number-columns-repeated="16369"/>
        </table:table-row>
        <table:table-row table:style-name="ro1">
          <table:table-cell office:value-type="float" office:value="339" table:style-name="ce3">
            <text:p>33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67727617</text:p>
          </table:table-cell>
          <table:table-cell office:value-type="string" table:style-name="ce1">
            <text:p>Ana Natalia González Moreno</text:p>
          </table:table-cell>
          <table:table-cell office:value-type="date" office:date-value="1984-03-15T00:00:00" table:style-name="ce4">
            <text:p>1984-03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3630974</text:p>
          </table:table-cell>
          <table:table-cell office:value-type="string" table:style-name="ce1">
            <text:p>ana.gonzalez339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26T16:34:00" table:style-name="ce5">
            <text:p>2026-04-26 16:34</text:p>
          </table:table-cell>
          <table:table-cell office:value-type="date" office:date-value="2026-06-27T20:25:00" table:style-name="ce6">
            <text:p>2026-06-27 20:25</text:p>
          </table:table-cell>
          <table:table-cell table:number-columns-repeated="16369"/>
        </table:table-row>
        <table:table-row table:style-name="ro1">
          <table:table-cell office:value-type="float" office:value="340" table:style-name="ce3">
            <text:p>34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41953971</text:p>
          </table:table-cell>
          <table:table-cell office:value-type="string" table:style-name="ce1">
            <text:p>Santiago Hernández Pérez</text:p>
          </table:table-cell>
          <table:table-cell office:value-type="date" office:date-value="1977-05-06T00:00:00" table:style-name="ce4">
            <text:p>1977-05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8985685</text:p>
          </table:table-cell>
          <table:table-cell office:value-type="string" table:style-name="ce1">
            <text:p>santiago.hernandez340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01T00:32:00" table:style-name="ce5">
            <text:p>2026-05-01 00:32</text:p>
          </table:table-cell>
          <table:table-cell office:value-type="date" office:date-value="2026-07-04T06:48:00" table:style-name="ce6">
            <text:p>2026-07-04 06:48</text:p>
          </table:table-cell>
          <table:table-cell table:number-columns-repeated="16369"/>
        </table:table-row>
        <table:table-row table:style-name="ro1">
          <table:table-cell office:value-type="float" office:value="341" table:style-name="ce3">
            <text:p>34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62940828</text:p>
          </table:table-cell>
          <table:table-cell office:value-type="string" table:style-name="ce1">
            <text:p>Carolina Castaño Ortiz</text:p>
          </table:table-cell>
          <table:table-cell office:value-type="date" office:date-value="2004-11-17T00:00:00" table:style-name="ce4">
            <text:p>2004-11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4524851</text:p>
          </table:table-cell>
          <table:table-cell office:value-type="string" table:style-name="ce1">
            <text:p>carolina.castano341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7-10T03:26:00" table:style-name="ce5">
            <text:p>2026-07-10 03:26</text:p>
          </table:table-cell>
          <table:table-cell office:value-type="date" office:date-value="2026-07-10T04:15:00" table:style-name="ce6">
            <text:p>2026-07-10 04:15</text:p>
          </table:table-cell>
          <table:table-cell table:number-columns-repeated="16369"/>
        </table:table-row>
        <table:table-row table:style-name="ro1">
          <table:table-cell office:value-type="float" office:value="342" table:style-name="ce3">
            <text:p>34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15444493</text:p>
          </table:table-cell>
          <table:table-cell office:value-type="string" table:style-name="ce1">
            <text:p>Camila Valencia Quintero</text:p>
          </table:table-cell>
          <table:table-cell office:value-type="date" office:date-value="2000-08-17T00:00:00" table:style-name="ce4">
            <text:p>2000-08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2084505</text:p>
          </table:table-cell>
          <table:table-cell office:value-type="string" table:style-name="ce1">
            <text:p>camila.valencia342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03T10:08:00" table:style-name="ce5">
            <text:p>2026-04-03 10:08</text:p>
          </table:table-cell>
          <table:table-cell office:value-type="date" office:date-value="2026-04-06T00:55:00" table:style-name="ce6">
            <text:p>2026-04-06 00:55</text:p>
          </table:table-cell>
          <table:table-cell table:number-columns-repeated="16369"/>
        </table:table-row>
        <table:table-row table:style-name="ro1">
          <table:table-cell office:value-type="float" office:value="343" table:style-name="ce3">
            <text:p>343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716475402</text:p>
          </table:table-cell>
          <table:table-cell office:value-type="string" table:style-name="ce1">
            <text:p>Sofía Silva Restrepo</text:p>
          </table:table-cell>
          <table:table-cell office:value-type="date" office:date-value="2017-06-14T00:00:00" table:style-name="ce4">
            <text:p>2017-06-1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9965856</text:p>
          </table:table-cell>
          <table:table-cell office:value-type="string" table:style-name="ce1">
            <text:p>sofia.silva343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26T03:47:00" table:style-name="ce5">
            <text:p>2026-05-26 03:47</text:p>
          </table:table-cell>
          <table:table-cell office:value-type="date" office:date-value="2026-06-27T07:03:00" table:style-name="ce6">
            <text:p>2026-06-27 07:03</text:p>
          </table:table-cell>
          <table:table-cell table:number-columns-repeated="16369"/>
        </table:table-row>
        <table:table-row table:style-name="ro1">
          <table:table-cell office:value-type="float" office:value="344" table:style-name="ce3">
            <text:p>34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7756915</text:p>
          </table:table-cell>
          <table:table-cell office:value-type="string" table:style-name="ce1">
            <text:p>Daniela López Muñoz</text:p>
          </table:table-cell>
          <table:table-cell office:value-type="date" office:date-value="1941-03-07T00:00:00" table:style-name="ce4">
            <text:p>1941-03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1381853</text:p>
          </table:table-cell>
          <table:table-cell office:value-type="string" table:style-name="ce1">
            <text:p>daniela.lopez34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20T18:08:00" table:style-name="ce5">
            <text:p>2026-04-20 18:08</text:p>
          </table:table-cell>
          <table:table-cell office:value-type="date" office:date-value="2026-04-23T19:10:00" table:style-name="ce6">
            <text:p>2026-04-23 19:10</text:p>
          </table:table-cell>
          <table:table-cell table:number-columns-repeated="16369"/>
        </table:table-row>
        <table:table-row table:style-name="ro1">
          <table:table-cell office:value-type="float" office:value="345" table:style-name="ce3">
            <text:p>345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0582491</text:p>
          </table:table-cell>
          <table:table-cell office:value-type="string" table:style-name="ce1">
            <text:p>Juan Samuel Restrepo Mendoza</text:p>
          </table:table-cell>
          <table:table-cell office:value-type="date" office:date-value="2015-06-19T00:00:00" table:style-name="ce4">
            <text:p>2015-06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9193429</text:p>
          </table:table-cell>
          <table:table-cell office:value-type="string" table:style-name="ce1">
            <text:p>juan.restrepo34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20T02:50:00" table:style-name="ce5">
            <text:p>2026-04-20 02:50</text:p>
          </table:table-cell>
          <table:table-cell office:value-type="date" office:date-value="2026-07-04T09:18:00" table:style-name="ce6">
            <text:p>2026-07-04 09:18</text:p>
          </table:table-cell>
          <table:table-cell table:number-columns-repeated="16369"/>
        </table:table-row>
        <table:table-row table:style-name="ro1">
          <table:table-cell office:value-type="float" office:value="346" table:style-name="ce3">
            <text:p>34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5678630</text:p>
          </table:table-cell>
          <table:table-cell office:value-type="string" table:style-name="ce1">
            <text:p>Paula Ortiz Castro</text:p>
          </table:table-cell>
          <table:table-cell office:value-type="date" office:date-value="1947-05-17T00:00:00" table:style-name="ce4">
            <text:p>1947-05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4326312</text:p>
          </table:table-cell>
          <table:table-cell office:value-type="string" table:style-name="ce1">
            <text:p>paula.ortiz346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3-20T01:41:00" table:style-name="ce5">
            <text:p>2026-03-20 01:41</text:p>
          </table:table-cell>
          <table:table-cell office:value-type="date" office:date-value="2026-04-10T02:23:00" table:style-name="ce6">
            <text:p>2026-04-10 02:23</text:p>
          </table:table-cell>
          <table:table-cell table:number-columns-repeated="16369"/>
        </table:table-row>
        <table:table-row table:style-name="ro1">
          <table:table-cell office:value-type="float" office:value="347" table:style-name="ce3">
            <text:p>347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778802657</text:p>
          </table:table-cell>
          <table:table-cell office:value-type="string" table:style-name="ce1">
            <text:p>Daniela Álvarez Sánchez</text:p>
          </table:table-cell>
          <table:table-cell office:value-type="date" office:date-value="2009-10-17T00:00:00" table:style-name="ce4">
            <text:p>2009-10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9023709</text:p>
          </table:table-cell>
          <table:table-cell office:value-type="string" table:style-name="ce1">
            <text:p>daniela.alvarez34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17T15:55:00" table:style-name="ce5">
            <text:p>2026-06-17 15:55</text:p>
          </table:table-cell>
          <table:table-cell office:value-type="date" office:date-value="2026-07-03T06:23:00" table:style-name="ce6">
            <text:p>2026-07-03 06:23</text:p>
          </table:table-cell>
          <table:table-cell table:number-columns-repeated="16369"/>
        </table:table-row>
        <table:table-row table:style-name="ro1">
          <table:table-cell office:value-type="float" office:value="348" table:style-name="ce3">
            <text:p>34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02912092</text:p>
          </table:table-cell>
          <table:table-cell office:value-type="string" table:style-name="ce1">
            <text:p>Juliana Rodríguez Silva</text:p>
          </table:table-cell>
          <table:table-cell office:value-type="date" office:date-value="1964-02-02T00:00:00" table:style-name="ce4">
            <text:p>1964-02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8074290</text:p>
          </table:table-cell>
          <table:table-cell office:value-type="string" table:style-name="ce1">
            <text:p>juliana.rodriguez348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7-04T04:16:00" table:style-name="ce5">
            <text:p>2026-07-04 04:16</text:p>
          </table:table-cell>
          <table:table-cell office:value-type="date" office:date-value="2026-07-06T00:00:00" table:style-name="ce6">
            <text:p>2026-07-06 00:00</text:p>
          </table:table-cell>
          <table:table-cell table:number-columns-repeated="16369"/>
        </table:table-row>
        <table:table-row table:style-name="ro1">
          <table:table-cell office:value-type="float" office:value="349" table:style-name="ce3">
            <text:p>34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1681322</text:p>
          </table:table-cell>
          <table:table-cell office:value-type="string" table:style-name="ce1">
            <text:p>Cristian Vargas Moreno</text:p>
          </table:table-cell>
          <table:table-cell office:value-type="date" office:date-value="1990-11-15T00:00:00" table:style-name="ce4">
            <text:p>1990-11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1121417</text:p>
          </table:table-cell>
          <table:table-cell office:value-type="string" table:style-name="ce1">
            <text:p>cristian.vargas349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7-08T10:56:00" table:style-name="ce5">
            <text:p>2026-07-08 10:56</text:p>
          </table:table-cell>
          <table:table-cell office:value-type="date" office:date-value="2026-07-08T12:31:00" table:style-name="ce6">
            <text:p>2026-07-08 12:31</text:p>
          </table:table-cell>
          <table:table-cell table:number-columns-repeated="16369"/>
        </table:table-row>
        <table:table-row table:style-name="ro1">
          <table:table-cell office:value-type="float" office:value="350" table:style-name="ce3">
            <text:p>35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89141026</text:p>
          </table:table-cell>
          <table:table-cell office:value-type="string" table:style-name="ce1">
            <text:p>Jorge Hernández López</text:p>
          </table:table-cell>
          <table:table-cell office:value-type="date" office:date-value="1992-09-27T00:00:00" table:style-name="ce4">
            <text:p>1992-09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3640192</text:p>
          </table:table-cell>
          <table:table-cell office:value-type="string" table:style-name="ce1">
            <text:p>jorge.hernandez350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20T21:03:00" table:style-name="ce5">
            <text:p>2026-04-20 21:03</text:p>
          </table:table-cell>
          <table:table-cell office:value-type="date" office:date-value="2026-05-19T11:03:00" table:style-name="ce6">
            <text:p>2026-05-19 11:03</text:p>
          </table:table-cell>
          <table:table-cell table:number-columns-repeated="16369"/>
        </table:table-row>
        <table:table-row table:style-name="ro1">
          <table:table-cell office:value-type="float" office:value="351" table:style-name="ce3">
            <text:p>35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57693272</text:p>
          </table:table-cell>
          <table:table-cell office:value-type="string" table:style-name="ce1">
            <text:p>Miguel Sánchez Vargas</text:p>
          </table:table-cell>
          <table:table-cell office:value-type="date" office:date-value="2000-05-23T00:00:00" table:style-name="ce4">
            <text:p>2000-05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7154999</text:p>
          </table:table-cell>
          <table:table-cell office:value-type="string" table:style-name="ce1">
            <text:p>miguel.sanchez35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05T22:20:00" table:style-name="ce5">
            <text:p>2026-06-05 22:20</text:p>
          </table:table-cell>
          <table:table-cell office:value-type="date" office:date-value="2026-06-19T02:02:00" table:style-name="ce6">
            <text:p>2026-06-19 02:02</text:p>
          </table:table-cell>
          <table:table-cell table:number-columns-repeated="16369"/>
        </table:table-row>
        <table:table-row table:style-name="ro1">
          <table:table-cell office:value-type="float" office:value="352" table:style-name="ce3">
            <text:p>35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08412327</text:p>
          </table:table-cell>
          <table:table-cell office:value-type="string" table:style-name="ce1">
            <text:p>Santiago Castro Quintero</text:p>
          </table:table-cell>
          <table:table-cell office:value-type="date" office:date-value="1969-06-06T00:00:00" table:style-name="ce4">
            <text:p>1969-06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2349100</text:p>
          </table:table-cell>
          <table:table-cell office:value-type="string" table:style-name="ce1">
            <text:p>santiago.castro352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6-21T09:50:00" table:style-name="ce5">
            <text:p>2026-06-21 09:50</text:p>
          </table:table-cell>
          <table:table-cell office:value-type="date" office:date-value="2026-07-01T23:07:00" table:style-name="ce6">
            <text:p>2026-07-01 23:07</text:p>
          </table:table-cell>
          <table:table-cell table:number-columns-repeated="16369"/>
        </table:table-row>
        <table:table-row table:style-name="ro1">
          <table:table-cell office:value-type="float" office:value="353" table:style-name="ce3">
            <text:p>35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72495913</text:p>
          </table:table-cell>
          <table:table-cell office:value-type="string" table:style-name="ce1">
            <text:p>Alejandro Pérez Quintero</text:p>
          </table:table-cell>
          <table:table-cell office:value-type="date" office:date-value="1960-02-28T00:00:00" table:style-name="ce4">
            <text:p>1960-02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7970959</text:p>
          </table:table-cell>
          <table:table-cell office:value-type="string" table:style-name="ce1">
            <text:p>alejandro.perez353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5-17T11:38:00" table:style-name="ce5">
            <text:p>2026-05-17 11:38</text:p>
          </table:table-cell>
          <table:table-cell office:value-type="date" office:date-value="2026-07-08T14:21:00" table:style-name="ce6">
            <text:p>2026-07-08 14:21</text:p>
          </table:table-cell>
          <table:table-cell table:number-columns-repeated="16369"/>
        </table:table-row>
        <table:table-row table:style-name="ro1">
          <table:table-cell office:value-type="float" office:value="354" table:style-name="ce3">
            <text:p>354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23368680</text:p>
          </table:table-cell>
          <table:table-cell office:value-type="string" table:style-name="ce1">
            <text:p>Luisa Díaz Rodríguez</text:p>
          </table:table-cell>
          <table:table-cell office:value-type="date" office:date-value="1984-10-22T00:00:00" table:style-name="ce4">
            <text:p>1984-10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9606360</text:p>
          </table:table-cell>
          <table:table-cell office:value-type="string" table:style-name="ce1">
            <text:p>luisa.diaz354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22T04:53:00" table:style-name="ce5">
            <text:p>2026-05-22 04:53</text:p>
          </table:table-cell>
          <table:table-cell office:value-type="date" office:date-value="2026-05-31T19:30:00" table:style-name="ce6">
            <text:p>2026-05-31 19:30</text:p>
          </table:table-cell>
          <table:table-cell table:number-columns-repeated="16369"/>
        </table:table-row>
        <table:table-row table:style-name="ro1">
          <table:table-cell office:value-type="float" office:value="355" table:style-name="ce3">
            <text:p>35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78804973</text:p>
          </table:table-cell>
          <table:table-cell office:value-type="string" table:style-name="ce1">
            <text:p>Nicolás Rodríguez Ramírez</text:p>
          </table:table-cell>
          <table:table-cell office:value-type="date" office:date-value="2000-10-10T00:00:00" table:style-name="ce4">
            <text:p>2000-10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4485358</text:p>
          </table:table-cell>
          <table:table-cell office:value-type="string" table:style-name="ce1">
            <text:p>nicolas.rodriguez35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5-06T06:24:00" table:style-name="ce5">
            <text:p>2026-05-06 06:24</text:p>
          </table:table-cell>
          <table:table-cell office:value-type="date" office:date-value="2026-05-07T00:16:00" table:style-name="ce6">
            <text:p>2026-05-07 00:16</text:p>
          </table:table-cell>
          <table:table-cell table:number-columns-repeated="16369"/>
        </table:table-row>
        <table:table-row table:style-name="ro1">
          <table:table-cell office:value-type="float" office:value="356" table:style-name="ce3">
            <text:p>35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55652475</text:p>
          </table:table-cell>
          <table:table-cell office:value-type="string" table:style-name="ce1">
            <text:p>Juan Jiménez Giraldo</text:p>
          </table:table-cell>
          <table:table-cell office:value-type="date" office:date-value="1984-09-04T00:00:00" table:style-name="ce4">
            <text:p>1984-09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3605697</text:p>
          </table:table-cell>
          <table:table-cell office:value-type="string" table:style-name="ce1">
            <text:p>juan.jimenez35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5-23T16:40:00" table:style-name="ce5">
            <text:p>2026-05-23 16:40</text:p>
          </table:table-cell>
          <table:table-cell office:value-type="date" office:date-value="2026-05-25T08:51:00" table:style-name="ce6">
            <text:p>2026-05-25 08:51</text:p>
          </table:table-cell>
          <table:table-cell table:number-columns-repeated="16369"/>
        </table:table-row>
        <table:table-row table:style-name="ro1">
          <table:table-cell office:value-type="float" office:value="357" table:style-name="ce3">
            <text:p>35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6914437</text:p>
          </table:table-cell>
          <table:table-cell office:value-type="string" table:style-name="ce1">
            <text:p>Daniel Muñoz Mendoza</text:p>
          </table:table-cell>
          <table:table-cell office:value-type="date" office:date-value="1988-07-01T00:00:00" table:style-name="ce4">
            <text:p>1988-07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4559930</text:p>
          </table:table-cell>
          <table:table-cell office:value-type="string" table:style-name="ce1">
            <text:p>daniel.munoz357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6-21T19:14:00" table:style-name="ce5">
            <text:p>2026-06-21 19:14</text:p>
          </table:table-cell>
          <table:table-cell office:value-type="date" office:date-value="2026-06-27T08:56:00" table:style-name="ce6">
            <text:p>2026-06-27 08:56</text:p>
          </table:table-cell>
          <table:table-cell table:number-columns-repeated="16369"/>
        </table:table-row>
        <table:table-row table:style-name="ro1">
          <table:table-cell office:value-type="float" office:value="358" table:style-name="ce3">
            <text:p>358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85097666</text:p>
          </table:table-cell>
          <table:table-cell office:value-type="string" table:style-name="ce1">
            <text:p>Santiago Ramírez Mendoza</text:p>
          </table:table-cell>
          <table:table-cell office:value-type="date" office:date-value="2009-08-24T00:00:00" table:style-name="ce4">
            <text:p>2009-08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4785351</text:p>
          </table:table-cell>
          <table:table-cell office:value-type="string" table:style-name="ce1">
            <text:p>santiago.ramirez358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3-20T21:29:00" table:style-name="ce5">
            <text:p>2026-03-20 21:29</text:p>
          </table:table-cell>
          <table:table-cell office:value-type="date" office:date-value="2026-04-21T07:34:00" table:style-name="ce6">
            <text:p>2026-04-21 07:34</text:p>
          </table:table-cell>
          <table:table-cell table:number-columns-repeated="16369"/>
        </table:table-row>
        <table:table-row table:style-name="ro1">
          <table:table-cell office:value-type="float" office:value="359" table:style-name="ce3">
            <text:p>35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21481766</text:p>
          </table:table-cell>
          <table:table-cell office:value-type="string" table:style-name="ce1">
            <text:p>David Ruiz Martínez</text:p>
          </table:table-cell>
          <table:table-cell office:value-type="date" office:date-value="2001-09-19T00:00:00" table:style-name="ce4">
            <text:p>2001-09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4529825</text:p>
          </table:table-cell>
          <table:table-cell office:value-type="string" table:style-name="ce1">
            <text:p>david.ruiz359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04T04:27:00" table:style-name="ce5">
            <text:p>2026-06-04 04:27</text:p>
          </table:table-cell>
          <table:table-cell office:value-type="date" office:date-value="2026-06-22T00:06:00" table:style-name="ce6">
            <text:p>2026-06-22 00:06</text:p>
          </table:table-cell>
          <table:table-cell table:number-columns-repeated="16369"/>
        </table:table-row>
        <table:table-row table:style-name="ro1">
          <table:table-cell office:value-type="float" office:value="360" table:style-name="ce3">
            <text:p>36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7164659</text:p>
          </table:table-cell>
          <table:table-cell office:value-type="string" table:style-name="ce1">
            <text:p>Sebastián Moreno Giraldo</text:p>
          </table:table-cell>
          <table:table-cell office:value-type="date" office:date-value="1982-05-28T00:00:00" table:style-name="ce4">
            <text:p>1982-05-28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027751129</text:p>
          </table:table-cell>
          <table:table-cell office:value-type="string" table:style-name="ce1">
            <text:p>sebastian.moreno360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13T23:14:00" table:style-name="ce5">
            <text:p>2026-05-13 23:14</text:p>
          </table:table-cell>
          <table:table-cell office:value-type="date" office:date-value="2026-06-18T21:48:00" table:style-name="ce6">
            <text:p>2026-06-18 21:48</text:p>
          </table:table-cell>
          <table:table-cell table:number-columns-repeated="16369"/>
        </table:table-row>
        <table:table-row table:style-name="ro1">
          <table:table-cell office:value-type="float" office:value="361" table:style-name="ce3">
            <text:p>361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039263588</text:p>
          </table:table-cell>
          <table:table-cell office:value-type="string" table:style-name="ce1">
            <text:p>Carolina María Ruiz Cárdenas</text:p>
          </table:table-cell>
          <table:table-cell office:value-type="date" office:date-value="2019-04-15T00:00:00" table:style-name="ce4">
            <text:p>2019-04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7860248</text:p>
          </table:table-cell>
          <table:table-cell office:value-type="string" table:style-name="ce1">
            <text:p>carolina.ruiz361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4-06T13:24:00" table:style-name="ce5">
            <text:p>2026-04-06 13:24</text:p>
          </table:table-cell>
          <table:table-cell office:value-type="date" office:date-value="2026-06-30T01:55:00" table:style-name="ce6">
            <text:p>2026-06-30 01:55</text:p>
          </table:table-cell>
          <table:table-cell table:number-columns-repeated="16369"/>
        </table:table-row>
        <table:table-row table:style-name="ro1">
          <table:table-cell office:value-type="float" office:value="362" table:style-name="ce3">
            <text:p>36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0176267</text:p>
          </table:table-cell>
          <table:table-cell office:value-type="string" table:style-name="ce1">
            <text:p>Catalina Hernández Torres</text:p>
          </table:table-cell>
          <table:table-cell office:value-type="date" office:date-value="1943-11-09T00:00:00" table:style-name="ce4">
            <text:p>1943-11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2546803</text:p>
          </table:table-cell>
          <table:table-cell office:value-type="string" table:style-name="ce1">
            <text:p>catalina.hernandez362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23T09:41:00" table:style-name="ce5">
            <text:p>2026-04-23 09:41</text:p>
          </table:table-cell>
          <table:table-cell office:value-type="date" office:date-value="2026-06-26T01:26:00" table:style-name="ce6">
            <text:p>2026-06-26 01:26</text:p>
          </table:table-cell>
          <table:table-cell table:number-columns-repeated="16369"/>
        </table:table-row>
        <table:table-row table:style-name="ro1">
          <table:table-cell office:value-type="float" office:value="363" table:style-name="ce3">
            <text:p>36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15212346</text:p>
          </table:table-cell>
          <table:table-cell office:value-type="string" table:style-name="ce1">
            <text:p>Gabriela Álvarez Valencia</text:p>
          </table:table-cell>
          <table:table-cell office:value-type="date" office:date-value="2003-02-03T00:00:00" table:style-name="ce4">
            <text:p>2003-02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8653443</text:p>
          </table:table-cell>
          <table:table-cell office:value-type="string" table:style-name="ce1">
            <text:p>gabriela.alvarez363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28T18:29:00" table:style-name="ce5">
            <text:p>2026-06-28 18:29</text:p>
          </table:table-cell>
          <table:table-cell office:value-type="date" office:date-value="2026-07-02T18:57:00" table:style-name="ce6">
            <text:p>2026-07-02 18:57</text:p>
          </table:table-cell>
          <table:table-cell table:number-columns-repeated="16369"/>
        </table:table-row>
        <table:table-row table:style-name="ro1">
          <table:table-cell office:value-type="float" office:value="364" table:style-name="ce3">
            <text:p>36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77444145</text:p>
          </table:table-cell>
          <table:table-cell office:value-type="string" table:style-name="ce1">
            <text:p>David Ospina Quintero</text:p>
          </table:table-cell>
          <table:table-cell office:value-type="date" office:date-value="1957-01-03T00:00:00" table:style-name="ce4">
            <text:p>1957-01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7994039</text:p>
          </table:table-cell>
          <table:table-cell office:value-type="string" table:style-name="ce1">
            <text:p>david.ospina36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09T01:03:00" table:style-name="ce5">
            <text:p>2026-05-09 01:03</text:p>
          </table:table-cell>
          <table:table-cell office:value-type="date" office:date-value="2026-06-21T06:58:00" table:style-name="ce6">
            <text:p>2026-06-21 06:58</text:p>
          </table:table-cell>
          <table:table-cell table:number-columns-repeated="16369"/>
        </table:table-row>
        <table:table-row table:style-name="ro1">
          <table:table-cell office:value-type="float" office:value="365" table:style-name="ce3">
            <text:p>36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1906735</text:p>
          </table:table-cell>
          <table:table-cell office:value-type="string" table:style-name="ce1">
            <text:p>Carlos Torres González</text:p>
          </table:table-cell>
          <table:table-cell office:value-type="date" office:date-value="1974-04-06T00:00:00" table:style-name="ce4">
            <text:p>1974-04-06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3115037731</text:p>
          </table:table-cell>
          <table:table-cell office:value-type="string" table:style-name="ce1">
            <text:p>carlos.torres365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15T12:30:00" table:style-name="ce5">
            <text:p>2026-03-15 12:30</text:p>
          </table:table-cell>
          <table:table-cell office:value-type="date" office:date-value="2026-06-02T16:55:00" table:style-name="ce6">
            <text:p>2026-06-02 16:55</text:p>
          </table:table-cell>
          <table:table-cell table:number-columns-repeated="16369"/>
        </table:table-row>
        <table:table-row table:style-name="ro1">
          <table:table-cell office:value-type="float" office:value="366" table:style-name="ce3">
            <text:p>36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51588385</text:p>
          </table:table-cell>
          <table:table-cell office:value-type="string" table:style-name="ce1">
            <text:p>Felipe Jorge Castro Ruiz</text:p>
          </table:table-cell>
          <table:table-cell office:value-type="date" office:date-value="1979-02-08T00:00:00" table:style-name="ce4">
            <text:p>1979-02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7701173</text:p>
          </table:table-cell>
          <table:table-cell office:value-type="string" table:style-name="ce1">
            <text:p>felipe.castro366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5-19T08:22:00" table:style-name="ce5">
            <text:p>2026-05-19 08:22</text:p>
          </table:table-cell>
          <table:table-cell office:value-type="date" office:date-value="2026-05-25T21:03:00" table:style-name="ce6">
            <text:p>2026-05-25 21:03</text:p>
          </table:table-cell>
          <table:table-cell table:number-columns-repeated="16369"/>
        </table:table-row>
        <table:table-row table:style-name="ro1">
          <table:table-cell office:value-type="float" office:value="367" table:style-name="ce3">
            <text:p>36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88058070</text:p>
          </table:table-cell>
          <table:table-cell office:value-type="string" table:style-name="ce1">
            <text:p>Daniela Díaz Martínez</text:p>
          </table:table-cell>
          <table:table-cell office:value-type="date" office:date-value="1966-06-18T00:00:00" table:style-name="ce4">
            <text:p>1966-06-1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1824259</text:p>
          </table:table-cell>
          <table:table-cell office:value-type="string" table:style-name="ce1">
            <text:p>daniela.diaz36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5-08T23:36:00" table:style-name="ce5">
            <text:p>2026-05-08 23:36</text:p>
          </table:table-cell>
          <table:table-cell office:value-type="date" office:date-value="2026-06-23T15:04:00" table:style-name="ce6">
            <text:p>2026-06-23 15:04</text:p>
          </table:table-cell>
          <table:table-cell table:number-columns-repeated="16369"/>
        </table:table-row>
        <table:table-row table:style-name="ro1">
          <table:table-cell office:value-type="float" office:value="368" table:style-name="ce3">
            <text:p>36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11833430</text:p>
          </table:table-cell>
          <table:table-cell office:value-type="string" table:style-name="ce1">
            <text:p>Juliana Silva Ospina</text:p>
          </table:table-cell>
          <table:table-cell office:value-type="date" office:date-value="1986-08-25T00:00:00" table:style-name="ce4">
            <text:p>1986-08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5294569</text:p>
          </table:table-cell>
          <table:table-cell office:value-type="string" table:style-name="ce1">
            <text:p>juliana.silva368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01T22:20:00" table:style-name="ce5">
            <text:p>2026-04-01 22:20</text:p>
          </table:table-cell>
          <table:table-cell office:value-type="date" office:date-value="2026-04-23T17:10:00" table:style-name="ce6">
            <text:p>2026-04-23 17:10</text:p>
          </table:table-cell>
          <table:table-cell table:number-columns-repeated="16369"/>
        </table:table-row>
        <table:table-row table:style-name="ro1">
          <table:table-cell office:value-type="float" office:value="369" table:style-name="ce3">
            <text:p>36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155002</text:p>
          </table:table-cell>
          <table:table-cell office:value-type="string" table:style-name="ce1">
            <text:p>Sara Álvarez Quintero</text:p>
          </table:table-cell>
          <table:table-cell office:value-type="date" office:date-value="1975-07-16T00:00:00" table:style-name="ce4">
            <text:p>1975-07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9265662</text:p>
          </table:table-cell>
          <table:table-cell office:value-type="string" table:style-name="ce1">
            <text:p>sara.alvarez369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3-23T14:08:00" table:style-name="ce5">
            <text:p>2026-03-23 14:08</text:p>
          </table:table-cell>
          <table:table-cell office:value-type="date" office:date-value="2026-05-17T06:56:00" table:style-name="ce6">
            <text:p>2026-05-17 06:56</text:p>
          </table:table-cell>
          <table:table-cell table:number-columns-repeated="16369"/>
        </table:table-row>
        <table:table-row table:style-name="ro1">
          <table:table-cell office:value-type="float" office:value="370" table:style-name="ce3">
            <text:p>370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293336284</text:p>
          </table:table-cell>
          <table:table-cell office:value-type="string" table:style-name="ce1">
            <text:p>Sebastián García Cárdenas</text:p>
          </table:table-cell>
          <table:table-cell office:value-type="date" office:date-value="1969-04-01T00:00:00" table:style-name="ce4">
            <text:p>1969-04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1857763</text:p>
          </table:table-cell>
          <table:table-cell office:value-type="string" table:style-name="ce1">
            <text:p>sebastian.garcia370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08T23:03:00" table:style-name="ce5">
            <text:p>2026-06-08 23:03</text:p>
          </table:table-cell>
          <table:table-cell office:value-type="date" office:date-value="2026-06-24T11:10:00" table:style-name="ce6">
            <text:p>2026-06-24 11:10</text:p>
          </table:table-cell>
          <table:table-cell table:number-columns-repeated="16369"/>
        </table:table-row>
        <table:table-row table:style-name="ro1">
          <table:table-cell office:value-type="float" office:value="371" table:style-name="ce3">
            <text:p>37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9398990</text:p>
          </table:table-cell>
          <table:table-cell office:value-type="string" table:style-name="ce1">
            <text:p>Laura Rodríguez Muñoz</text:p>
          </table:table-cell>
          <table:table-cell office:value-type="date" office:date-value="1997-06-18T00:00:00" table:style-name="ce4">
            <text:p>1997-06-1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1177570</text:p>
          </table:table-cell>
          <table:table-cell office:value-type="string" table:style-name="ce1">
            <text:p>laura.rodriguez371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28T20:49:00" table:style-name="ce5">
            <text:p>2026-03-28 20:49</text:p>
          </table:table-cell>
          <table:table-cell office:value-type="date" office:date-value="2026-06-06T14:11:00" table:style-name="ce6">
            <text:p>2026-06-06 14:11</text:p>
          </table:table-cell>
          <table:table-cell table:number-columns-repeated="16369"/>
        </table:table-row>
        <table:table-row table:style-name="ro1">
          <table:table-cell office:value-type="float" office:value="372" table:style-name="ce3">
            <text:p>372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764700522</text:p>
          </table:table-cell>
          <table:table-cell office:value-type="string" table:style-name="ce1">
            <text:p>Diana Luisa Hernández Cárdenas</text:p>
          </table:table-cell>
          <table:table-cell office:value-type="date" office:date-value="1993-11-25T00:00:00" table:style-name="ce4">
            <text:p>1993-11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1945211</text:p>
          </table:table-cell>
          <table:table-cell office:value-type="string" table:style-name="ce1">
            <text:p>diana.hernandez372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21T17:37:00" table:style-name="ce5">
            <text:p>2026-04-21 17:37</text:p>
          </table:table-cell>
          <table:table-cell office:value-type="date" office:date-value="2026-06-11T12:34:00" table:style-name="ce6">
            <text:p>2026-06-11 12:34</text:p>
          </table:table-cell>
          <table:table-cell table:number-columns-repeated="16369"/>
        </table:table-row>
        <table:table-row table:style-name="ro1">
          <table:table-cell office:value-type="float" office:value="373" table:style-name="ce3">
            <text:p>37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2367928</text:p>
          </table:table-cell>
          <table:table-cell office:value-type="string" table:style-name="ce1">
            <text:p>Andrés Castaño Ramírez</text:p>
          </table:table-cell>
          <table:table-cell office:value-type="date" office:date-value="1964-12-18T00:00:00" table:style-name="ce4">
            <text:p>1964-12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3606034</text:p>
          </table:table-cell>
          <table:table-cell office:value-type="string" table:style-name="ce1">
            <text:p>andres.castano373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3-21T14:52:00" table:style-name="ce5">
            <text:p>2026-03-21 14:52</text:p>
          </table:table-cell>
          <table:table-cell office:value-type="date" office:date-value="2026-03-30T15:31:00" table:style-name="ce6">
            <text:p>2026-03-30 15:31</text:p>
          </table:table-cell>
          <table:table-cell table:number-columns-repeated="16369"/>
        </table:table-row>
        <table:table-row table:style-name="ro1">
          <table:table-cell office:value-type="float" office:value="374" table:style-name="ce3">
            <text:p>37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79508391</text:p>
          </table:table-cell>
          <table:table-cell office:value-type="string" table:style-name="ce1">
            <text:p>Daniel Giraldo Ortiz</text:p>
          </table:table-cell>
          <table:table-cell office:value-type="date" office:date-value="1982-02-06T00:00:00" table:style-name="ce4">
            <text:p>1982-02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9087509</text:p>
          </table:table-cell>
          <table:table-cell office:value-type="string" table:style-name="ce1">
            <text:p>daniel.giraldo374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15T07:28:00" table:style-name="ce5">
            <text:p>2026-05-15 07:28</text:p>
          </table:table-cell>
          <table:table-cell office:value-type="date" office:date-value="2026-06-06T05:18:00" table:style-name="ce6">
            <text:p>2026-06-06 05:18</text:p>
          </table:table-cell>
          <table:table-cell table:number-columns-repeated="16369"/>
        </table:table-row>
        <table:table-row table:style-name="ro1">
          <table:table-cell office:value-type="float" office:value="375" table:style-name="ce3">
            <text:p>37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2457209</text:p>
          </table:table-cell>
          <table:table-cell office:value-type="string" table:style-name="ce1">
            <text:p>Alejandra Moreno Martínez</text:p>
          </table:table-cell>
          <table:table-cell office:value-type="date" office:date-value="1999-08-15T00:00:00" table:style-name="ce4">
            <text:p>1999-08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5309177</text:p>
          </table:table-cell>
          <table:table-cell office:value-type="string" table:style-name="ce1">
            <text:p>alejandra.moreno375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16T01:28:00" table:style-name="ce5">
            <text:p>2026-05-16 01:28</text:p>
          </table:table-cell>
          <table:table-cell office:value-type="date" office:date-value="2026-06-05T19:48:00" table:style-name="ce6">
            <text:p>2026-06-05 19:48</text:p>
          </table:table-cell>
          <table:table-cell table:number-columns-repeated="16369"/>
        </table:table-row>
        <table:table-row table:style-name="ro1">
          <table:table-cell office:value-type="float" office:value="376" table:style-name="ce3">
            <text:p>376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681298369</text:p>
          </table:table-cell>
          <table:table-cell office:value-type="string" table:style-name="ce1">
            <text:p>Laura Torres Hernández</text:p>
          </table:table-cell>
          <table:table-cell office:value-type="date" office:date-value="1995-07-11T00:00:00" table:style-name="ce4">
            <text:p>1995-07-1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6306645</text:p>
          </table:table-cell>
          <table:table-cell office:value-type="string" table:style-name="ce1">
            <text:p>laura.torres37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21T15:35:00" table:style-name="ce5">
            <text:p>2026-06-21 15:35</text:p>
          </table:table-cell>
          <table:table-cell office:value-type="date" office:date-value="2026-07-07T16:08:00" table:style-name="ce6">
            <text:p>2026-07-07 16:08</text:p>
          </table:table-cell>
          <table:table-cell table:number-columns-repeated="16369"/>
        </table:table-row>
        <table:table-row table:style-name="ro1">
          <table:table-cell office:value-type="float" office:value="377" table:style-name="ce3">
            <text:p>37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55171454</text:p>
          </table:table-cell>
          <table:table-cell office:value-type="string" table:style-name="ce1">
            <text:p>Andrea López Torres</text:p>
          </table:table-cell>
          <table:table-cell office:value-type="date" office:date-value="1972-09-24T00:00:00" table:style-name="ce4">
            <text:p>1972-09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9931276</text:p>
          </table:table-cell>
          <table:table-cell office:value-type="string" table:style-name="ce1">
            <text:p>andrea.lopez377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7-09T01:24:00" table:style-name="ce5">
            <text:p>2026-07-09 01:24</text:p>
          </table:table-cell>
          <table:table-cell office:value-type="date" office:date-value="2026-07-09T21:12:00" table:style-name="ce6">
            <text:p>2026-07-09 21:12</text:p>
          </table:table-cell>
          <table:table-cell table:number-columns-repeated="16369"/>
        </table:table-row>
        <table:table-row table:style-name="ro1">
          <table:table-cell office:value-type="float" office:value="378" table:style-name="ce3">
            <text:p>37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2024343</text:p>
          </table:table-cell>
          <table:table-cell office:value-type="string" table:style-name="ce1">
            <text:p>Cristian Ruiz Valencia</text:p>
          </table:table-cell>
          <table:table-cell office:value-type="date" office:date-value="1972-10-14T00:00:00" table:style-name="ce4">
            <text:p>1972-10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6293065</text:p>
          </table:table-cell>
          <table:table-cell office:value-type="string" table:style-name="ce1">
            <text:p>cristian.ruiz378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5-17T12:23:00" table:style-name="ce5">
            <text:p>2026-05-17 12:23</text:p>
          </table:table-cell>
          <table:table-cell office:value-type="date" office:date-value="2026-06-07T00:28:00" table:style-name="ce6">
            <text:p>2026-06-07 00:28</text:p>
          </table:table-cell>
          <table:table-cell table:number-columns-repeated="16369"/>
        </table:table-row>
        <table:table-row table:style-name="ro1">
          <table:table-cell office:value-type="float" office:value="379" table:style-name="ce3">
            <text:p>37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9956001</text:p>
          </table:table-cell>
          <table:table-cell office:value-type="string" table:style-name="ce1">
            <text:p>Camila Ana Jiménez Martínez</text:p>
          </table:table-cell>
          <table:table-cell office:value-type="date" office:date-value="2005-12-08T00:00:00" table:style-name="ce4">
            <text:p>2005-12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2473963</text:p>
          </table:table-cell>
          <table:table-cell office:value-type="string" table:style-name="ce1">
            <text:p>camila.jimenez379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6-11T23:03:00" table:style-name="ce5">
            <text:p>2026-06-11 23:03</text:p>
          </table:table-cell>
          <table:table-cell office:value-type="date" office:date-value="2026-07-04T14:23:00" table:style-name="ce6">
            <text:p>2026-07-04 14:23</text:p>
          </table:table-cell>
          <table:table-cell table:number-columns-repeated="16369"/>
        </table:table-row>
        <table:table-row table:style-name="ro1">
          <table:table-cell office:value-type="float" office:value="380" table:style-name="ce3">
            <text:p>38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0021690</text:p>
          </table:table-cell>
          <table:table-cell office:value-type="string" table:style-name="ce1">
            <text:p>Laura Alejandra López Rodríguez</text:p>
          </table:table-cell>
          <table:table-cell office:value-type="date" office:date-value="1998-04-09T00:00:00" table:style-name="ce4">
            <text:p>1998-04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8520004</text:p>
          </table:table-cell>
          <table:table-cell office:value-type="string" table:style-name="ce1">
            <text:p>laura.lopez380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05T20:43:00" table:style-name="ce5">
            <text:p>2026-04-05 20:43</text:p>
          </table:table-cell>
          <table:table-cell office:value-type="date" office:date-value="2026-07-08T11:02:00" table:style-name="ce6">
            <text:p>2026-07-08 11:02</text:p>
          </table:table-cell>
          <table:table-cell table:number-columns-repeated="16369"/>
        </table:table-row>
        <table:table-row table:style-name="ro1">
          <table:table-cell office:value-type="float" office:value="381" table:style-name="ce3">
            <text:p>381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961578502</text:p>
          </table:table-cell>
          <table:table-cell office:value-type="string" table:style-name="ce1">
            <text:p>Cristian González Castro</text:p>
          </table:table-cell>
          <table:table-cell office:value-type="date" office:date-value="2008-07-18T00:00:00" table:style-name="ce4">
            <text:p>2008-07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8479832</text:p>
          </table:table-cell>
          <table:table-cell office:value-type="string" table:style-name="ce1">
            <text:p>cristian.gonzalez381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4-02T21:08:00" table:style-name="ce5">
            <text:p>2026-04-02 21:08</text:p>
          </table:table-cell>
          <table:table-cell office:value-type="date" office:date-value="2026-04-11T11:19:00" table:style-name="ce6">
            <text:p>2026-04-11 11:19</text:p>
          </table:table-cell>
          <table:table-cell table:number-columns-repeated="16369"/>
        </table:table-row>
        <table:table-row table:style-name="ro1">
          <table:table-cell office:value-type="float" office:value="382" table:style-name="ce3">
            <text:p>38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0140291</text:p>
          </table:table-cell>
          <table:table-cell office:value-type="string" table:style-name="ce1">
            <text:p>Samuel Ramírez Álvarez</text:p>
          </table:table-cell>
          <table:table-cell office:value-type="date" office:date-value="1999-12-10T00:00:00" table:style-name="ce4">
            <text:p>1999-12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1054919</text:p>
          </table:table-cell>
          <table:table-cell office:value-type="string" table:style-name="ce1">
            <text:p>samuel.ramirez38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29T12:33:00" table:style-name="ce5">
            <text:p>2026-05-29 12:33</text:p>
          </table:table-cell>
          <table:table-cell office:value-type="date" office:date-value="2026-06-27T02:14:00" table:style-name="ce6">
            <text:p>2026-06-27 02:14</text:p>
          </table:table-cell>
          <table:table-cell table:number-columns-repeated="16369"/>
        </table:table-row>
        <table:table-row table:style-name="ro1">
          <table:table-cell office:value-type="float" office:value="383" table:style-name="ce3">
            <text:p>38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3785491</text:p>
          </table:table-cell>
          <table:table-cell office:value-type="string" table:style-name="ce1">
            <text:p>María Cárdenas Moreno</text:p>
          </table:table-cell>
          <table:table-cell office:value-type="date" office:date-value="1966-12-03T00:00:00" table:style-name="ce4">
            <text:p>1966-12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8112576</text:p>
          </table:table-cell>
          <table:table-cell office:value-type="string" table:style-name="ce1">
            <text:p>maria.cardenas38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19T11:31:00" table:style-name="ce5">
            <text:p>2026-06-19 11:31</text:p>
          </table:table-cell>
          <table:table-cell office:value-type="date" office:date-value="2026-07-02T01:01:00" table:style-name="ce6">
            <text:p>2026-07-02 01:01</text:p>
          </table:table-cell>
          <table:table-cell table:number-columns-repeated="16369"/>
        </table:table-row>
        <table:table-row table:style-name="ro1">
          <table:table-cell office:value-type="float" office:value="384" table:style-name="ce3">
            <text:p>38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49302590</text:p>
          </table:table-cell>
          <table:table-cell office:value-type="string" table:style-name="ce1">
            <text:p>Camila Silva Castro</text:p>
          </table:table-cell>
          <table:table-cell office:value-type="date" office:date-value="1951-08-16T00:00:00" table:style-name="ce4">
            <text:p>1951-08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6212026</text:p>
          </table:table-cell>
          <table:table-cell office:value-type="string" table:style-name="ce1">
            <text:p>camila.silva384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14T20:21:00" table:style-name="ce5">
            <text:p>2026-04-14 20:21</text:p>
          </table:table-cell>
          <table:table-cell office:value-type="date" office:date-value="2026-05-15T02:03:00" table:style-name="ce6">
            <text:p>2026-05-15 02:03</text:p>
          </table:table-cell>
          <table:table-cell table:number-columns-repeated="16369"/>
        </table:table-row>
        <table:table-row table:style-name="ro1">
          <table:table-cell office:value-type="float" office:value="385" table:style-name="ce3">
            <text:p>38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82652501</text:p>
          </table:table-cell>
          <table:table-cell office:value-type="string" table:style-name="ce1">
            <text:p>Paula González Torres</text:p>
          </table:table-cell>
          <table:table-cell office:value-type="date" office:date-value="1964-09-08T00:00:00" table:style-name="ce4">
            <text:p>1964-09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2519677</text:p>
          </table:table-cell>
          <table:table-cell office:value-type="string" table:style-name="ce1">
            <text:p>paula.gonzalez38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18T18:20:00" table:style-name="ce5">
            <text:p>2026-04-18 18:20</text:p>
          </table:table-cell>
          <table:table-cell office:value-type="date" office:date-value="2026-05-04T09:11:00" table:style-name="ce6">
            <text:p>2026-05-04 09:11</text:p>
          </table:table-cell>
          <table:table-cell table:number-columns-repeated="16369"/>
        </table:table-row>
        <table:table-row table:style-name="ro1">
          <table:table-cell office:value-type="float" office:value="386" table:style-name="ce3">
            <text:p>386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005843636</text:p>
          </table:table-cell>
          <table:table-cell office:value-type="string" table:style-name="ce1">
            <text:p>Paula Sofía Hernández González</text:p>
          </table:table-cell>
          <table:table-cell office:value-type="date" office:date-value="2012-01-30T00:00:00" table:style-name="ce4">
            <text:p>2012-01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2876878</text:p>
          </table:table-cell>
          <table:table-cell office:value-type="string" table:style-name="ce1">
            <text:p>paula.hernandez386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10T17:02:00" table:style-name="ce5">
            <text:p>2026-06-10 17:02</text:p>
          </table:table-cell>
          <table:table-cell office:value-type="date" office:date-value="2026-06-27T05:59:00" table:style-name="ce6">
            <text:p>2026-06-27 05:59</text:p>
          </table:table-cell>
          <table:table-cell table:number-columns-repeated="16369"/>
        </table:table-row>
        <table:table-row table:style-name="ro1">
          <table:table-cell office:value-type="float" office:value="387" table:style-name="ce3">
            <text:p>38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2183956</text:p>
          </table:table-cell>
          <table:table-cell office:value-type="string" table:style-name="ce1">
            <text:p>Daniela Pérez Hernández</text:p>
          </table:table-cell>
          <table:table-cell office:value-type="date" office:date-value="1989-05-28T00:00:00" table:style-name="ce4">
            <text:p>1989-05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7301488</text:p>
          </table:table-cell>
          <table:table-cell office:value-type="string" table:style-name="ce1">
            <text:p>daniela.perez387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09T16:03:00" table:style-name="ce5">
            <text:p>2026-04-09 16:03</text:p>
          </table:table-cell>
          <table:table-cell office:value-type="date" office:date-value="2026-07-07T18:03:00" table:style-name="ce6">
            <text:p>2026-07-07 18:03</text:p>
          </table:table-cell>
          <table:table-cell table:number-columns-repeated="16369"/>
        </table:table-row>
        <table:table-row table:style-name="ro1">
          <table:table-cell office:value-type="float" office:value="388" table:style-name="ce3">
            <text:p>38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9727577</text:p>
          </table:table-cell>
          <table:table-cell office:value-type="string" table:style-name="ce1">
            <text:p>Paula Ortiz Martínez</text:p>
          </table:table-cell>
          <table:table-cell office:value-type="date" office:date-value="1993-01-12T00:00:00" table:style-name="ce4">
            <text:p>1993-01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2305266</text:p>
          </table:table-cell>
          <table:table-cell office:value-type="string" table:style-name="ce1">
            <text:p>paula.ortiz38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03T21:05:00" table:style-name="ce5">
            <text:p>2026-05-03 21:05</text:p>
          </table:table-cell>
          <table:table-cell office:value-type="date" office:date-value="2026-06-05T08:07:00" table:style-name="ce6">
            <text:p>2026-06-05 08:07</text:p>
          </table:table-cell>
          <table:table-cell table:number-columns-repeated="16369"/>
        </table:table-row>
        <table:table-row table:style-name="ro1">
          <table:table-cell office:value-type="float" office:value="389" table:style-name="ce3">
            <text:p>38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73766153</text:p>
          </table:table-cell>
          <table:table-cell office:value-type="string" table:style-name="ce1">
            <text:p>Santiago Castro Muñoz</text:p>
          </table:table-cell>
          <table:table-cell office:value-type="date" office:date-value="1983-11-15T00:00:00" table:style-name="ce4">
            <text:p>1983-11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7863431</text:p>
          </table:table-cell>
          <table:table-cell office:value-type="string" table:style-name="ce1">
            <text:p>santiago.castro389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6-02T22:30:00" table:style-name="ce5">
            <text:p>2026-06-02 22:30</text:p>
          </table:table-cell>
          <table:table-cell office:value-type="date" office:date-value="2026-07-03T01:43:00" table:style-name="ce6">
            <text:p>2026-07-03 01:43</text:p>
          </table:table-cell>
          <table:table-cell table:number-columns-repeated="16369"/>
        </table:table-row>
        <table:table-row table:style-name="ro1">
          <table:table-cell office:value-type="float" office:value="390" table:style-name="ce3">
            <text:p>39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12105036</text:p>
          </table:table-cell>
          <table:table-cell office:value-type="string" table:style-name="ce1">
            <text:p>Catalina Castaño García</text:p>
          </table:table-cell>
          <table:table-cell office:value-type="date" office:date-value="1986-10-25T00:00:00" table:style-name="ce4">
            <text:p>1986-10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9428921</text:p>
          </table:table-cell>
          <table:table-cell office:value-type="string" table:style-name="ce1">
            <text:p>catalina.castano390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6-16T03:44:00" table:style-name="ce5">
            <text:p>2026-06-16 03:44</text:p>
          </table:table-cell>
          <table:table-cell office:value-type="date" office:date-value="2026-06-26T15:34:00" table:style-name="ce6">
            <text:p>2026-06-26 15:34</text:p>
          </table:table-cell>
          <table:table-cell table:number-columns-repeated="16369"/>
        </table:table-row>
        <table:table-row table:style-name="ro1">
          <table:table-cell office:value-type="float" office:value="391" table:style-name="ce3">
            <text:p>39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516654</text:p>
          </table:table-cell>
          <table:table-cell office:value-type="string" table:style-name="ce1">
            <text:p>Andrés Rodríguez Restrepo</text:p>
          </table:table-cell>
          <table:table-cell office:value-type="date" office:date-value="1980-05-08T00:00:00" table:style-name="ce4">
            <text:p>1980-05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6705441</text:p>
          </table:table-cell>
          <table:table-cell office:value-type="string" table:style-name="ce1">
            <text:p>andres.rodriguez39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3-29T07:19:00" table:style-name="ce5">
            <text:p>2026-03-29 07:19</text:p>
          </table:table-cell>
          <table:table-cell office:value-type="date" office:date-value="2026-04-16T03:11:00" table:style-name="ce6">
            <text:p>2026-04-16 03:11</text:p>
          </table:table-cell>
          <table:table-cell table:number-columns-repeated="16369"/>
        </table:table-row>
        <table:table-row table:style-name="ro1">
          <table:table-cell office:value-type="float" office:value="392" table:style-name="ce3">
            <text:p>39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6138100</text:p>
          </table:table-cell>
          <table:table-cell office:value-type="string" table:style-name="ce1">
            <text:p>David Cárdenas Valencia</text:p>
          </table:table-cell>
          <table:table-cell office:value-type="date" office:date-value="1991-01-13T00:00:00" table:style-name="ce4">
            <text:p>1991-01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8881722</text:p>
          </table:table-cell>
          <table:table-cell office:value-type="string" table:style-name="ce1">
            <text:p>david.cardenas39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30T13:20:00" table:style-name="ce5">
            <text:p>2026-04-30 13:20</text:p>
          </table:table-cell>
          <table:table-cell office:value-type="date" office:date-value="2026-05-04T03:17:00" table:style-name="ce6">
            <text:p>2026-05-04 03:17</text:p>
          </table:table-cell>
          <table:table-cell table:number-columns-repeated="16369"/>
        </table:table-row>
        <table:table-row table:style-name="ro1">
          <table:table-cell office:value-type="float" office:value="393" table:style-name="ce3">
            <text:p>39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16033628</text:p>
          </table:table-cell>
          <table:table-cell office:value-type="string" table:style-name="ce1">
            <text:p>Daniela Quintero García</text:p>
          </table:table-cell>
          <table:table-cell office:value-type="date" office:date-value="1990-04-11T00:00:00" table:style-name="ce4">
            <text:p>1990-04-1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1900006</text:p>
          </table:table-cell>
          <table:table-cell office:value-type="string" table:style-name="ce1">
            <text:p>daniela.quintero393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5-10T07:03:00" table:style-name="ce5">
            <text:p>2026-05-10 07:03</text:p>
          </table:table-cell>
          <table:table-cell office:value-type="date" office:date-value="2026-05-26T01:21:00" table:style-name="ce6">
            <text:p>2026-05-26 01:21</text:p>
          </table:table-cell>
          <table:table-cell table:number-columns-repeated="16369"/>
        </table:table-row>
        <table:table-row table:style-name="ro1">
          <table:table-cell office:value-type="float" office:value="394" table:style-name="ce3">
            <text:p>39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75839558</text:p>
          </table:table-cell>
          <table:table-cell office:value-type="string" table:style-name="ce1">
            <text:p>Luisa Ortiz Rojas</text:p>
          </table:table-cell>
          <table:table-cell office:value-type="date" office:date-value="1959-02-17T00:00:00" table:style-name="ce4">
            <text:p>1959-02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8002022</text:p>
          </table:table-cell>
          <table:table-cell office:value-type="string" table:style-name="ce1">
            <text:p>luisa.ortiz39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5-29T15:52:00" table:style-name="ce5">
            <text:p>2026-05-29 15:52</text:p>
          </table:table-cell>
          <table:table-cell office:value-type="date" office:date-value="2026-06-15T01:51:00" table:style-name="ce6">
            <text:p>2026-06-15 01:51</text:p>
          </table:table-cell>
          <table:table-cell table:number-columns-repeated="16369"/>
        </table:table-row>
        <table:table-row table:style-name="ro1">
          <table:table-cell office:value-type="float" office:value="395" table:style-name="ce3">
            <text:p>39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8907890</text:p>
          </table:table-cell>
          <table:table-cell office:value-type="string" table:style-name="ce1">
            <text:p>Diana Castaño Ruiz</text:p>
          </table:table-cell>
          <table:table-cell office:value-type="date" office:date-value="1998-07-05T00:00:00" table:style-name="ce4">
            <text:p>1998-07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7027247</text:p>
          </table:table-cell>
          <table:table-cell office:value-type="string" table:style-name="ce1">
            <text:p>diana.castano39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3-23T10:33:00" table:style-name="ce5">
            <text:p>2026-03-23 10:33</text:p>
          </table:table-cell>
          <table:table-cell office:value-type="date" office:date-value="2026-05-08T00:42:00" table:style-name="ce6">
            <text:p>2026-05-08 00:42</text:p>
          </table:table-cell>
          <table:table-cell table:number-columns-repeated="16369"/>
        </table:table-row>
        <table:table-row table:style-name="ro1">
          <table:table-cell office:value-type="float" office:value="396" table:style-name="ce3">
            <text:p>39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200247</text:p>
          </table:table-cell>
          <table:table-cell office:value-type="string" table:style-name="ce1">
            <text:p>Juliana Castaño Díaz</text:p>
          </table:table-cell>
          <table:table-cell office:value-type="date" office:date-value="2001-10-25T00:00:00" table:style-name="ce4">
            <text:p>2001-10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2195565</text:p>
          </table:table-cell>
          <table:table-cell office:value-type="string" table:style-name="ce1">
            <text:p>juliana.castano396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29T03:55:00" table:style-name="ce5">
            <text:p>2026-04-29 03:55</text:p>
          </table:table-cell>
          <table:table-cell office:value-type="date" office:date-value="2026-06-04T09:06:00" table:style-name="ce6">
            <text:p>2026-06-04 09:06</text:p>
          </table:table-cell>
          <table:table-cell table:number-columns-repeated="16369"/>
        </table:table-row>
        <table:table-row table:style-name="ro1">
          <table:table-cell office:value-type="float" office:value="397" table:style-name="ce3">
            <text:p>39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2381147</text:p>
          </table:table-cell>
          <table:table-cell office:value-type="string" table:style-name="ce1">
            <text:p>Alejandro Mendoza Hernández</text:p>
          </table:table-cell>
          <table:table-cell office:value-type="date" office:date-value="1982-04-28T00:00:00" table:style-name="ce4">
            <text:p>1982-04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7213068</text:p>
          </table:table-cell>
          <table:table-cell office:value-type="string" table:style-name="ce1">
            <text:p>alejandro.mendoza397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30T16:56:00" table:style-name="ce5">
            <text:p>2026-06-30 16:56</text:p>
          </table:table-cell>
          <table:table-cell office:value-type="date" office:date-value="2026-07-09T01:13:00" table:style-name="ce6">
            <text:p>2026-07-09 01:13</text:p>
          </table:table-cell>
          <table:table-cell table:number-columns-repeated="16369"/>
        </table:table-row>
        <table:table-row table:style-name="ro1">
          <table:table-cell office:value-type="float" office:value="398" table:style-name="ce3">
            <text:p>39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0468175</text:p>
          </table:table-cell>
          <table:table-cell office:value-type="string" table:style-name="ce1">
            <text:p>Miguel Pérez Castro</text:p>
          </table:table-cell>
          <table:table-cell office:value-type="date" office:date-value="1959-10-25T00:00:00" table:style-name="ce4">
            <text:p>1959-10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8484829</text:p>
          </table:table-cell>
          <table:table-cell office:value-type="string" table:style-name="ce1">
            <text:p>miguel.perez398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3-31T10:39:00" table:style-name="ce5">
            <text:p>2026-03-31 10:39</text:p>
          </table:table-cell>
          <table:table-cell office:value-type="date" office:date-value="2026-05-08T11:04:00" table:style-name="ce6">
            <text:p>2026-05-08 11:04</text:p>
          </table:table-cell>
          <table:table-cell table:number-columns-repeated="16369"/>
        </table:table-row>
        <table:table-row table:style-name="ro1">
          <table:table-cell office:value-type="float" office:value="399" table:style-name="ce3">
            <text:p>39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40823790</text:p>
          </table:table-cell>
          <table:table-cell office:value-type="string" table:style-name="ce1">
            <text:p>Andrea Ospina Restrepo</text:p>
          </table:table-cell>
          <table:table-cell office:value-type="date" office:date-value="1970-12-05T00:00:00" table:style-name="ce4">
            <text:p>1970-12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7797230</text:p>
          </table:table-cell>
          <table:table-cell office:value-type="string" table:style-name="ce1">
            <text:p>andrea.ospina39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13T23:44:00" table:style-name="ce5">
            <text:p>2026-06-13 23:44</text:p>
          </table:table-cell>
          <table:table-cell office:value-type="date" office:date-value="2026-06-17T00:21:00" table:style-name="ce6">
            <text:p>2026-06-17 00:21</text:p>
          </table:table-cell>
          <table:table-cell table:number-columns-repeated="16369"/>
        </table:table-row>
        <table:table-row table:style-name="ro1">
          <table:table-cell office:value-type="float" office:value="400" table:style-name="ce3">
            <text:p>40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04748499</text:p>
          </table:table-cell>
          <table:table-cell office:value-type="string" table:style-name="ce1">
            <text:p>Daniel Jiménez Muñoz</text:p>
          </table:table-cell>
          <table:table-cell office:value-type="date" office:date-value="1984-08-24T00:00:00" table:style-name="ce4">
            <text:p>1984-08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5316279</text:p>
          </table:table-cell>
          <table:table-cell office:value-type="string" table:style-name="ce1">
            <text:p>daniel.jimenez40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02T07:59:00" table:style-name="ce5">
            <text:p>2026-06-02 07:59</text:p>
          </table:table-cell>
          <table:table-cell office:value-type="date" office:date-value="2026-06-05T23:30:00" table:style-name="ce6">
            <text:p>2026-06-05 23:30</text:p>
          </table:table-cell>
          <table:table-cell table:number-columns-repeated="16369"/>
        </table:table-row>
        <table:table-row table:style-name="ro1">
          <table:table-cell office:value-type="float" office:value="401" table:style-name="ce3">
            <text:p>40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63407191</text:p>
          </table:table-cell>
          <table:table-cell office:value-type="string" table:style-name="ce1">
            <text:p>Camila Valentina Sánchez Moreno</text:p>
          </table:table-cell>
          <table:table-cell office:value-type="date" office:date-value="1964-05-04T00:00:00" table:style-name="ce4">
            <text:p>1964-05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1573112</text:p>
          </table:table-cell>
          <table:table-cell office:value-type="string" table:style-name="ce1">
            <text:p>camila.sanchez401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12T19:19:00" table:style-name="ce5">
            <text:p>2026-04-12 19:19</text:p>
          </table:table-cell>
          <table:table-cell office:value-type="date" office:date-value="2026-06-13T14:43:00" table:style-name="ce6">
            <text:p>2026-06-13 14:43</text:p>
          </table:table-cell>
          <table:table-cell table:number-columns-repeated="16369"/>
        </table:table-row>
        <table:table-row table:style-name="ro1">
          <table:table-cell office:value-type="float" office:value="402" table:style-name="ce3">
            <text:p>40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4801061</text:p>
          </table:table-cell>
          <table:table-cell office:value-type="string" table:style-name="ce1">
            <text:p>Cristian Vargas González</text:p>
          </table:table-cell>
          <table:table-cell office:value-type="date" office:date-value="1959-04-06T00:00:00" table:style-name="ce4">
            <text:p>1959-04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7174062</text:p>
          </table:table-cell>
          <table:table-cell office:value-type="string" table:style-name="ce1">
            <text:p>cristian.vargas402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20T09:41:00" table:style-name="ce5">
            <text:p>2026-05-20 09:41</text:p>
          </table:table-cell>
          <table:table-cell office:value-type="date" office:date-value="2026-05-23T12:27:00" table:style-name="ce6">
            <text:p>2026-05-23 12:27</text:p>
          </table:table-cell>
          <table:table-cell table:number-columns-repeated="16369"/>
        </table:table-row>
        <table:table-row table:style-name="ro1">
          <table:table-cell office:value-type="float" office:value="403" table:style-name="ce3">
            <text:p>40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06538740</text:p>
          </table:table-cell>
          <table:table-cell office:value-type="string" table:style-name="ce1">
            <text:p>Carolina González Díaz</text:p>
          </table:table-cell>
          <table:table-cell office:value-type="date" office:date-value="1962-03-09T00:00:00" table:style-name="ce4">
            <text:p>1962-03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1596938</text:p>
          </table:table-cell>
          <table:table-cell office:value-type="string" table:style-name="ce1">
            <text:p>carolina.gonzalez40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3-19T05:43:00" table:style-name="ce5">
            <text:p>2026-03-19 05:43</text:p>
          </table:table-cell>
          <table:table-cell office:value-type="date" office:date-value="2026-05-21T14:18:00" table:style-name="ce6">
            <text:p>2026-05-21 14:18</text:p>
          </table:table-cell>
          <table:table-cell table:number-columns-repeated="16369"/>
        </table:table-row>
        <table:table-row table:style-name="ro1">
          <table:table-cell office:value-type="float" office:value="404" table:style-name="ce3">
            <text:p>40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05171661</text:p>
          </table:table-cell>
          <table:table-cell office:value-type="string" table:style-name="ce1">
            <text:p>María Sara Rojas Moreno</text:p>
          </table:table-cell>
          <table:table-cell office:value-type="date" office:date-value="1987-04-16T00:00:00" table:style-name="ce4">
            <text:p>1987-04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7963999</text:p>
          </table:table-cell>
          <table:table-cell office:value-type="string" table:style-name="ce1">
            <text:p>maria.rojas404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08T18:10:00" table:style-name="ce5">
            <text:p>2026-05-08 18:10</text:p>
          </table:table-cell>
          <table:table-cell office:value-type="date" office:date-value="2026-05-11T09:00:00" table:style-name="ce6">
            <text:p>2026-05-11 09:00</text:p>
          </table:table-cell>
          <table:table-cell table:number-columns-repeated="16369"/>
        </table:table-row>
        <table:table-row table:style-name="ro1">
          <table:table-cell office:value-type="float" office:value="405" table:style-name="ce3">
            <text:p>40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9451275</text:p>
          </table:table-cell>
          <table:table-cell office:value-type="string" table:style-name="ce1">
            <text:p>Tomás Cárdenas Sánchez</text:p>
          </table:table-cell>
          <table:table-cell office:value-type="date" office:date-value="1998-12-29T00:00:00" table:style-name="ce4">
            <text:p>1998-12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3298319</text:p>
          </table:table-cell>
          <table:table-cell office:value-type="string" table:style-name="ce1">
            <text:p>tomas.cardenas405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07T20:57:00" table:style-name="ce5">
            <text:p>2026-04-07 20:57</text:p>
          </table:table-cell>
          <table:table-cell office:value-type="date" office:date-value="2026-05-13T23:39:00" table:style-name="ce6">
            <text:p>2026-05-13 23:39</text:p>
          </table:table-cell>
          <table:table-cell table:number-columns-repeated="16369"/>
        </table:table-row>
        <table:table-row table:style-name="ro1">
          <table:table-cell office:value-type="float" office:value="406" table:style-name="ce3">
            <text:p>40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3878887</text:p>
          </table:table-cell>
          <table:table-cell office:value-type="string" table:style-name="ce1">
            <text:p>Felipe Vargas González</text:p>
          </table:table-cell>
          <table:table-cell office:value-type="date" office:date-value="1975-06-10T00:00:00" table:style-name="ce4">
            <text:p>1975-06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3435210</text:p>
          </table:table-cell>
          <table:table-cell office:value-type="string" table:style-name="ce1">
            <text:p>felipe.vargas406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03T12:56:00" table:style-name="ce5">
            <text:p>2026-06-03 12:56</text:p>
          </table:table-cell>
          <table:table-cell office:value-type="date" office:date-value="2026-06-22T10:31:00" table:style-name="ce6">
            <text:p>2026-06-22 10:31</text:p>
          </table:table-cell>
          <table:table-cell table:number-columns-repeated="16369"/>
        </table:table-row>
        <table:table-row table:style-name="ro1">
          <table:table-cell office:value-type="float" office:value="407" table:style-name="ce3">
            <text:p>40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6011808</text:p>
          </table:table-cell>
          <table:table-cell office:value-type="string" table:style-name="ce1">
            <text:p>Ricardo Rojas Martínez</text:p>
          </table:table-cell>
          <table:table-cell office:value-type="date" office:date-value="1973-09-22T00:00:00" table:style-name="ce4">
            <text:p>1973-09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8330483</text:p>
          </table:table-cell>
          <table:table-cell office:value-type="string" table:style-name="ce1">
            <text:p>ricardo.rojas40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7-02T21:47:00" table:style-name="ce5">
            <text:p>2026-07-02 21:47</text:p>
          </table:table-cell>
          <table:table-cell office:value-type="date" office:date-value="2026-07-05T03:48:00" table:style-name="ce6">
            <text:p>2026-07-05 03:48</text:p>
          </table:table-cell>
          <table:table-cell table:number-columns-repeated="16369"/>
        </table:table-row>
        <table:table-row table:style-name="ro1">
          <table:table-cell office:value-type="float" office:value="408" table:style-name="ce3">
            <text:p>40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92805110</text:p>
          </table:table-cell>
          <table:table-cell office:value-type="string" table:style-name="ce1">
            <text:p>Juan Díaz Hernández</text:p>
          </table:table-cell>
          <table:table-cell office:value-type="date" office:date-value="2000-10-06T00:00:00" table:style-name="ce4">
            <text:p>2000-10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9294691</text:p>
          </table:table-cell>
          <table:table-cell office:value-type="string" table:style-name="ce1">
            <text:p>juan.diaz408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04T13:54:00" table:style-name="ce5">
            <text:p>2026-06-04 13:54</text:p>
          </table:table-cell>
          <table:table-cell office:value-type="date" office:date-value="2026-06-30T03:36:00" table:style-name="ce6">
            <text:p>2026-06-30 03:36</text:p>
          </table:table-cell>
          <table:table-cell table:number-columns-repeated="16369"/>
        </table:table-row>
        <table:table-row table:style-name="ro1">
          <table:table-cell office:value-type="float" office:value="409" table:style-name="ce3">
            <text:p>40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8351731</text:p>
          </table:table-cell>
          <table:table-cell office:value-type="string" table:style-name="ce1">
            <text:p>Carlos Silva Sánchez</text:p>
          </table:table-cell>
          <table:table-cell office:value-type="date" office:date-value="1962-03-27T00:00:00" table:style-name="ce4">
            <text:p>1962-03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1139165</text:p>
          </table:table-cell>
          <table:table-cell office:value-type="string" table:style-name="ce1">
            <text:p>carlos.silva409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3-19T18:15:00" table:style-name="ce5">
            <text:p>2026-03-19 18:15</text:p>
          </table:table-cell>
          <table:table-cell office:value-type="date" office:date-value="2026-04-09T16:24:00" table:style-name="ce6">
            <text:p>2026-04-09 16:24</text:p>
          </table:table-cell>
          <table:table-cell table:number-columns-repeated="16369"/>
        </table:table-row>
        <table:table-row table:style-name="ro1">
          <table:table-cell office:value-type="float" office:value="410" table:style-name="ce3">
            <text:p>41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41740328</text:p>
          </table:table-cell>
          <table:table-cell office:value-type="string" table:style-name="ce1">
            <text:p>Juan Rojas Mendoza</text:p>
          </table:table-cell>
          <table:table-cell office:value-type="date" office:date-value="1989-08-29T00:00:00" table:style-name="ce4">
            <text:p>1989-08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4422499</text:p>
          </table:table-cell>
          <table:table-cell office:value-type="string" table:style-name="ce1">
            <text:p>juan.rojas410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13T18:17:00" table:style-name="ce5">
            <text:p>2026-06-13 18:17</text:p>
          </table:table-cell>
          <table:table-cell office:value-type="date" office:date-value="2026-06-17T01:21:00" table:style-name="ce6">
            <text:p>2026-06-17 01:21</text:p>
          </table:table-cell>
          <table:table-cell table:number-columns-repeated="16369"/>
        </table:table-row>
        <table:table-row table:style-name="ro1">
          <table:table-cell office:value-type="float" office:value="411" table:style-name="ce3">
            <text:p>41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7890514</text:p>
          </table:table-cell>
          <table:table-cell office:value-type="string" table:style-name="ce1">
            <text:p>Julián González Quintero</text:p>
          </table:table-cell>
          <table:table-cell office:value-type="date" office:date-value="1977-01-29T00:00:00" table:style-name="ce4">
            <text:p>1977-01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3386394</text:p>
          </table:table-cell>
          <table:table-cell office:value-type="string" table:style-name="ce1">
            <text:p>julian.gonzalez411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6-09T20:09:00" table:style-name="ce5">
            <text:p>2026-06-09 20:09</text:p>
          </table:table-cell>
          <table:table-cell office:value-type="date" office:date-value="2026-06-17T00:20:00" table:style-name="ce6">
            <text:p>2026-06-17 00:20</text:p>
          </table:table-cell>
          <table:table-cell table:number-columns-repeated="16369"/>
        </table:table-row>
        <table:table-row table:style-name="ro1">
          <table:table-cell office:value-type="float" office:value="412" table:style-name="ce3">
            <text:p>412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155580592</text:p>
          </table:table-cell>
          <table:table-cell office:value-type="string" table:style-name="ce1">
            <text:p>Catalina Diana Ramírez Pérez</text:p>
          </table:table-cell>
          <table:table-cell office:value-type="date" office:date-value="1986-04-23T00:00:00" table:style-name="ce4">
            <text:p>1986-04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1232322</text:p>
          </table:table-cell>
          <table:table-cell office:value-type="string" table:style-name="ce1">
            <text:p>catalina.ramirez41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03T19:39:00" table:style-name="ce5">
            <text:p>2026-04-03 19:39</text:p>
          </table:table-cell>
          <table:table-cell office:value-type="date" office:date-value="2026-04-26T12:30:00" table:style-name="ce6">
            <text:p>2026-04-26 12:30</text:p>
          </table:table-cell>
          <table:table-cell table:number-columns-repeated="16369"/>
        </table:table-row>
        <table:table-row table:style-name="ro1">
          <table:table-cell office:value-type="float" office:value="413" table:style-name="ce3">
            <text:p>413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0134786</text:p>
          </table:table-cell>
          <table:table-cell office:value-type="string" table:style-name="ce1">
            <text:p>Ricardo Nicolás Cárdenas Sánchez</text:p>
          </table:table-cell>
          <table:table-cell office:value-type="date" office:date-value="2013-02-28T00:00:00" table:style-name="ce4">
            <text:p>2013-02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6270758</text:p>
          </table:table-cell>
          <table:table-cell office:value-type="string" table:style-name="ce1">
            <text:p>ricardo.cardenas41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25T21:19:00" table:style-name="ce5">
            <text:p>2026-06-25 21:19</text:p>
          </table:table-cell>
          <table:table-cell office:value-type="date" office:date-value="2026-07-08T02:44:00" table:style-name="ce6">
            <text:p>2026-07-08 02:44</text:p>
          </table:table-cell>
          <table:table-cell table:number-columns-repeated="16369"/>
        </table:table-row>
        <table:table-row table:style-name="ro1">
          <table:table-cell office:value-type="float" office:value="414" table:style-name="ce3">
            <text:p>41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3070920</text:p>
          </table:table-cell>
          <table:table-cell office:value-type="string" table:style-name="ce1">
            <text:p>Samuel Ortiz Sánchez</text:p>
          </table:table-cell>
          <table:table-cell office:value-type="date" office:date-value="2009-08-17T00:00:00" table:style-name="ce4">
            <text:p>2009-08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1191008</text:p>
          </table:table-cell>
          <table:table-cell office:value-type="string" table:style-name="ce1">
            <text:p>samuel.ortiz41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12T13:58:00" table:style-name="ce5">
            <text:p>2026-06-12 13:58</text:p>
          </table:table-cell>
          <table:table-cell office:value-type="date" office:date-value="2026-06-12T15:40:00" table:style-name="ce6">
            <text:p>2026-06-12 15:40</text:p>
          </table:table-cell>
          <table:table-cell table:number-columns-repeated="16369"/>
        </table:table-row>
        <table:table-row table:style-name="ro1">
          <table:table-cell office:value-type="float" office:value="415" table:style-name="ce3">
            <text:p>415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328357822</text:p>
          </table:table-cell>
          <table:table-cell office:value-type="string" table:style-name="ce1">
            <text:p>Luisa López Valencia</text:p>
          </table:table-cell>
          <table:table-cell office:value-type="date" office:date-value="1986-06-16T00:00:00" table:style-name="ce4">
            <text:p>1986-06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6185962</text:p>
          </table:table-cell>
          <table:table-cell office:value-type="string" table:style-name="ce1">
            <text:p>luisa.lopez41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12T14:32:00" table:style-name="ce5">
            <text:p>2026-06-12 14:32</text:p>
          </table:table-cell>
          <table:table-cell office:value-type="date" office:date-value="2026-06-25T17:47:00" table:style-name="ce6">
            <text:p>2026-06-25 17:47</text:p>
          </table:table-cell>
          <table:table-cell table:number-columns-repeated="16369"/>
        </table:table-row>
        <table:table-row table:style-name="ro1">
          <table:table-cell office:value-type="float" office:value="416" table:style-name="ce3">
            <text:p>41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66876060</text:p>
          </table:table-cell>
          <table:table-cell office:value-type="string" table:style-name="ce1">
            <text:p>Andrea García Pérez</text:p>
          </table:table-cell>
          <table:table-cell office:value-type="date" office:date-value="2006-10-27T00:00:00" table:style-name="ce4">
            <text:p>2006-10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5178443</text:p>
          </table:table-cell>
          <table:table-cell office:value-type="string" table:style-name="ce1">
            <text:p>andrea.garcia416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4-03T04:54:00" table:style-name="ce5">
            <text:p>2026-04-03 04:54</text:p>
          </table:table-cell>
          <table:table-cell office:value-type="date" office:date-value="2026-04-21T15:28:00" table:style-name="ce6">
            <text:p>2026-04-21 15:28</text:p>
          </table:table-cell>
          <table:table-cell table:number-columns-repeated="16369"/>
        </table:table-row>
        <table:table-row table:style-name="ro1">
          <table:table-cell office:value-type="float" office:value="417" table:style-name="ce3">
            <text:p>417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523473825</text:p>
          </table:table-cell>
          <table:table-cell office:value-type="string" table:style-name="ce1">
            <text:p>Carlos Rojas Torres</text:p>
          </table:table-cell>
          <table:table-cell office:value-type="date" office:date-value="2008-11-25T00:00:00" table:style-name="ce4">
            <text:p>2008-11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3750719</text:p>
          </table:table-cell>
          <table:table-cell office:value-type="string" table:style-name="ce1">
            <text:p>carlos.rojas417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7-03T06:43:00" table:style-name="ce5">
            <text:p>2026-07-03 06:43</text:p>
          </table:table-cell>
          <table:table-cell office:value-type="date" office:date-value="2026-07-09T09:26:00" table:style-name="ce6">
            <text:p>2026-07-09 09:26</text:p>
          </table:table-cell>
          <table:table-cell table:number-columns-repeated="16369"/>
        </table:table-row>
        <table:table-row table:style-name="ro1">
          <table:table-cell office:value-type="float" office:value="418" table:style-name="ce3">
            <text:p>418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72903189</text:p>
          </table:table-cell>
          <table:table-cell office:value-type="string" table:style-name="ce1">
            <text:p>Sebastián Romero Pérez</text:p>
          </table:table-cell>
          <table:table-cell office:value-type="date" office:date-value="2008-12-31T00:00:00" table:style-name="ce4">
            <text:p>2008-12-3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6894376</text:p>
          </table:table-cell>
          <table:table-cell office:value-type="string" table:style-name="ce1">
            <text:p>sebastian.romero41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7-02T23:38:00" table:style-name="ce5">
            <text:p>2026-07-02 23:38</text:p>
          </table:table-cell>
          <table:table-cell office:value-type="date" office:date-value="2026-07-07T16:56:00" table:style-name="ce6">
            <text:p>2026-07-07 16:56</text:p>
          </table:table-cell>
          <table:table-cell table:number-columns-repeated="16369"/>
        </table:table-row>
        <table:table-row table:style-name="ro1">
          <table:table-cell office:value-type="float" office:value="419" table:style-name="ce3">
            <text:p>41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604952</text:p>
          </table:table-cell>
          <table:table-cell office:value-type="string" table:style-name="ce1">
            <text:p>Jorge Castro Díaz</text:p>
          </table:table-cell>
          <table:table-cell office:value-type="date" office:date-value="1992-07-16T00:00:00" table:style-name="ce4">
            <text:p>1992-07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5320616</text:p>
          </table:table-cell>
          <table:table-cell office:value-type="string" table:style-name="ce1">
            <text:p>jorge.castro419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13T16:15:00" table:style-name="ce5">
            <text:p>2026-06-13 16:15</text:p>
          </table:table-cell>
          <table:table-cell office:value-type="date" office:date-value="2026-07-04T15:45:00" table:style-name="ce6">
            <text:p>2026-07-04 15:45</text:p>
          </table:table-cell>
          <table:table-cell table:number-columns-repeated="16369"/>
        </table:table-row>
        <table:table-row table:style-name="ro1">
          <table:table-cell office:value-type="float" office:value="420" table:style-name="ce3">
            <text:p>42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3432269</text:p>
          </table:table-cell>
          <table:table-cell office:value-type="string" table:style-name="ce1">
            <text:p>Samuel Cárdenas García</text:p>
          </table:table-cell>
          <table:table-cell office:value-type="date" office:date-value="1980-11-20T00:00:00" table:style-name="ce4">
            <text:p>1980-11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6644829</text:p>
          </table:table-cell>
          <table:table-cell office:value-type="string" table:style-name="ce1">
            <text:p>samuel.cardenas420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07T18:43:00" table:style-name="ce5">
            <text:p>2026-05-07 18:43</text:p>
          </table:table-cell>
          <table:table-cell office:value-type="date" office:date-value="2026-05-22T09:54:00" table:style-name="ce6">
            <text:p>2026-05-22 09:54</text:p>
          </table:table-cell>
          <table:table-cell table:number-columns-repeated="16369"/>
        </table:table-row>
        <table:table-row table:style-name="ro1">
          <table:table-cell office:value-type="float" office:value="421" table:style-name="ce3">
            <text:p>42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4056487</text:p>
          </table:table-cell>
          <table:table-cell office:value-type="string" table:style-name="ce1">
            <text:p>Sara Rodríguez Álvarez</text:p>
          </table:table-cell>
          <table:table-cell office:value-type="date" office:date-value="1995-08-12T00:00:00" table:style-name="ce4">
            <text:p>1995-08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7410674</text:p>
          </table:table-cell>
          <table:table-cell office:value-type="string" table:style-name="ce1">
            <text:p>sara.rodriguez421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17T18:08:00" table:style-name="ce5">
            <text:p>2026-03-17 18:08</text:p>
          </table:table-cell>
          <table:table-cell office:value-type="date" office:date-value="2026-06-29T06:41:00" table:style-name="ce6">
            <text:p>2026-06-29 06:41</text:p>
          </table:table-cell>
          <table:table-cell table:number-columns-repeated="16369"/>
        </table:table-row>
        <table:table-row table:style-name="ro1">
          <table:table-cell office:value-type="float" office:value="422" table:style-name="ce3">
            <text:p>42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15127602</text:p>
          </table:table-cell>
          <table:table-cell office:value-type="string" table:style-name="ce1">
            <text:p>Felipe García Giraldo</text:p>
          </table:table-cell>
          <table:table-cell office:value-type="date" office:date-value="1990-08-16T00:00:00" table:style-name="ce4">
            <text:p>1990-08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9624483</text:p>
          </table:table-cell>
          <table:table-cell office:value-type="string" table:style-name="ce1">
            <text:p>felipe.garcia42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7-01T22:35:00" table:style-name="ce5">
            <text:p>2026-07-01 22:35</text:p>
          </table:table-cell>
          <table:table-cell office:value-type="date" office:date-value="2026-07-05T08:15:00" table:style-name="ce6">
            <text:p>2026-07-05 08:15</text:p>
          </table:table-cell>
          <table:table-cell table:number-columns-repeated="16369"/>
        </table:table-row>
        <table:table-row table:style-name="ro1">
          <table:table-cell office:value-type="float" office:value="423" table:style-name="ce3">
            <text:p>42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99657027</text:p>
          </table:table-cell>
          <table:table-cell office:value-type="string" table:style-name="ce1">
            <text:p>Andrea Ramírez Vargas</text:p>
          </table:table-cell>
          <table:table-cell office:value-type="date" office:date-value="1999-04-23T00:00:00" table:style-name="ce4">
            <text:p>1999-04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6632832</text:p>
          </table:table-cell>
          <table:table-cell office:value-type="string" table:style-name="ce1">
            <text:p>andrea.ramirez42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7-02T16:58:00" table:style-name="ce5">
            <text:p>2026-07-02 16:58</text:p>
          </table:table-cell>
          <table:table-cell office:value-type="date" office:date-value="2026-07-04T09:40:00" table:style-name="ce6">
            <text:p>2026-07-04 09:40</text:p>
          </table:table-cell>
          <table:table-cell table:number-columns-repeated="16369"/>
        </table:table-row>
        <table:table-row table:style-name="ro1">
          <table:table-cell office:value-type="float" office:value="424" table:style-name="ce3">
            <text:p>42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64902060</text:p>
          </table:table-cell>
          <table:table-cell office:value-type="string" table:style-name="ce1">
            <text:p>Mateo Muñoz Vargas</text:p>
          </table:table-cell>
          <table:table-cell office:value-type="date" office:date-value="1961-02-07T00:00:00" table:style-name="ce4">
            <text:p>1961-02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6787373</text:p>
          </table:table-cell>
          <table:table-cell office:value-type="string" table:style-name="ce1">
            <text:p>mateo.munoz42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13T14:08:00" table:style-name="ce5">
            <text:p>2026-05-13 14:08</text:p>
          </table:table-cell>
          <table:table-cell office:value-type="date" office:date-value="2026-05-14T16:01:00" table:style-name="ce6">
            <text:p>2026-05-14 16:01</text:p>
          </table:table-cell>
          <table:table-cell table:number-columns-repeated="16369"/>
        </table:table-row>
        <table:table-row table:style-name="ro1">
          <table:table-cell office:value-type="float" office:value="425" table:style-name="ce3">
            <text:p>42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95428329</text:p>
          </table:table-cell>
          <table:table-cell office:value-type="string" table:style-name="ce1">
            <text:p>Paula Restrepo Castro</text:p>
          </table:table-cell>
          <table:table-cell office:value-type="date" office:date-value="2007-03-19T00:00:00" table:style-name="ce4">
            <text:p>2007-03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5248037</text:p>
          </table:table-cell>
          <table:table-cell office:value-type="string" table:style-name="ce1">
            <text:p>paula.restrepo425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26T12:57:00" table:style-name="ce5">
            <text:p>2026-06-26 12:57</text:p>
          </table:table-cell>
          <table:table-cell office:value-type="date" office:date-value="2026-07-09T15:14:00" table:style-name="ce6">
            <text:p>2026-07-09 15:14</text:p>
          </table:table-cell>
          <table:table-cell table:number-columns-repeated="16369"/>
        </table:table-row>
        <table:table-row table:style-name="ro1">
          <table:table-cell office:value-type="float" office:value="426" table:style-name="ce3">
            <text:p>42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03905668</text:p>
          </table:table-cell>
          <table:table-cell office:value-type="string" table:style-name="ce1">
            <text:p>María Moreno Jiménez</text:p>
          </table:table-cell>
          <table:table-cell office:value-type="date" office:date-value="1974-05-11T00:00:00" table:style-name="ce4">
            <text:p>1974-05-1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9354667</text:p>
          </table:table-cell>
          <table:table-cell office:value-type="string" table:style-name="ce1">
            <text:p>maria.moreno426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3-16T23:01:00" table:style-name="ce5">
            <text:p>2026-03-16 23:01</text:p>
          </table:table-cell>
          <table:table-cell office:value-type="date" office:date-value="2026-05-15T20:51:00" table:style-name="ce6">
            <text:p>2026-05-15 20:51</text:p>
          </table:table-cell>
          <table:table-cell table:number-columns-repeated="16369"/>
        </table:table-row>
        <table:table-row table:style-name="ro1">
          <table:table-cell office:value-type="float" office:value="427" table:style-name="ce3">
            <text:p>42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6272610</text:p>
          </table:table-cell>
          <table:table-cell office:value-type="string" table:style-name="ce1">
            <text:p>Cristian Silva Ortiz</text:p>
          </table:table-cell>
          <table:table-cell office:value-type="date" office:date-value="1992-01-04T00:00:00" table:style-name="ce4">
            <text:p>1992-01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2907516</text:p>
          </table:table-cell>
          <table:table-cell office:value-type="string" table:style-name="ce1">
            <text:p>cristian.silva427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6-11T12:20:00" table:style-name="ce5">
            <text:p>2026-06-11 12:20</text:p>
          </table:table-cell>
          <table:table-cell office:value-type="date" office:date-value="2026-06-23T06:09:00" table:style-name="ce6">
            <text:p>2026-06-23 06:09</text:p>
          </table:table-cell>
          <table:table-cell table:number-columns-repeated="16369"/>
        </table:table-row>
        <table:table-row table:style-name="ro1">
          <table:table-cell office:value-type="float" office:value="428" table:style-name="ce3">
            <text:p>42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56572781</text:p>
          </table:table-cell>
          <table:table-cell office:value-type="string" table:style-name="ce1">
            <text:p>Felipe Silva Ramírez</text:p>
          </table:table-cell>
          <table:table-cell office:value-type="date" office:date-value="1989-12-03T00:00:00" table:style-name="ce4">
            <text:p>1989-12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3752222</text:p>
          </table:table-cell>
          <table:table-cell office:value-type="string" table:style-name="ce1">
            <text:p>felipe.silva428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7-04T16:11:00" table:style-name="ce5">
            <text:p>2026-07-04 16:11</text:p>
          </table:table-cell>
          <table:table-cell office:value-type="date" office:date-value="2026-07-05T14:41:00" table:style-name="ce6">
            <text:p>2026-07-05 14:41</text:p>
          </table:table-cell>
          <table:table-cell table:number-columns-repeated="16369"/>
        </table:table-row>
        <table:table-row table:style-name="ro1">
          <table:table-cell office:value-type="float" office:value="429" table:style-name="ce3">
            <text:p>42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68270569</text:p>
          </table:table-cell>
          <table:table-cell office:value-type="string" table:style-name="ce1">
            <text:p>Ana Castro Díaz</text:p>
          </table:table-cell>
          <table:table-cell office:value-type="date" office:date-value="1990-10-13T00:00:00" table:style-name="ce4">
            <text:p>1990-10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5404807</text:p>
          </table:table-cell>
          <table:table-cell office:value-type="string" table:style-name="ce1">
            <text:p>ana.castro429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27T12:07:00" table:style-name="ce5">
            <text:p>2026-05-27 12:07</text:p>
          </table:table-cell>
          <table:table-cell office:value-type="date" office:date-value="2026-06-28T19:47:00" table:style-name="ce6">
            <text:p>2026-06-28 19:47</text:p>
          </table:table-cell>
          <table:table-cell table:number-columns-repeated="16369"/>
        </table:table-row>
        <table:table-row table:style-name="ro1">
          <table:table-cell office:value-type="float" office:value="430" table:style-name="ce3">
            <text:p>43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2998860</text:p>
          </table:table-cell>
          <table:table-cell office:value-type="string" table:style-name="ce1">
            <text:p>David Pérez Castro</text:p>
          </table:table-cell>
          <table:table-cell office:value-type="date" office:date-value="1975-01-05T00:00:00" table:style-name="ce4">
            <text:p>1975-01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3020747</text:p>
          </table:table-cell>
          <table:table-cell office:value-type="string" table:style-name="ce1">
            <text:p>david.perez430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4-23T22:13:00" table:style-name="ce5">
            <text:p>2026-04-23 22:13</text:p>
          </table:table-cell>
          <table:table-cell office:value-type="date" office:date-value="2026-06-08T00:02:00" table:style-name="ce6">
            <text:p>2026-06-08 00:02</text:p>
          </table:table-cell>
          <table:table-cell table:number-columns-repeated="16369"/>
        </table:table-row>
        <table:table-row table:style-name="ro1">
          <table:table-cell office:value-type="float" office:value="431" table:style-name="ce3">
            <text:p>43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14974125</text:p>
          </table:table-cell>
          <table:table-cell office:value-type="string" table:style-name="ce1">
            <text:p>Mateo Vargas Torres</text:p>
          </table:table-cell>
          <table:table-cell office:value-type="date" office:date-value="1974-01-11T00:00:00" table:style-name="ce4">
            <text:p>1974-01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6094887</text:p>
          </table:table-cell>
          <table:table-cell office:value-type="string" table:style-name="ce1">
            <text:p>mateo.vargas431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7-02T18:01:00" table:style-name="ce5">
            <text:p>2026-07-02 18:01</text:p>
          </table:table-cell>
          <table:table-cell office:value-type="date" office:date-value="2026-07-10T08:28:00" table:style-name="ce6">
            <text:p>2026-07-10 08:28</text:p>
          </table:table-cell>
          <table:table-cell table:number-columns-repeated="16369"/>
        </table:table-row>
        <table:table-row table:style-name="ro1">
          <table:table-cell office:value-type="float" office:value="432" table:style-name="ce3">
            <text:p>43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7865182</text:p>
          </table:table-cell>
          <table:table-cell office:value-type="string" table:style-name="ce1">
            <text:p>José Felipe Castro Hernández</text:p>
          </table:table-cell>
          <table:table-cell office:value-type="date" office:date-value="1970-01-29T00:00:00" table:style-name="ce4">
            <text:p>1970-01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6298345</text:p>
          </table:table-cell>
          <table:table-cell office:value-type="string" table:style-name="ce1">
            <text:p>jose.castro43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30T23:53:00" table:style-name="ce5">
            <text:p>2026-04-30 23:53</text:p>
          </table:table-cell>
          <table:table-cell office:value-type="date" office:date-value="2026-07-09T15:59:00" table:style-name="ce6">
            <text:p>2026-07-09 15:59</text:p>
          </table:table-cell>
          <table:table-cell table:number-columns-repeated="16369"/>
        </table:table-row>
        <table:table-row table:style-name="ro1">
          <table:table-cell office:value-type="float" office:value="433" table:style-name="ce3">
            <text:p>43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47170577</text:p>
          </table:table-cell>
          <table:table-cell office:value-type="string" table:style-name="ce1">
            <text:p>David González Sánchez</text:p>
          </table:table-cell>
          <table:table-cell office:value-type="date" office:date-value="1994-12-23T00:00:00" table:style-name="ce4">
            <text:p>1994-12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1297814</text:p>
          </table:table-cell>
          <table:table-cell office:value-type="string" table:style-name="ce1">
            <text:p>david.gonzalez43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29T09:49:00" table:style-name="ce5">
            <text:p>2026-05-29 09:49</text:p>
          </table:table-cell>
          <table:table-cell office:value-type="date" office:date-value="2026-06-14T08:08:00" table:style-name="ce6">
            <text:p>2026-06-14 08:08</text:p>
          </table:table-cell>
          <table:table-cell table:number-columns-repeated="16369"/>
        </table:table-row>
        <table:table-row table:style-name="ro1">
          <table:table-cell office:value-type="float" office:value="434" table:style-name="ce3">
            <text:p>43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28418161</text:p>
          </table:table-cell>
          <table:table-cell office:value-type="string" table:style-name="ce1">
            <text:p>Carolina Ramírez Valencia</text:p>
          </table:table-cell>
          <table:table-cell office:value-type="date" office:date-value="1987-07-20T00:00:00" table:style-name="ce4">
            <text:p>1987-07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2126114</text:p>
          </table:table-cell>
          <table:table-cell office:value-type="string" table:style-name="ce1">
            <text:p>carolina.ramirez43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23T00:40:00" table:style-name="ce5">
            <text:p>2026-04-23 00:40</text:p>
          </table:table-cell>
          <table:table-cell office:value-type="date" office:date-value="2026-06-06T17:53:00" table:style-name="ce6">
            <text:p>2026-06-06 17:53</text:p>
          </table:table-cell>
          <table:table-cell table:number-columns-repeated="16369"/>
        </table:table-row>
        <table:table-row table:style-name="ro1">
          <table:table-cell office:value-type="float" office:value="435" table:style-name="ce3">
            <text:p>43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9524484</text:p>
          </table:table-cell>
          <table:table-cell office:value-type="string" table:style-name="ce1">
            <text:p>Valentina Diana García Rodríguez</text:p>
          </table:table-cell>
          <table:table-cell office:value-type="date" office:date-value="1946-06-25T00:00:00" table:style-name="ce4">
            <text:p>1946-06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8258181</text:p>
          </table:table-cell>
          <table:table-cell office:value-type="string" table:style-name="ce1">
            <text:p>valentina.garcia43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02T01:52:00" table:style-name="ce5">
            <text:p>2026-06-02 01:52</text:p>
          </table:table-cell>
          <table:table-cell office:value-type="date" office:date-value="2026-06-22T00:30:00" table:style-name="ce6">
            <text:p>2026-06-22 00:30</text:p>
          </table:table-cell>
          <table:table-cell table:number-columns-repeated="16369"/>
        </table:table-row>
        <table:table-row table:style-name="ro1">
          <table:table-cell office:value-type="float" office:value="436" table:style-name="ce3">
            <text:p>436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96197980</text:p>
          </table:table-cell>
          <table:table-cell office:value-type="string" table:style-name="ce1">
            <text:p>Carlos Jiménez González</text:p>
          </table:table-cell>
          <table:table-cell office:value-type="date" office:date-value="2020-04-08T00:00:00" table:style-name="ce4">
            <text:p>2020-04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5747237</text:p>
          </table:table-cell>
          <table:table-cell office:value-type="string" table:style-name="ce1">
            <text:p>carlos.jimenez43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27T23:16:00" table:style-name="ce5">
            <text:p>2026-06-27 23:16</text:p>
          </table:table-cell>
          <table:table-cell office:value-type="date" office:date-value="2026-07-05T20:18:00" table:style-name="ce6">
            <text:p>2026-07-05 20:18</text:p>
          </table:table-cell>
          <table:table-cell table:number-columns-repeated="16369"/>
        </table:table-row>
        <table:table-row table:style-name="ro1">
          <table:table-cell office:value-type="float" office:value="437" table:style-name="ce3">
            <text:p>437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30454681</text:p>
          </table:table-cell>
          <table:table-cell office:value-type="string" table:style-name="ce1">
            <text:p>Esteban Romero Hernández</text:p>
          </table:table-cell>
          <table:table-cell office:value-type="date" office:date-value="2013-03-02T00:00:00" table:style-name="ce4">
            <text:p>2013-03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2713110</text:p>
          </table:table-cell>
          <table:table-cell office:value-type="string" table:style-name="ce1">
            <text:p>esteban.romero437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02T01:21:00" table:style-name="ce5">
            <text:p>2026-05-02 01:21</text:p>
          </table:table-cell>
          <table:table-cell office:value-type="date" office:date-value="2026-06-09T01:31:00" table:style-name="ce6">
            <text:p>2026-06-09 01:31</text:p>
          </table:table-cell>
          <table:table-cell table:number-columns-repeated="16369"/>
        </table:table-row>
        <table:table-row table:style-name="ro1">
          <table:table-cell office:value-type="float" office:value="438" table:style-name="ce3">
            <text:p>43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78286391</text:p>
          </table:table-cell>
          <table:table-cell office:value-type="string" table:style-name="ce1">
            <text:p>David Álvarez Muñoz</text:p>
          </table:table-cell>
          <table:table-cell office:value-type="date" office:date-value="1957-07-01T00:00:00" table:style-name="ce4">
            <text:p>1957-07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8656116</text:p>
          </table:table-cell>
          <table:table-cell office:value-type="string" table:style-name="ce1">
            <text:p>david.alvarez438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5-24T00:32:00" table:style-name="ce5">
            <text:p>2026-05-24 00:32</text:p>
          </table:table-cell>
          <table:table-cell office:value-type="date" office:date-value="2026-07-04T15:14:00" table:style-name="ce6">
            <text:p>2026-07-04 15:14</text:p>
          </table:table-cell>
          <table:table-cell table:number-columns-repeated="16369"/>
        </table:table-row>
        <table:table-row table:style-name="ro1">
          <table:table-cell office:value-type="float" office:value="439" table:style-name="ce3">
            <text:p>43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61046817</text:p>
          </table:table-cell>
          <table:table-cell office:value-type="string" table:style-name="ce1">
            <text:p>Carlos Rojas Rodríguez</text:p>
          </table:table-cell>
          <table:table-cell office:value-type="date" office:date-value="1962-03-28T00:00:00" table:style-name="ce4">
            <text:p>1962-03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3715961</text:p>
          </table:table-cell>
          <table:table-cell office:value-type="string" table:style-name="ce1">
            <text:p>carlos.rojas439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20T15:03:00" table:style-name="ce5">
            <text:p>2026-06-20 15:03</text:p>
          </table:table-cell>
          <table:table-cell office:value-type="date" office:date-value="2026-07-07T03:47:00" table:style-name="ce6">
            <text:p>2026-07-07 03:47</text:p>
          </table:table-cell>
          <table:table-cell table:number-columns-repeated="16369"/>
        </table:table-row>
        <table:table-row table:style-name="ro1">
          <table:table-cell office:value-type="float" office:value="440" table:style-name="ce3">
            <text:p>44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02241737</text:p>
          </table:table-cell>
          <table:table-cell office:value-type="string" table:style-name="ce1">
            <text:p>Ricardo Ramírez González</text:p>
          </table:table-cell>
          <table:table-cell office:value-type="date" office:date-value="1972-07-12T00:00:00" table:style-name="ce4">
            <text:p>1972-07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1993026</text:p>
          </table:table-cell>
          <table:table-cell office:value-type="string" table:style-name="ce1">
            <text:p>ricardo.ramirez440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3-25T12:27:00" table:style-name="ce5">
            <text:p>2026-03-25 12:27</text:p>
          </table:table-cell>
          <table:table-cell office:value-type="date" office:date-value="2026-07-07T04:18:00" table:style-name="ce6">
            <text:p>2026-07-07 04:18</text:p>
          </table:table-cell>
          <table:table-cell table:number-columns-repeated="16369"/>
        </table:table-row>
        <table:table-row table:style-name="ro1">
          <table:table-cell office:value-type="float" office:value="441" table:style-name="ce3">
            <text:p>44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24839781</text:p>
          </table:table-cell>
          <table:table-cell office:value-type="string" table:style-name="ce1">
            <text:p>Laura Jiménez Castro</text:p>
          </table:table-cell>
          <table:table-cell office:value-type="date" office:date-value="2004-02-26T00:00:00" table:style-name="ce4">
            <text:p>2004-02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4453862</text:p>
          </table:table-cell>
          <table:table-cell office:value-type="string" table:style-name="ce1">
            <text:p>laura.jimenez441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10T04:01:00" table:style-name="ce5">
            <text:p>2026-05-10 04:01</text:p>
          </table:table-cell>
          <table:table-cell office:value-type="date" office:date-value="2026-07-08T02:49:00" table:style-name="ce6">
            <text:p>2026-07-08 02:49</text:p>
          </table:table-cell>
          <table:table-cell table:number-columns-repeated="16369"/>
        </table:table-row>
        <table:table-row table:style-name="ro1">
          <table:table-cell office:value-type="float" office:value="442" table:style-name="ce3">
            <text:p>44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87980123</text:p>
          </table:table-cell>
          <table:table-cell office:value-type="string" table:style-name="ce1">
            <text:p>Valentina Hernández Restrepo</text:p>
          </table:table-cell>
          <table:table-cell office:value-type="date" office:date-value="2000-09-06T00:00:00" table:style-name="ce4">
            <text:p>2000-09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5106426</text:p>
          </table:table-cell>
          <table:table-cell office:value-type="string" table:style-name="ce1">
            <text:p>valentina.hernandez44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10T23:00:00" table:style-name="ce5">
            <text:p>2026-05-10 23:00</text:p>
          </table:table-cell>
          <table:table-cell office:value-type="date" office:date-value="2026-06-20T06:35:00" table:style-name="ce6">
            <text:p>2026-06-20 06:35</text:p>
          </table:table-cell>
          <table:table-cell table:number-columns-repeated="16369"/>
        </table:table-row>
        <table:table-row table:style-name="ro1">
          <table:table-cell office:value-type="float" office:value="443" table:style-name="ce3">
            <text:p>44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54537225</text:p>
          </table:table-cell>
          <table:table-cell office:value-type="string" table:style-name="ce1">
            <text:p>Daniela Rodríguez Ramírez</text:p>
          </table:table-cell>
          <table:table-cell office:value-type="date" office:date-value="1976-03-10T00:00:00" table:style-name="ce4">
            <text:p>1976-03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1628940</text:p>
          </table:table-cell>
          <table:table-cell office:value-type="string" table:style-name="ce1">
            <text:p>daniela.rodriguez443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4-16T00:44:00" table:style-name="ce5">
            <text:p>2026-04-16 00:44</text:p>
          </table:table-cell>
          <table:table-cell office:value-type="date" office:date-value="2026-06-07T05:54:00" table:style-name="ce6">
            <text:p>2026-06-07 05:54</text:p>
          </table:table-cell>
          <table:table-cell table:number-columns-repeated="16369"/>
        </table:table-row>
        <table:table-row table:style-name="ro1">
          <table:table-cell office:value-type="float" office:value="444" table:style-name="ce3">
            <text:p>44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60652936</text:p>
          </table:table-cell>
          <table:table-cell office:value-type="string" table:style-name="ce1">
            <text:p>Felipe Silva Jiménez</text:p>
          </table:table-cell>
          <table:table-cell office:value-type="date" office:date-value="2005-10-03T00:00:00" table:style-name="ce4">
            <text:p>2005-10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5583007</text:p>
          </table:table-cell>
          <table:table-cell office:value-type="string" table:style-name="ce1">
            <text:p>felipe.silva444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7-09T02:09:00" table:style-name="ce5">
            <text:p>2026-07-09 02:09</text:p>
          </table:table-cell>
          <table:table-cell office:value-type="date" office:date-value="2026-07-10T09:40:00" table:style-name="ce6">
            <text:p>2026-07-10 09:40</text:p>
          </table:table-cell>
          <table:table-cell table:number-columns-repeated="16369"/>
        </table:table-row>
        <table:table-row table:style-name="ro1">
          <table:table-cell office:value-type="float" office:value="445" table:style-name="ce3">
            <text:p>44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06886512</text:p>
          </table:table-cell>
          <table:table-cell office:value-type="string" table:style-name="ce1">
            <text:p>Jorge Hernández Ramírez</text:p>
          </table:table-cell>
          <table:table-cell office:value-type="date" office:date-value="1960-03-02T00:00:00" table:style-name="ce4">
            <text:p>1960-03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8174081</text:p>
          </table:table-cell>
          <table:table-cell office:value-type="string" table:style-name="ce1">
            <text:p>jorge.hernandez44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03T04:49:00" table:style-name="ce5">
            <text:p>2026-04-03 04:49</text:p>
          </table:table-cell>
          <table:table-cell office:value-type="date" office:date-value="2026-06-29T04:05:00" table:style-name="ce6">
            <text:p>2026-06-29 04:05</text:p>
          </table:table-cell>
          <table:table-cell table:number-columns-repeated="16369"/>
        </table:table-row>
        <table:table-row table:style-name="ro1">
          <table:table-cell office:value-type="float" office:value="446" table:style-name="ce3">
            <text:p>44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62522322</text:p>
          </table:table-cell>
          <table:table-cell office:value-type="string" table:style-name="ce1">
            <text:p>Cristian Castro Ospina</text:p>
          </table:table-cell>
          <table:table-cell office:value-type="date" office:date-value="1973-09-09T00:00:00" table:style-name="ce4">
            <text:p>1973-09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9076078</text:p>
          </table:table-cell>
          <table:table-cell office:value-type="string" table:style-name="ce1">
            <text:p>cristian.castro446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3-19T09:58:00" table:style-name="ce5">
            <text:p>2026-03-19 09:58</text:p>
          </table:table-cell>
          <table:table-cell office:value-type="date" office:date-value="2026-06-07T19:26:00" table:style-name="ce6">
            <text:p>2026-06-07 19:26</text:p>
          </table:table-cell>
          <table:table-cell table:number-columns-repeated="16369"/>
        </table:table-row>
        <table:table-row table:style-name="ro1">
          <table:table-cell office:value-type="float" office:value="447" table:style-name="ce3">
            <text:p>44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61166643</text:p>
          </table:table-cell>
          <table:table-cell office:value-type="string" table:style-name="ce1">
            <text:p>Esteban Ortiz Martínez</text:p>
          </table:table-cell>
          <table:table-cell office:value-type="date" office:date-value="1963-11-04T00:00:00" table:style-name="ce4">
            <text:p>1963-11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7282699</text:p>
          </table:table-cell>
          <table:table-cell office:value-type="string" table:style-name="ce1">
            <text:p>esteban.ortiz447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6-21T11:53:00" table:style-name="ce5">
            <text:p>2026-06-21 11:53</text:p>
          </table:table-cell>
          <table:table-cell office:value-type="date" office:date-value="2026-07-05T23:54:00" table:style-name="ce6">
            <text:p>2026-07-05 23:54</text:p>
          </table:table-cell>
          <table:table-cell table:number-columns-repeated="16369"/>
        </table:table-row>
        <table:table-row table:style-name="ro1">
          <table:table-cell office:value-type="float" office:value="448" table:style-name="ce3">
            <text:p>44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8002490</text:p>
          </table:table-cell>
          <table:table-cell office:value-type="string" table:style-name="ce1">
            <text:p>Catalina Castaño Pérez</text:p>
          </table:table-cell>
          <table:table-cell office:value-type="date" office:date-value="1993-04-09T00:00:00" table:style-name="ce4">
            <text:p>1993-04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9654127</text:p>
          </table:table-cell>
          <table:table-cell office:value-type="string" table:style-name="ce1">
            <text:p>catalina.castano448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26T20:25:00" table:style-name="ce5">
            <text:p>2026-05-26 20:25</text:p>
          </table:table-cell>
          <table:table-cell office:value-type="date" office:date-value="2026-07-08T21:28:00" table:style-name="ce6">
            <text:p>2026-07-08 21:28</text:p>
          </table:table-cell>
          <table:table-cell table:number-columns-repeated="16369"/>
        </table:table-row>
        <table:table-row table:style-name="ro1">
          <table:table-cell office:value-type="float" office:value="449" table:style-name="ce3">
            <text:p>44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6906128</text:p>
          </table:table-cell>
          <table:table-cell office:value-type="string" table:style-name="ce1">
            <text:p>Diana López Rodríguez</text:p>
          </table:table-cell>
          <table:table-cell office:value-type="date" office:date-value="1962-02-28T00:00:00" table:style-name="ce4">
            <text:p>1962-02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5785720</text:p>
          </table:table-cell>
          <table:table-cell office:value-type="string" table:style-name="ce1">
            <text:p>diana.lopez449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3-26T00:54:00" table:style-name="ce5">
            <text:p>2026-03-26 00:54</text:p>
          </table:table-cell>
          <table:table-cell office:value-type="date" office:date-value="2026-04-06T02:45:00" table:style-name="ce6">
            <text:p>2026-04-06 02:45</text:p>
          </table:table-cell>
          <table:table-cell table:number-columns-repeated="16369"/>
        </table:table-row>
        <table:table-row table:style-name="ro1">
          <table:table-cell office:value-type="float" office:value="450" table:style-name="ce3">
            <text:p>45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5585832</text:p>
          </table:table-cell>
          <table:table-cell office:value-type="string" table:style-name="ce1">
            <text:p>María Valencia Jiménez</text:p>
          </table:table-cell>
          <table:table-cell office:value-type="date" office:date-value="2001-03-02T00:00:00" table:style-name="ce4">
            <text:p>2001-03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1355236</text:p>
          </table:table-cell>
          <table:table-cell office:value-type="string" table:style-name="ce1">
            <text:p>maria.valencia450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10T08:40:00" table:style-name="ce5">
            <text:p>2026-04-10 08:40</text:p>
          </table:table-cell>
          <table:table-cell office:value-type="date" office:date-value="2026-06-09T23:28:00" table:style-name="ce6">
            <text:p>2026-06-09 23:28</text:p>
          </table:table-cell>
          <table:table-cell table:number-columns-repeated="16369"/>
        </table:table-row>
        <table:table-row table:style-name="ro1">
          <table:table-cell office:value-type="float" office:value="451" table:style-name="ce3">
            <text:p>45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69127531</text:p>
          </table:table-cell>
          <table:table-cell office:value-type="string" table:style-name="ce1">
            <text:p>Juliana Andrea Muñoz Hernández</text:p>
          </table:table-cell>
          <table:table-cell office:value-type="date" office:date-value="1985-08-15T00:00:00" table:style-name="ce4">
            <text:p>1985-08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6704501</text:p>
          </table:table-cell>
          <table:table-cell office:value-type="string" table:style-name="ce1">
            <text:p>juliana.munoz451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25T05:40:00" table:style-name="ce5">
            <text:p>2026-05-25 05:40</text:p>
          </table:table-cell>
          <table:table-cell office:value-type="date" office:date-value="2026-06-04T13:49:00" table:style-name="ce6">
            <text:p>2026-06-04 13:49</text:p>
          </table:table-cell>
          <table:table-cell table:number-columns-repeated="16369"/>
        </table:table-row>
        <table:table-row table:style-name="ro1">
          <table:table-cell office:value-type="float" office:value="452" table:style-name="ce3">
            <text:p>45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56336749</text:p>
          </table:table-cell>
          <table:table-cell office:value-type="string" table:style-name="ce1">
            <text:p>Daniel Muñoz Mendoza</text:p>
          </table:table-cell>
          <table:table-cell office:value-type="date" office:date-value="1995-11-03T00:00:00" table:style-name="ce4">
            <text:p>1995-11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5245945</text:p>
          </table:table-cell>
          <table:table-cell office:value-type="string" table:style-name="ce1">
            <text:p>daniel.munoz45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6-12T07:30:00" table:style-name="ce5">
            <text:p>2026-06-12 07:30</text:p>
          </table:table-cell>
          <table:table-cell office:value-type="date" office:date-value="2026-06-16T23:53:00" table:style-name="ce6">
            <text:p>2026-06-16 23:53</text:p>
          </table:table-cell>
          <table:table-cell table:number-columns-repeated="16369"/>
        </table:table-row>
        <table:table-row table:style-name="ro1">
          <table:table-cell office:value-type="float" office:value="453" table:style-name="ce3">
            <text:p>45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17796062</text:p>
          </table:table-cell>
          <table:table-cell office:value-type="string" table:style-name="ce1">
            <text:p>Carolina Laura Díaz Moreno</text:p>
          </table:table-cell>
          <table:table-cell office:value-type="date" office:date-value="1945-08-20T00:00:00" table:style-name="ce4">
            <text:p>1945-08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3055719</text:p>
          </table:table-cell>
          <table:table-cell office:value-type="string" table:style-name="ce1">
            <text:p>carolina.diaz45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09T04:28:00" table:style-name="ce5">
            <text:p>2026-05-09 04:28</text:p>
          </table:table-cell>
          <table:table-cell office:value-type="date" office:date-value="2026-06-04T13:25:00" table:style-name="ce6">
            <text:p>2026-06-04 13:25</text:p>
          </table:table-cell>
          <table:table-cell table:number-columns-repeated="16369"/>
        </table:table-row>
        <table:table-row table:style-name="ro1">
          <table:table-cell office:value-type="float" office:value="454" table:style-name="ce3">
            <text:p>45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68262991</text:p>
          </table:table-cell>
          <table:table-cell office:value-type="string" table:style-name="ce1">
            <text:p>Daniel Andrés Sánchez Vargas</text:p>
          </table:table-cell>
          <table:table-cell office:value-type="date" office:date-value="1957-12-03T00:00:00" table:style-name="ce4">
            <text:p>1957-12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7677150</text:p>
          </table:table-cell>
          <table:table-cell office:value-type="string" table:style-name="ce1">
            <text:p>daniel.sanchez454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10T20:25:00" table:style-name="ce5">
            <text:p>2026-05-10 20:25</text:p>
          </table:table-cell>
          <table:table-cell office:value-type="date" office:date-value="2026-05-25T17:02:00" table:style-name="ce6">
            <text:p>2026-05-25 17:02</text:p>
          </table:table-cell>
          <table:table-cell table:number-columns-repeated="16369"/>
        </table:table-row>
        <table:table-row table:style-name="ro1">
          <table:table-cell office:value-type="float" office:value="455" table:style-name="ce3">
            <text:p>455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783490796</text:p>
          </table:table-cell>
          <table:table-cell office:value-type="string" table:style-name="ce1">
            <text:p>Felipe Ruiz Martínez</text:p>
          </table:table-cell>
          <table:table-cell office:value-type="date" office:date-value="2011-02-15T00:00:00" table:style-name="ce4">
            <text:p>2011-02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1863647</text:p>
          </table:table-cell>
          <table:table-cell office:value-type="string" table:style-name="ce1">
            <text:p>felipe.ruiz455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24T00:27:00" table:style-name="ce5">
            <text:p>2026-04-24 00:27</text:p>
          </table:table-cell>
          <table:table-cell office:value-type="date" office:date-value="2026-05-13T00:04:00" table:style-name="ce6">
            <text:p>2026-05-13 00:04</text:p>
          </table:table-cell>
          <table:table-cell table:number-columns-repeated="16369"/>
        </table:table-row>
        <table:table-row table:style-name="ro1">
          <table:table-cell office:value-type="float" office:value="456" table:style-name="ce3">
            <text:p>45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0225498</text:p>
          </table:table-cell>
          <table:table-cell office:value-type="string" table:style-name="ce1">
            <text:p>Juliana Paula Ruiz Sánchez</text:p>
          </table:table-cell>
          <table:table-cell office:value-type="date" office:date-value="2006-11-22T00:00:00" table:style-name="ce4">
            <text:p>2006-11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6494806</text:p>
          </table:table-cell>
          <table:table-cell office:value-type="string" table:style-name="ce1">
            <text:p>juliana.ruiz456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3-16T15:52:00" table:style-name="ce5">
            <text:p>2026-03-16 15:52</text:p>
          </table:table-cell>
          <table:table-cell office:value-type="date" office:date-value="2026-04-26T13:39:00" table:style-name="ce6">
            <text:p>2026-04-26 13:39</text:p>
          </table:table-cell>
          <table:table-cell table:number-columns-repeated="16369"/>
        </table:table-row>
        <table:table-row table:style-name="ro1">
          <table:table-cell office:value-type="float" office:value="457" table:style-name="ce3">
            <text:p>45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74519770</text:p>
          </table:table-cell>
          <table:table-cell office:value-type="string" table:style-name="ce1">
            <text:p>Andrea Martínez Cárdenas</text:p>
          </table:table-cell>
          <table:table-cell office:value-type="date" office:date-value="1948-07-04T00:00:00" table:style-name="ce4">
            <text:p>1948-07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8262308</text:p>
          </table:table-cell>
          <table:table-cell office:value-type="string" table:style-name="ce1">
            <text:p>andrea.martinez457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18T18:18:00" table:style-name="ce5">
            <text:p>2026-06-18 18:18</text:p>
          </table:table-cell>
          <table:table-cell office:value-type="date" office:date-value="2026-07-03T13:03:00" table:style-name="ce6">
            <text:p>2026-07-03 13:03</text:p>
          </table:table-cell>
          <table:table-cell table:number-columns-repeated="16369"/>
        </table:table-row>
        <table:table-row table:style-name="ro1">
          <table:table-cell office:value-type="float" office:value="458" table:style-name="ce3">
            <text:p>45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2241489</text:p>
          </table:table-cell>
          <table:table-cell office:value-type="string" table:style-name="ce1">
            <text:p>María Sánchez Jiménez</text:p>
          </table:table-cell>
          <table:table-cell office:value-type="date" office:date-value="2003-11-23T00:00:00" table:style-name="ce4">
            <text:p>2003-11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8568573</text:p>
          </table:table-cell>
          <table:table-cell office:value-type="string" table:style-name="ce1">
            <text:p>maria.sanchez45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3-20T21:06:00" table:style-name="ce5">
            <text:p>2026-03-20 21:06</text:p>
          </table:table-cell>
          <table:table-cell office:value-type="date" office:date-value="2026-05-17T11:50:00" table:style-name="ce6">
            <text:p>2026-05-17 11:50</text:p>
          </table:table-cell>
          <table:table-cell table:number-columns-repeated="16369"/>
        </table:table-row>
        <table:table-row table:style-name="ro1">
          <table:table-cell office:value-type="float" office:value="459" table:style-name="ce3">
            <text:p>459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72332993</text:p>
          </table:table-cell>
          <table:table-cell office:value-type="string" table:style-name="ce1">
            <text:p>Cristian Alejandro López González</text:p>
          </table:table-cell>
          <table:table-cell office:value-type="date" office:date-value="1988-06-03T00:00:00" table:style-name="ce4">
            <text:p>1988-06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2831679</text:p>
          </table:table-cell>
          <table:table-cell office:value-type="string" table:style-name="ce1">
            <text:p>cristian.lopez459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22T23:43:00" table:style-name="ce5">
            <text:p>2026-05-22 23:43</text:p>
          </table:table-cell>
          <table:table-cell office:value-type="date" office:date-value="2026-06-23T14:44:00" table:style-name="ce6">
            <text:p>2026-06-23 14:44</text:p>
          </table:table-cell>
          <table:table-cell table:number-columns-repeated="16369"/>
        </table:table-row>
        <table:table-row table:style-name="ro1">
          <table:table-cell office:value-type="float" office:value="460" table:style-name="ce3">
            <text:p>46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58396454</text:p>
          </table:table-cell>
          <table:table-cell office:value-type="string" table:style-name="ce1">
            <text:p>Gabriela Castaño Rodríguez</text:p>
          </table:table-cell>
          <table:table-cell office:value-type="date" office:date-value="1973-02-20T00:00:00" table:style-name="ce4">
            <text:p>1973-02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8180173</text:p>
          </table:table-cell>
          <table:table-cell office:value-type="string" table:style-name="ce1">
            <text:p>gabriela.castano460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14T09:40:00" table:style-name="ce5">
            <text:p>2026-06-14 09:40</text:p>
          </table:table-cell>
          <table:table-cell office:value-type="date" office:date-value="2026-06-18T23:46:00" table:style-name="ce6">
            <text:p>2026-06-18 23:46</text:p>
          </table:table-cell>
          <table:table-cell table:number-columns-repeated="16369"/>
        </table:table-row>
        <table:table-row table:style-name="ro1">
          <table:table-cell office:value-type="float" office:value="461" table:style-name="ce3">
            <text:p>46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71268473</text:p>
          </table:table-cell>
          <table:table-cell office:value-type="string" table:style-name="ce1">
            <text:p>María Moreno Pérez</text:p>
          </table:table-cell>
          <table:table-cell office:value-type="date" office:date-value="1959-12-25T00:00:00" table:style-name="ce4">
            <text:p>1959-12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5337531</text:p>
          </table:table-cell>
          <table:table-cell office:value-type="string" table:style-name="ce1">
            <text:p>maria.moreno461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6-26T14:47:00" table:style-name="ce5">
            <text:p>2026-06-26 14:47</text:p>
          </table:table-cell>
          <table:table-cell office:value-type="date" office:date-value="2026-07-07T10:32:00" table:style-name="ce6">
            <text:p>2026-07-07 10:32</text:p>
          </table:table-cell>
          <table:table-cell table:number-columns-repeated="16369"/>
        </table:table-row>
        <table:table-row table:style-name="ro1">
          <table:table-cell office:value-type="float" office:value="462" table:style-name="ce3">
            <text:p>46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773282358</text:p>
          </table:table-cell>
          <table:table-cell office:value-type="string" table:style-name="ce1">
            <text:p>Diana Juliana Giraldo Rodríguez</text:p>
          </table:table-cell>
          <table:table-cell office:value-type="date" office:date-value="2009-12-26T00:00:00" table:style-name="ce4">
            <text:p>2009-12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1508973</text:p>
          </table:table-cell>
          <table:table-cell office:value-type="string" table:style-name="ce1">
            <text:p>diana.giraldo46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07T07:37:00" table:style-name="ce5">
            <text:p>2026-06-07 07:37</text:p>
          </table:table-cell>
          <table:table-cell office:value-type="date" office:date-value="2026-06-21T07:01:00" table:style-name="ce6">
            <text:p>2026-06-21 07:01</text:p>
          </table:table-cell>
          <table:table-cell table:number-columns-repeated="16369"/>
        </table:table-row>
        <table:table-row table:style-name="ro1">
          <table:table-cell office:value-type="float" office:value="463" table:style-name="ce3">
            <text:p>46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85141299</text:p>
          </table:table-cell>
          <table:table-cell office:value-type="string" table:style-name="ce1">
            <text:p>Santiago Giraldo Rojas</text:p>
          </table:table-cell>
          <table:table-cell office:value-type="date" office:date-value="1960-08-20T00:00:00" table:style-name="ce4">
            <text:p>1960-08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1034767</text:p>
          </table:table-cell>
          <table:table-cell office:value-type="string" table:style-name="ce1">
            <text:p>santiago.giraldo463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7-05T20:48:00" table:style-name="ce5">
            <text:p>2026-07-05 20:48</text:p>
          </table:table-cell>
          <table:table-cell office:value-type="date" office:date-value="2026-07-07T03:56:00" table:style-name="ce6">
            <text:p>2026-07-07 03:56</text:p>
          </table:table-cell>
          <table:table-cell table:number-columns-repeated="16369"/>
        </table:table-row>
        <table:table-row table:style-name="ro1">
          <table:table-cell office:value-type="float" office:value="464" table:style-name="ce3">
            <text:p>46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7979792</text:p>
          </table:table-cell>
          <table:table-cell office:value-type="string" table:style-name="ce1">
            <text:p>Juan Romero Valencia</text:p>
          </table:table-cell>
          <table:table-cell office:value-type="date" office:date-value="1982-04-12T00:00:00" table:style-name="ce4">
            <text:p>1982-04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7197925</text:p>
          </table:table-cell>
          <table:table-cell office:value-type="string" table:style-name="ce1">
            <text:p>juan.romero46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5-22T03:10:00" table:style-name="ce5">
            <text:p>2026-05-22 03:10</text:p>
          </table:table-cell>
          <table:table-cell office:value-type="date" office:date-value="2026-06-25T16:08:00" table:style-name="ce6">
            <text:p>2026-06-25 16:08</text:p>
          </table:table-cell>
          <table:table-cell table:number-columns-repeated="16369"/>
        </table:table-row>
        <table:table-row table:style-name="ro1">
          <table:table-cell office:value-type="float" office:value="465" table:style-name="ce3">
            <text:p>46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99746181</text:p>
          </table:table-cell>
          <table:table-cell office:value-type="string" table:style-name="ce1">
            <text:p>Ricardo Hernández Castaño</text:p>
          </table:table-cell>
          <table:table-cell office:value-type="date" office:date-value="1996-05-28T00:00:00" table:style-name="ce4">
            <text:p>1996-05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6474507</text:p>
          </table:table-cell>
          <table:table-cell office:value-type="string" table:style-name="ce1">
            <text:p>ricardo.hernandez46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03T19:30:00" table:style-name="ce5">
            <text:p>2026-06-03 19:30</text:p>
          </table:table-cell>
          <table:table-cell office:value-type="date" office:date-value="2026-06-03T20:52:00" table:style-name="ce6">
            <text:p>2026-06-03 20:52</text:p>
          </table:table-cell>
          <table:table-cell table:number-columns-repeated="16369"/>
        </table:table-row>
        <table:table-row table:style-name="ro1">
          <table:table-cell office:value-type="float" office:value="466" table:style-name="ce3">
            <text:p>46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71176250</text:p>
          </table:table-cell>
          <table:table-cell office:value-type="string" table:style-name="ce1">
            <text:p>Julián Sánchez Torres</text:p>
          </table:table-cell>
          <table:table-cell office:value-type="date" office:date-value="1999-09-01T00:00:00" table:style-name="ce4">
            <text:p>1999-09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7557856</text:p>
          </table:table-cell>
          <table:table-cell office:value-type="string" table:style-name="ce1">
            <text:p>julian.sanchez466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21T02:43:00" table:style-name="ce5">
            <text:p>2026-04-21 02:43</text:p>
          </table:table-cell>
          <table:table-cell office:value-type="date" office:date-value="2026-04-23T22:26:00" table:style-name="ce6">
            <text:p>2026-04-23 22:26</text:p>
          </table:table-cell>
          <table:table-cell table:number-columns-repeated="16369"/>
        </table:table-row>
        <table:table-row table:style-name="ro1">
          <table:table-cell office:value-type="float" office:value="467" table:style-name="ce3">
            <text:p>46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95949712</text:p>
          </table:table-cell>
          <table:table-cell office:value-type="string" table:style-name="ce1">
            <text:p>Alejandro Sánchez Ortiz</text:p>
          </table:table-cell>
          <table:table-cell office:value-type="date" office:date-value="1978-12-10T00:00:00" table:style-name="ce4">
            <text:p>1978-12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8895679</text:p>
          </table:table-cell>
          <table:table-cell office:value-type="string" table:style-name="ce1">
            <text:p>alejandro.sanchez46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15T17:46:00" table:style-name="ce5">
            <text:p>2026-05-15 17:46</text:p>
          </table:table-cell>
          <table:table-cell office:value-type="date" office:date-value="2026-06-01T23:23:00" table:style-name="ce6">
            <text:p>2026-06-01 23:23</text:p>
          </table:table-cell>
          <table:table-cell table:number-columns-repeated="16369"/>
        </table:table-row>
        <table:table-row table:style-name="ro1">
          <table:table-cell office:value-type="float" office:value="468" table:style-name="ce3">
            <text:p>46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72219592</text:p>
          </table:table-cell>
          <table:table-cell office:value-type="string" table:style-name="ce1">
            <text:p>Cristian Castaño Muñoz</text:p>
          </table:table-cell>
          <table:table-cell office:value-type="date" office:date-value="1989-06-23T00:00:00" table:style-name="ce4">
            <text:p>1989-06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5514263</text:p>
          </table:table-cell>
          <table:table-cell office:value-type="string" table:style-name="ce1">
            <text:p>cristian.castano46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3-25T06:53:00" table:style-name="ce5">
            <text:p>2026-03-25 06:53</text:p>
          </table:table-cell>
          <table:table-cell office:value-type="date" office:date-value="2026-05-14T18:37:00" table:style-name="ce6">
            <text:p>2026-05-14 18:37</text:p>
          </table:table-cell>
          <table:table-cell table:number-columns-repeated="16369"/>
        </table:table-row>
        <table:table-row table:style-name="ro1">
          <table:table-cell office:value-type="float" office:value="469" table:style-name="ce3">
            <text:p>46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01247509</text:p>
          </table:table-cell>
          <table:table-cell office:value-type="string" table:style-name="ce1">
            <text:p>Camila Gabriela Castaño Restrepo</text:p>
          </table:table-cell>
          <table:table-cell office:value-type="date" office:date-value="1977-05-12T00:00:00" table:style-name="ce4">
            <text:p>1977-05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1091611</text:p>
          </table:table-cell>
          <table:table-cell office:value-type="string" table:style-name="ce1">
            <text:p>camila.castano469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01T07:44:00" table:style-name="ce5">
            <text:p>2026-04-01 07:44</text:p>
          </table:table-cell>
          <table:table-cell office:value-type="date" office:date-value="2026-06-28T02:47:00" table:style-name="ce6">
            <text:p>2026-06-28 02:47</text:p>
          </table:table-cell>
          <table:table-cell table:number-columns-repeated="16369"/>
        </table:table-row>
        <table:table-row table:style-name="ro1">
          <table:table-cell office:value-type="float" office:value="470" table:style-name="ce3">
            <text:p>47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5945245</text:p>
          </table:table-cell>
          <table:table-cell office:value-type="string" table:style-name="ce1">
            <text:p>Daniela Cárdenas Díaz</text:p>
          </table:table-cell>
          <table:table-cell office:value-type="date" office:date-value="1975-12-04T00:00:00" table:style-name="ce4">
            <text:p>1975-12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8139643</text:p>
          </table:table-cell>
          <table:table-cell office:value-type="string" table:style-name="ce1">
            <text:p>daniela.cardenas470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19T00:43:00" table:style-name="ce5">
            <text:p>2026-06-19 00:43</text:p>
          </table:table-cell>
          <table:table-cell office:value-type="date" office:date-value="2026-07-06T03:36:00" table:style-name="ce6">
            <text:p>2026-07-06 03:36</text:p>
          </table:table-cell>
          <table:table-cell table:number-columns-repeated="16369"/>
        </table:table-row>
        <table:table-row table:style-name="ro1">
          <table:table-cell office:value-type="float" office:value="471" table:style-name="ce3">
            <text:p>47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67972135</text:p>
          </table:table-cell>
          <table:table-cell office:value-type="string" table:style-name="ce1">
            <text:p>Andrea Álvarez Romero</text:p>
          </table:table-cell>
          <table:table-cell office:value-type="date" office:date-value="1981-08-31T00:00:00" table:style-name="ce4">
            <text:p>1981-08-3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4724719</text:p>
          </table:table-cell>
          <table:table-cell office:value-type="string" table:style-name="ce1">
            <text:p>andrea.alvarez47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16T18:38:00" table:style-name="ce5">
            <text:p>2026-04-16 18:38</text:p>
          </table:table-cell>
          <table:table-cell office:value-type="date" office:date-value="2026-06-20T10:44:00" table:style-name="ce6">
            <text:p>2026-06-20 10:44</text:p>
          </table:table-cell>
          <table:table-cell table:number-columns-repeated="16369"/>
        </table:table-row>
        <table:table-row table:style-name="ro1">
          <table:table-cell office:value-type="float" office:value="472" table:style-name="ce3">
            <text:p>47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9492482</text:p>
          </table:table-cell>
          <table:table-cell office:value-type="string" table:style-name="ce1">
            <text:p>Esteban Ruiz Muñoz</text:p>
          </table:table-cell>
          <table:table-cell office:value-type="date" office:date-value="2012-03-24T00:00:00" table:style-name="ce4">
            <text:p>2012-03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4975740</text:p>
          </table:table-cell>
          <table:table-cell office:value-type="string" table:style-name="ce1">
            <text:p>esteban.ruiz472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07T06:24:00" table:style-name="ce5">
            <text:p>2026-06-07 06:24</text:p>
          </table:table-cell>
          <table:table-cell office:value-type="date" office:date-value="2026-07-07T21:36:00" table:style-name="ce6">
            <text:p>2026-07-07 21:36</text:p>
          </table:table-cell>
          <table:table-cell table:number-columns-repeated="16369"/>
        </table:table-row>
        <table:table-row table:style-name="ro1">
          <table:table-cell office:value-type="float" office:value="473" table:style-name="ce3">
            <text:p>47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55297304</text:p>
          </table:table-cell>
          <table:table-cell office:value-type="string" table:style-name="ce1">
            <text:p>Natalia Hernández Jiménez</text:p>
          </table:table-cell>
          <table:table-cell office:value-type="date" office:date-value="1999-07-27T00:00:00" table:style-name="ce4">
            <text:p>1999-07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3346035</text:p>
          </table:table-cell>
          <table:table-cell office:value-type="string" table:style-name="ce1">
            <text:p>natalia.hernandez473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3-13T17:21:00" table:style-name="ce5">
            <text:p>2026-03-13 17:21</text:p>
          </table:table-cell>
          <table:table-cell office:value-type="date" office:date-value="2026-06-22T10:35:00" table:style-name="ce6">
            <text:p>2026-06-22 10:35</text:p>
          </table:table-cell>
          <table:table-cell table:number-columns-repeated="16369"/>
        </table:table-row>
        <table:table-row table:style-name="ro1">
          <table:table-cell office:value-type="float" office:value="474" table:style-name="ce3">
            <text:p>47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246975939</text:p>
          </table:table-cell>
          <table:table-cell office:value-type="string" table:style-name="ce1">
            <text:p>Daniela Silva García</text:p>
          </table:table-cell>
          <table:table-cell office:value-type="date" office:date-value="2012-08-26T00:00:00" table:style-name="ce4">
            <text:p>2012-08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6471265</text:p>
          </table:table-cell>
          <table:table-cell office:value-type="string" table:style-name="ce1">
            <text:p>daniela.silva47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14T15:29:00" table:style-name="ce5">
            <text:p>2026-05-14 15:29</text:p>
          </table:table-cell>
          <table:table-cell office:value-type="date" office:date-value="2026-06-23T13:56:00" table:style-name="ce6">
            <text:p>2026-06-23 13:56</text:p>
          </table:table-cell>
          <table:table-cell table:number-columns-repeated="16369"/>
        </table:table-row>
        <table:table-row table:style-name="ro1">
          <table:table-cell office:value-type="float" office:value="475" table:style-name="ce3">
            <text:p>47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7333122</text:p>
          </table:table-cell>
          <table:table-cell office:value-type="string" table:style-name="ce1">
            <text:p>Natalia Restrepo Romero</text:p>
          </table:table-cell>
          <table:table-cell office:value-type="date" office:date-value="1963-09-05T00:00:00" table:style-name="ce4">
            <text:p>1963-09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7740943</text:p>
          </table:table-cell>
          <table:table-cell office:value-type="string" table:style-name="ce1">
            <text:p>natalia.restrepo475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06T00:46:00" table:style-name="ce5">
            <text:p>2026-04-06 00:46</text:p>
          </table:table-cell>
          <table:table-cell office:value-type="date" office:date-value="2026-07-02T01:10:00" table:style-name="ce6">
            <text:p>2026-07-02 01:10</text:p>
          </table:table-cell>
          <table:table-cell table:number-columns-repeated="16369"/>
        </table:table-row>
        <table:table-row table:style-name="ro1">
          <table:table-cell office:value-type="float" office:value="476" table:style-name="ce3">
            <text:p>47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3756249</text:p>
          </table:table-cell>
          <table:table-cell office:value-type="string" table:style-name="ce1">
            <text:p>Daniela Pérez Rojas</text:p>
          </table:table-cell>
          <table:table-cell office:value-type="date" office:date-value="1969-10-18T00:00:00" table:style-name="ce4">
            <text:p>1969-10-1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4545029</text:p>
          </table:table-cell>
          <table:table-cell office:value-type="string" table:style-name="ce1">
            <text:p>daniela.perez476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01T10:44:00" table:style-name="ce5">
            <text:p>2026-04-01 10:44</text:p>
          </table:table-cell>
          <table:table-cell office:value-type="date" office:date-value="2026-07-06T18:06:00" table:style-name="ce6">
            <text:p>2026-07-06 18:06</text:p>
          </table:table-cell>
          <table:table-cell table:number-columns-repeated="16369"/>
        </table:table-row>
        <table:table-row table:style-name="ro1">
          <table:table-cell office:value-type="float" office:value="477" table:style-name="ce3">
            <text:p>47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0438641</text:p>
          </table:table-cell>
          <table:table-cell office:value-type="string" table:style-name="ce1">
            <text:p>Santiago Moreno Vargas</text:p>
          </table:table-cell>
          <table:table-cell office:value-type="date" office:date-value="1996-03-21T00:00:00" table:style-name="ce4">
            <text:p>1996-03-2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4240991</text:p>
          </table:table-cell>
          <table:table-cell office:value-type="string" table:style-name="ce1">
            <text:p>santiago.moreno47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17T01:43:00" table:style-name="ce5">
            <text:p>2026-03-17 01:43</text:p>
          </table:table-cell>
          <table:table-cell office:value-type="date" office:date-value="2026-04-27T01:32:00" table:style-name="ce6">
            <text:p>2026-04-27 01:32</text:p>
          </table:table-cell>
          <table:table-cell table:number-columns-repeated="16369"/>
        </table:table-row>
        <table:table-row table:style-name="ro1">
          <table:table-cell office:value-type="float" office:value="478" table:style-name="ce3">
            <text:p>478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87302197</text:p>
          </table:table-cell>
          <table:table-cell office:value-type="string" table:style-name="ce1">
            <text:p>Carlos Pérez López</text:p>
          </table:table-cell>
          <table:table-cell office:value-type="date" office:date-value="2021-03-03T00:00:00" table:style-name="ce4">
            <text:p>2021-03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3840663</text:p>
          </table:table-cell>
          <table:table-cell office:value-type="string" table:style-name="ce1">
            <text:p>carlos.perez478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08T09:54:00" table:style-name="ce5">
            <text:p>2026-06-08 09:54</text:p>
          </table:table-cell>
          <table:table-cell office:value-type="date" office:date-value="2026-07-04T06:06:00" table:style-name="ce6">
            <text:p>2026-07-04 06:06</text:p>
          </table:table-cell>
          <table:table-cell table:number-columns-repeated="16369"/>
        </table:table-row>
        <table:table-row table:style-name="ro1">
          <table:table-cell office:value-type="float" office:value="479" table:style-name="ce3">
            <text:p>47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8497221</text:p>
          </table:table-cell>
          <table:table-cell office:value-type="string" table:style-name="ce1">
            <text:p>Sara Ramírez Giraldo</text:p>
          </table:table-cell>
          <table:table-cell office:value-type="date" office:date-value="1979-09-30T00:00:00" table:style-name="ce4">
            <text:p>1979-09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8721418</text:p>
          </table:table-cell>
          <table:table-cell office:value-type="string" table:style-name="ce1">
            <text:p>sara.ramirez479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3-23T15:27:00" table:style-name="ce5">
            <text:p>2026-03-23 15:27</text:p>
          </table:table-cell>
          <table:table-cell office:value-type="date" office:date-value="2026-06-05T03:52:00" table:style-name="ce6">
            <text:p>2026-06-05 03:52</text:p>
          </table:table-cell>
          <table:table-cell table:number-columns-repeated="16369"/>
        </table:table-row>
        <table:table-row table:style-name="ro1">
          <table:table-cell office:value-type="float" office:value="480" table:style-name="ce3">
            <text:p>48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68170244</text:p>
          </table:table-cell>
          <table:table-cell office:value-type="string" table:style-name="ce1">
            <text:p>Juan Sánchez Castro</text:p>
          </table:table-cell>
          <table:table-cell office:value-type="date" office:date-value="1987-01-02T00:00:00" table:style-name="ce4">
            <text:p>1987-01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9909499</text:p>
          </table:table-cell>
          <table:table-cell office:value-type="string" table:style-name="ce1">
            <text:p>juan.sanchez480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30T15:08:00" table:style-name="ce5">
            <text:p>2026-06-30 15:08</text:p>
          </table:table-cell>
          <table:table-cell office:value-type="date" office:date-value="2026-07-04T14:43:00" table:style-name="ce6">
            <text:p>2026-07-04 14:43</text:p>
          </table:table-cell>
          <table:table-cell table:number-columns-repeated="16369"/>
        </table:table-row>
        <table:table-row table:style-name="ro1">
          <table:table-cell office:value-type="float" office:value="481" table:style-name="ce3">
            <text:p>48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2550495</text:p>
          </table:table-cell>
          <table:table-cell office:value-type="string" table:style-name="ce1">
            <text:p>Esteban David Quintero Ospina</text:p>
          </table:table-cell>
          <table:table-cell office:value-type="date" office:date-value="1981-01-23T00:00:00" table:style-name="ce4">
            <text:p>1981-01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2020279</text:p>
          </table:table-cell>
          <table:table-cell office:value-type="string" table:style-name="ce1">
            <text:p>esteban.quintero481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4-28T13:19:00" table:style-name="ce5">
            <text:p>2026-04-28 13:19</text:p>
          </table:table-cell>
          <table:table-cell office:value-type="date" office:date-value="2026-06-07T17:09:00" table:style-name="ce6">
            <text:p>2026-06-07 17:09</text:p>
          </table:table-cell>
          <table:table-cell table:number-columns-repeated="16369"/>
        </table:table-row>
        <table:table-row table:style-name="ro1">
          <table:table-cell office:value-type="float" office:value="482" table:style-name="ce3">
            <text:p>48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2688817</text:p>
          </table:table-cell>
          <table:table-cell office:value-type="string" table:style-name="ce1">
            <text:p>Alejandro Mendoza Ruiz</text:p>
          </table:table-cell>
          <table:table-cell office:value-type="date" office:date-value="1963-11-13T00:00:00" table:style-name="ce4">
            <text:p>1963-11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9372035</text:p>
          </table:table-cell>
          <table:table-cell office:value-type="string" table:style-name="ce1">
            <text:p>alejandro.mendoza48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15T09:12:00" table:style-name="ce5">
            <text:p>2026-04-15 09:12</text:p>
          </table:table-cell>
          <table:table-cell office:value-type="date" office:date-value="2026-06-02T06:09:00" table:style-name="ce6">
            <text:p>2026-06-02 06:09</text:p>
          </table:table-cell>
          <table:table-cell table:number-columns-repeated="16369"/>
        </table:table-row>
        <table:table-row table:style-name="ro1">
          <table:table-cell office:value-type="float" office:value="483" table:style-name="ce3">
            <text:p>48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20190951</text:p>
          </table:table-cell>
          <table:table-cell office:value-type="string" table:style-name="ce1">
            <text:p>Julián Rojas Mendoza</text:p>
          </table:table-cell>
          <table:table-cell office:value-type="date" office:date-value="1987-11-09T00:00:00" table:style-name="ce4">
            <text:p>1987-11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7920877</text:p>
          </table:table-cell>
          <table:table-cell office:value-type="string" table:style-name="ce1">
            <text:p>julian.rojas483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5-04T05:34:00" table:style-name="ce5">
            <text:p>2026-05-04 05:34</text:p>
          </table:table-cell>
          <table:table-cell office:value-type="date" office:date-value="2026-06-30T14:37:00" table:style-name="ce6">
            <text:p>2026-06-30 14:37</text:p>
          </table:table-cell>
          <table:table-cell table:number-columns-repeated="16369"/>
        </table:table-row>
        <table:table-row table:style-name="ro1">
          <table:table-cell office:value-type="float" office:value="484" table:style-name="ce3">
            <text:p>48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06072928</text:p>
          </table:table-cell>
          <table:table-cell office:value-type="string" table:style-name="ce1">
            <text:p>Andrea Laura Castro López</text:p>
          </table:table-cell>
          <table:table-cell office:value-type="date" office:date-value="1996-06-21T00:00:00" table:style-name="ce4">
            <text:p>1996-06-2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2036711</text:p>
          </table:table-cell>
          <table:table-cell office:value-type="string" table:style-name="ce1">
            <text:p>andrea.castro48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29T02:24:00" table:style-name="ce5">
            <text:p>2026-06-29 02:24</text:p>
          </table:table-cell>
          <table:table-cell office:value-type="date" office:date-value="2026-07-05T12:57:00" table:style-name="ce6">
            <text:p>2026-07-05 12:57</text:p>
          </table:table-cell>
          <table:table-cell table:number-columns-repeated="16369"/>
        </table:table-row>
        <table:table-row table:style-name="ro1">
          <table:table-cell office:value-type="float" office:value="485" table:style-name="ce3">
            <text:p>48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94082578</text:p>
          </table:table-cell>
          <table:table-cell office:value-type="string" table:style-name="ce1">
            <text:p>Andrea Moreno Quintero</text:p>
          </table:table-cell>
          <table:table-cell office:value-type="date" office:date-value="2006-03-01T00:00:00" table:style-name="ce4">
            <text:p>2006-03-0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5373450</text:p>
          </table:table-cell>
          <table:table-cell office:value-type="string" table:style-name="ce1">
            <text:p>andrea.moreno485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28T10:27:00" table:style-name="ce5">
            <text:p>2026-06-28 10:27</text:p>
          </table:table-cell>
          <table:table-cell office:value-type="date" office:date-value="2026-07-07T13:26:00" table:style-name="ce6">
            <text:p>2026-07-07 13:26</text:p>
          </table:table-cell>
          <table:table-cell table:number-columns-repeated="16369"/>
        </table:table-row>
        <table:table-row table:style-name="ro1">
          <table:table-cell office:value-type="float" office:value="486" table:style-name="ce3">
            <text:p>48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7780680</text:p>
          </table:table-cell>
          <table:table-cell office:value-type="string" table:style-name="ce1">
            <text:p>Sebastián Nicolás Álvarez Muñoz</text:p>
          </table:table-cell>
          <table:table-cell office:value-type="date" office:date-value="1959-11-30T00:00:00" table:style-name="ce4">
            <text:p>1959-11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3085102</text:p>
          </table:table-cell>
          <table:table-cell office:value-type="string" table:style-name="ce1">
            <text:p>sebastian.alvarez48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5-08T21:12:00" table:style-name="ce5">
            <text:p>2026-05-08 21:12</text:p>
          </table:table-cell>
          <table:table-cell office:value-type="date" office:date-value="2026-06-01T03:19:00" table:style-name="ce6">
            <text:p>2026-06-01 03:19</text:p>
          </table:table-cell>
          <table:table-cell table:number-columns-repeated="16369"/>
        </table:table-row>
        <table:table-row table:style-name="ro1">
          <table:table-cell office:value-type="float" office:value="487" table:style-name="ce3">
            <text:p>48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07315998</text:p>
          </table:table-cell>
          <table:table-cell office:value-type="string" table:style-name="ce1">
            <text:p>Esteban Rodríguez Mendoza</text:p>
          </table:table-cell>
          <table:table-cell office:value-type="date" office:date-value="1979-12-16T00:00:00" table:style-name="ce4">
            <text:p>1979-12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6743239</text:p>
          </table:table-cell>
          <table:table-cell office:value-type="string" table:style-name="ce1">
            <text:p>esteban.rodriguez48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4-05T23:10:00" table:style-name="ce5">
            <text:p>2026-04-05 23:10</text:p>
          </table:table-cell>
          <table:table-cell office:value-type="date" office:date-value="2026-04-22T00:30:00" table:style-name="ce6">
            <text:p>2026-04-22 00:30</text:p>
          </table:table-cell>
          <table:table-cell table:number-columns-repeated="16369"/>
        </table:table-row>
        <table:table-row table:style-name="ro1">
          <table:table-cell office:value-type="float" office:value="488" table:style-name="ce3">
            <text:p>488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99422109</text:p>
          </table:table-cell>
          <table:table-cell office:value-type="string" table:style-name="ce1">
            <text:p>Catalina Ramírez Castaño</text:p>
          </table:table-cell>
          <table:table-cell office:value-type="date" office:date-value="2010-04-28T00:00:00" table:style-name="ce4">
            <text:p>2010-04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9002434</text:p>
          </table:table-cell>
          <table:table-cell office:value-type="string" table:style-name="ce1">
            <text:p>catalina.ramirez488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6-01T06:33:00" table:style-name="ce5">
            <text:p>2026-06-01 06:33</text:p>
          </table:table-cell>
          <table:table-cell office:value-type="date" office:date-value="2026-07-02T14:30:00" table:style-name="ce6">
            <text:p>2026-07-02 14:30</text:p>
          </table:table-cell>
          <table:table-cell table:number-columns-repeated="16369"/>
        </table:table-row>
        <table:table-row table:style-name="ro1">
          <table:table-cell office:value-type="float" office:value="489" table:style-name="ce3">
            <text:p>48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71642013</text:p>
          </table:table-cell>
          <table:table-cell office:value-type="string" table:style-name="ce1">
            <text:p>Andrea Castaño Hernández</text:p>
          </table:table-cell>
          <table:table-cell office:value-type="date" office:date-value="1950-03-23T00:00:00" table:style-name="ce4">
            <text:p>1950-03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6007295</text:p>
          </table:table-cell>
          <table:table-cell office:value-type="string" table:style-name="ce1">
            <text:p>andrea.castano48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02T09:12:00" table:style-name="ce5">
            <text:p>2026-06-02 09:12</text:p>
          </table:table-cell>
          <table:table-cell office:value-type="date" office:date-value="2026-07-09T19:11:00" table:style-name="ce6">
            <text:p>2026-07-09 19:11</text:p>
          </table:table-cell>
          <table:table-cell table:number-columns-repeated="16369"/>
        </table:table-row>
        <table:table-row table:style-name="ro1">
          <table:table-cell office:value-type="float" office:value="490" table:style-name="ce3">
            <text:p>49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17181496</text:p>
          </table:table-cell>
          <table:table-cell office:value-type="string" table:style-name="ce1">
            <text:p>Alejandro Moreno Ruiz</text:p>
          </table:table-cell>
          <table:table-cell office:value-type="date" office:date-value="1955-03-03T00:00:00" table:style-name="ce4">
            <text:p>1955-03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7945154</text:p>
          </table:table-cell>
          <table:table-cell office:value-type="string" table:style-name="ce1">
            <text:p>alejandro.moreno490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01T19:11:00" table:style-name="ce5">
            <text:p>2026-06-01 19:11</text:p>
          </table:table-cell>
          <table:table-cell office:value-type="date" office:date-value="2026-07-06T20:20:00" table:style-name="ce6">
            <text:p>2026-07-06 20:20</text:p>
          </table:table-cell>
          <table:table-cell table:number-columns-repeated="16369"/>
        </table:table-row>
        <table:table-row table:style-name="ro1">
          <table:table-cell office:value-type="float" office:value="491" table:style-name="ce3">
            <text:p>49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00009244</text:p>
          </table:table-cell>
          <table:table-cell office:value-type="string" table:style-name="ce1">
            <text:p>Juliana Pérez García</text:p>
          </table:table-cell>
          <table:table-cell office:value-type="date" office:date-value="1954-11-05T00:00:00" table:style-name="ce4">
            <text:p>1954-11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6446811</text:p>
          </table:table-cell>
          <table:table-cell office:value-type="string" table:style-name="ce1">
            <text:p>juliana.perez491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3-25T01:33:00" table:style-name="ce5">
            <text:p>2026-03-25 01:33</text:p>
          </table:table-cell>
          <table:table-cell office:value-type="date" office:date-value="2026-06-29T05:13:00" table:style-name="ce6">
            <text:p>2026-06-29 05:13</text:p>
          </table:table-cell>
          <table:table-cell table:number-columns-repeated="16369"/>
        </table:table-row>
        <table:table-row table:style-name="ro1">
          <table:table-cell office:value-type="float" office:value="492" table:style-name="ce3">
            <text:p>492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736451175</text:p>
          </table:table-cell>
          <table:table-cell office:value-type="string" table:style-name="ce1">
            <text:p>Felipe Santiago Muñoz Mendoza</text:p>
          </table:table-cell>
          <table:table-cell office:value-type="date" office:date-value="1967-06-08T00:00:00" table:style-name="ce4">
            <text:p>1967-06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3450647</text:p>
          </table:table-cell>
          <table:table-cell office:value-type="string" table:style-name="ce1">
            <text:p>felipe.munoz492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19T13:19:00" table:style-name="ce5">
            <text:p>2026-04-19 13:19</text:p>
          </table:table-cell>
          <table:table-cell office:value-type="date" office:date-value="2026-05-28T09:42:00" table:style-name="ce6">
            <text:p>2026-05-28 09:42</text:p>
          </table:table-cell>
          <table:table-cell table:number-columns-repeated="16369"/>
        </table:table-row>
        <table:table-row table:style-name="ro1">
          <table:table-cell office:value-type="float" office:value="493" table:style-name="ce3">
            <text:p>49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53752775</text:p>
          </table:table-cell>
          <table:table-cell office:value-type="string" table:style-name="ce1">
            <text:p>Carlos Restrepo Moreno</text:p>
          </table:table-cell>
          <table:table-cell office:value-type="date" office:date-value="1972-11-26T00:00:00" table:style-name="ce4">
            <text:p>1972-11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9778265</text:p>
          </table:table-cell>
          <table:table-cell office:value-type="string" table:style-name="ce1">
            <text:p>carlos.restrepo49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4-24T06:12:00" table:style-name="ce5">
            <text:p>2026-04-24 06:12</text:p>
          </table:table-cell>
          <table:table-cell office:value-type="date" office:date-value="2026-06-30T11:35:00" table:style-name="ce6">
            <text:p>2026-06-30 11:35</text:p>
          </table:table-cell>
          <table:table-cell table:number-columns-repeated="16369"/>
        </table:table-row>
        <table:table-row table:style-name="ro1">
          <table:table-cell office:value-type="float" office:value="494" table:style-name="ce3">
            <text:p>49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52985040</text:p>
          </table:table-cell>
          <table:table-cell office:value-type="string" table:style-name="ce1">
            <text:p>Santiago López Díaz</text:p>
          </table:table-cell>
          <table:table-cell office:value-type="date" office:date-value="1980-06-01T00:00:00" table:style-name="ce4">
            <text:p>1980-06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7297463</text:p>
          </table:table-cell>
          <table:table-cell office:value-type="string" table:style-name="ce1">
            <text:p>santiago.lopez494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23T17:11:00" table:style-name="ce5">
            <text:p>2026-06-23 17:11</text:p>
          </table:table-cell>
          <table:table-cell office:value-type="date" office:date-value="2026-07-09T16:16:00" table:style-name="ce6">
            <text:p>2026-07-09 16:16</text:p>
          </table:table-cell>
          <table:table-cell table:number-columns-repeated="16369"/>
        </table:table-row>
        <table:table-row table:style-name="ro1">
          <table:table-cell office:value-type="float" office:value="495" table:style-name="ce3">
            <text:p>49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21763430</text:p>
          </table:table-cell>
          <table:table-cell office:value-type="string" table:style-name="ce1">
            <text:p>Ana Manuela Romero Ospina</text:p>
          </table:table-cell>
          <table:table-cell office:value-type="date" office:date-value="1993-03-30T00:00:00" table:style-name="ce4">
            <text:p>1993-03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8098149</text:p>
          </table:table-cell>
          <table:table-cell office:value-type="string" table:style-name="ce1">
            <text:p>ana.romero495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7-09T13:19:00" table:style-name="ce5">
            <text:p>2026-07-09 13:19</text:p>
          </table:table-cell>
          <table:table-cell office:value-type="date" office:date-value="2026-07-09T23:25:00" table:style-name="ce6">
            <text:p>2026-07-09 23:25</text:p>
          </table:table-cell>
          <table:table-cell table:number-columns-repeated="16369"/>
        </table:table-row>
        <table:table-row table:style-name="ro1">
          <table:table-cell office:value-type="float" office:value="496" table:style-name="ce3">
            <text:p>49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80404177</text:p>
          </table:table-cell>
          <table:table-cell office:value-type="string" table:style-name="ce1">
            <text:p>Ricardo Nicolás Ortiz Valencia</text:p>
          </table:table-cell>
          <table:table-cell office:value-type="date" office:date-value="2001-10-10T00:00:00" table:style-name="ce4">
            <text:p>2001-10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3289265</text:p>
          </table:table-cell>
          <table:table-cell office:value-type="string" table:style-name="ce1">
            <text:p>ricardo.ortiz496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3-16T06:04:00" table:style-name="ce5">
            <text:p>2026-03-16 06:04</text:p>
          </table:table-cell>
          <table:table-cell office:value-type="date" office:date-value="2026-05-18T22:02:00" table:style-name="ce6">
            <text:p>2026-05-18 22:02</text:p>
          </table:table-cell>
          <table:table-cell table:number-columns-repeated="16369"/>
        </table:table-row>
        <table:table-row table:style-name="ro1">
          <table:table-cell office:value-type="float" office:value="497" table:style-name="ce3">
            <text:p>497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614091530</text:p>
          </table:table-cell>
          <table:table-cell office:value-type="string" table:style-name="ce1">
            <text:p>Natalia Díaz Cárdenas</text:p>
          </table:table-cell>
          <table:table-cell office:value-type="date" office:date-value="2018-05-31T00:00:00" table:style-name="ce4">
            <text:p>2018-05-3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4177544</text:p>
          </table:table-cell>
          <table:table-cell office:value-type="string" table:style-name="ce1">
            <text:p>natalia.diaz49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7-05T01:20:00" table:style-name="ce5">
            <text:p>2026-07-05 01:20</text:p>
          </table:table-cell>
          <table:table-cell office:value-type="date" office:date-value="2026-07-10T08:04:00" table:style-name="ce6">
            <text:p>2026-07-10 08:04</text:p>
          </table:table-cell>
          <table:table-cell table:number-columns-repeated="16369"/>
        </table:table-row>
        <table:table-row table:style-name="ro1">
          <table:table-cell office:value-type="float" office:value="498" table:style-name="ce3">
            <text:p>49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32560266</text:p>
          </table:table-cell>
          <table:table-cell office:value-type="string" table:style-name="ce1">
            <text:p>Samuel Giraldo Silva</text:p>
          </table:table-cell>
          <table:table-cell office:value-type="date" office:date-value="1982-12-09T00:00:00" table:style-name="ce4">
            <text:p>1982-12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7696598</text:p>
          </table:table-cell>
          <table:table-cell office:value-type="string" table:style-name="ce1">
            <text:p>samuel.giraldo498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20T15:27:00" table:style-name="ce5">
            <text:p>2026-05-20 15:27</text:p>
          </table:table-cell>
          <table:table-cell office:value-type="date" office:date-value="2026-05-24T03:15:00" table:style-name="ce6">
            <text:p>2026-05-24 03:15</text:p>
          </table:table-cell>
          <table:table-cell table:number-columns-repeated="16369"/>
        </table:table-row>
        <table:table-row table:style-name="ro1">
          <table:table-cell office:value-type="float" office:value="499" table:style-name="ce3">
            <text:p>49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47572597</text:p>
          </table:table-cell>
          <table:table-cell office:value-type="string" table:style-name="ce1">
            <text:p>Diana Gabriela Castro Silva</text:p>
          </table:table-cell>
          <table:table-cell office:value-type="date" office:date-value="1975-05-03T00:00:00" table:style-name="ce4">
            <text:p>1975-05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5037503</text:p>
          </table:table-cell>
          <table:table-cell office:value-type="string" table:style-name="ce1">
            <text:p>diana.castro499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06T23:42:00" table:style-name="ce5">
            <text:p>2026-05-06 23:42</text:p>
          </table:table-cell>
          <table:table-cell office:value-type="date" office:date-value="2026-06-20T23:00:00" table:style-name="ce6">
            <text:p>2026-06-20 23:00</text:p>
          </table:table-cell>
          <table:table-cell table:number-columns-repeated="16369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48216305</text:p>
          </table:table-cell>
          <table:table-cell office:value-type="string" table:style-name="ce1">
            <text:p>David Ramírez Jiménez</text:p>
          </table:table-cell>
          <table:table-cell office:value-type="date" office:date-value="1980-04-23T00:00:00" table:style-name="ce4">
            <text:p>1980-04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3580683</text:p>
          </table:table-cell>
          <table:table-cell office:value-type="string" table:style-name="ce1">
            <text:p>david.ramirez500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05T01:03:00" table:style-name="ce5">
            <text:p>2026-06-05 01:03</text:p>
          </table:table-cell>
          <table:table-cell office:value-type="date" office:date-value="2026-07-04T20:12:00" table:style-name="ce6">
            <text:p>2026-07-04 20:12</text:p>
          </table:table-cell>
          <table:table-cell table:number-columns-repeated="16369"/>
        </table:table-row>
        <table:table-row table:style-name="ro1">
          <table:table-cell office:value-type="float" office:value="501" table:style-name="ce3">
            <text:p>50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3382171</text:p>
          </table:table-cell>
          <table:table-cell office:value-type="string" table:style-name="ce1">
            <text:p>Julián Rojas Giraldo</text:p>
          </table:table-cell>
          <table:table-cell office:value-type="date" office:date-value="1971-11-20T00:00:00" table:style-name="ce4">
            <text:p>1971-11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8278297</text:p>
          </table:table-cell>
          <table:table-cell office:value-type="string" table:style-name="ce1">
            <text:p>julian.rojas501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5-10T16:58:00" table:style-name="ce5">
            <text:p>2026-05-10 16:58</text:p>
          </table:table-cell>
          <table:table-cell office:value-type="date" office:date-value="2026-07-06T15:20:00" table:style-name="ce6">
            <text:p>2026-07-06 15:20</text:p>
          </table:table-cell>
          <table:table-cell table:number-columns-repeated="16369"/>
        </table:table-row>
        <table:table-row table:style-name="ro1">
          <table:table-cell office:value-type="float" office:value="502" table:style-name="ce3">
            <text:p>50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772976</text:p>
          </table:table-cell>
          <table:table-cell office:value-type="string" table:style-name="ce1">
            <text:p>Catalina Rojas Álvarez</text:p>
          </table:table-cell>
          <table:table-cell office:value-type="date" office:date-value="1963-04-25T00:00:00" table:style-name="ce4">
            <text:p>1963-04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7534666</text:p>
          </table:table-cell>
          <table:table-cell office:value-type="string" table:style-name="ce1">
            <text:p>catalina.rojas502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3-13T07:34:00" table:style-name="ce5">
            <text:p>2026-03-13 07:34</text:p>
          </table:table-cell>
          <table:table-cell office:value-type="date" office:date-value="2026-04-02T09:47:00" table:style-name="ce6">
            <text:p>2026-04-02 09:47</text:p>
          </table:table-cell>
          <table:table-cell table:number-columns-repeated="16369"/>
        </table:table-row>
        <table:table-row table:style-name="ro1">
          <table:table-cell office:value-type="float" office:value="503" table:style-name="ce3">
            <text:p>50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8273933</text:p>
          </table:table-cell>
          <table:table-cell office:value-type="string" table:style-name="ce1">
            <text:p>Julián Ruiz Pérez</text:p>
          </table:table-cell>
          <table:table-cell office:value-type="date" office:date-value="1983-06-22T00:00:00" table:style-name="ce4">
            <text:p>1983-06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4958081</text:p>
          </table:table-cell>
          <table:table-cell office:value-type="string" table:style-name="ce1">
            <text:p>julian.ruiz503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3-18T14:28:00" table:style-name="ce5">
            <text:p>2026-03-18 14:28</text:p>
          </table:table-cell>
          <table:table-cell office:value-type="date" office:date-value="2026-04-04T14:57:00" table:style-name="ce6">
            <text:p>2026-04-04 14:57</text:p>
          </table:table-cell>
          <table:table-cell table:number-columns-repeated="16369"/>
        </table:table-row>
        <table:table-row table:style-name="ro1">
          <table:table-cell office:value-type="float" office:value="504" table:style-name="ce3">
            <text:p>50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54153632</text:p>
          </table:table-cell>
          <table:table-cell office:value-type="string" table:style-name="ce1">
            <text:p>Andrés Rojas Romero</text:p>
          </table:table-cell>
          <table:table-cell office:value-type="date" office:date-value="1963-02-02T00:00:00" table:style-name="ce4">
            <text:p>1963-02-02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3229930336</text:p>
          </table:table-cell>
          <table:table-cell office:value-type="string" table:style-name="ce1">
            <text:p>andres.rojas504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3-29T11:52:00" table:style-name="ce5">
            <text:p>2026-03-29 11:52</text:p>
          </table:table-cell>
          <table:table-cell office:value-type="date" office:date-value="2026-04-28T18:24:00" table:style-name="ce6">
            <text:p>2026-04-28 18:24</text:p>
          </table:table-cell>
          <table:table-cell table:number-columns-repeated="16369"/>
        </table:table-row>
        <table:table-row table:style-name="ro1">
          <table:table-cell office:value-type="float" office:value="505" table:style-name="ce3">
            <text:p>50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9768457</text:p>
          </table:table-cell>
          <table:table-cell office:value-type="string" table:style-name="ce1">
            <text:p>Natalia García Cárdenas</text:p>
          </table:table-cell>
          <table:table-cell office:value-type="date" office:date-value="1982-09-15T00:00:00" table:style-name="ce4">
            <text:p>1982-09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1531341</text:p>
          </table:table-cell>
          <table:table-cell office:value-type="string" table:style-name="ce1">
            <text:p>natalia.garcia50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19T16:59:00" table:style-name="ce5">
            <text:p>2026-05-19 16:59</text:p>
          </table:table-cell>
          <table:table-cell office:value-type="date" office:date-value="2026-06-23T16:03:00" table:style-name="ce6">
            <text:p>2026-06-23 16:03</text:p>
          </table:table-cell>
          <table:table-cell table:number-columns-repeated="16369"/>
        </table:table-row>
        <table:table-row table:style-name="ro1">
          <table:table-cell office:value-type="float" office:value="506" table:style-name="ce3">
            <text:p>50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22751440</text:p>
          </table:table-cell>
          <table:table-cell office:value-type="string" table:style-name="ce1">
            <text:p>David Muñoz Ortiz</text:p>
          </table:table-cell>
          <table:table-cell office:value-type="date" office:date-value="1944-01-08T00:00:00" table:style-name="ce4">
            <text:p>1944-01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7286029</text:p>
          </table:table-cell>
          <table:table-cell office:value-type="string" table:style-name="ce1">
            <text:p>david.munoz506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4-27T12:27:00" table:style-name="ce5">
            <text:p>2026-04-27 12:27</text:p>
          </table:table-cell>
          <table:table-cell office:value-type="date" office:date-value="2026-05-10T02:03:00" table:style-name="ce6">
            <text:p>2026-05-10 02:03</text:p>
          </table:table-cell>
          <table:table-cell table:number-columns-repeated="16369"/>
        </table:table-row>
        <table:table-row table:style-name="ro1">
          <table:table-cell office:value-type="float" office:value="507" table:style-name="ce3">
            <text:p>50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98540738</text:p>
          </table:table-cell>
          <table:table-cell office:value-type="string" table:style-name="ce1">
            <text:p>Carolina López Castro</text:p>
          </table:table-cell>
          <table:table-cell office:value-type="date" office:date-value="1994-03-26T00:00:00" table:style-name="ce4">
            <text:p>1994-03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5799655</text:p>
          </table:table-cell>
          <table:table-cell office:value-type="string" table:style-name="ce1">
            <text:p>carolina.lopez50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7-06T08:23:00" table:style-name="ce5">
            <text:p>2026-07-06 08:23</text:p>
          </table:table-cell>
          <table:table-cell office:value-type="date" office:date-value="2026-07-06T14:44:00" table:style-name="ce6">
            <text:p>2026-07-06 14:44</text:p>
          </table:table-cell>
          <table:table-cell table:number-columns-repeated="16369"/>
        </table:table-row>
        <table:table-row table:style-name="ro1">
          <table:table-cell office:value-type="float" office:value="508" table:style-name="ce3">
            <text:p>50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04885614</text:p>
          </table:table-cell>
          <table:table-cell office:value-type="string" table:style-name="ce1">
            <text:p>Juan Ramírez Díaz</text:p>
          </table:table-cell>
          <table:table-cell office:value-type="date" office:date-value="1963-07-24T00:00:00" table:style-name="ce4">
            <text:p>1963-07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7893248</text:p>
          </table:table-cell>
          <table:table-cell office:value-type="string" table:style-name="ce1">
            <text:p>juan.ramirez508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4-13T07:19:00" table:style-name="ce5">
            <text:p>2026-04-13 07:19</text:p>
          </table:table-cell>
          <table:table-cell office:value-type="date" office:date-value="2026-06-05T07:11:00" table:style-name="ce6">
            <text:p>2026-06-05 07:11</text:p>
          </table:table-cell>
          <table:table-cell table:number-columns-repeated="16369"/>
        </table:table-row>
        <table:table-row table:style-name="ro1">
          <table:table-cell office:value-type="float" office:value="509" table:style-name="ce3">
            <text:p>50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5624761</text:p>
          </table:table-cell>
          <table:table-cell office:value-type="string" table:style-name="ce1">
            <text:p>Mateo Díaz Jiménez</text:p>
          </table:table-cell>
          <table:table-cell office:value-type="date" office:date-value="1939-08-03T00:00:00" table:style-name="ce4">
            <text:p>1939-08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3035430</text:p>
          </table:table-cell>
          <table:table-cell office:value-type="string" table:style-name="ce1">
            <text:p>mateo.diaz509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12T18:18:00" table:style-name="ce5">
            <text:p>2026-06-12 18:18</text:p>
          </table:table-cell>
          <table:table-cell office:value-type="date" office:date-value="2026-06-15T02:27:00" table:style-name="ce6">
            <text:p>2026-06-15 02:27</text:p>
          </table:table-cell>
          <table:table-cell table:number-columns-repeated="16369"/>
        </table:table-row>
        <table:table-row table:style-name="ro1">
          <table:table-cell office:value-type="float" office:value="510" table:style-name="ce3">
            <text:p>51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6802015</text:p>
          </table:table-cell>
          <table:table-cell office:value-type="string" table:style-name="ce1">
            <text:p>Camila Jiménez Giraldo</text:p>
          </table:table-cell>
          <table:table-cell office:value-type="date" office:date-value="2009-10-25T00:00:00" table:style-name="ce4">
            <text:p>2009-10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3532816</text:p>
          </table:table-cell>
          <table:table-cell office:value-type="string" table:style-name="ce1">
            <text:p>camila.jimenez510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4-22T03:48:00" table:style-name="ce5">
            <text:p>2026-04-22 03:48</text:p>
          </table:table-cell>
          <table:table-cell office:value-type="date" office:date-value="2026-05-09T01:12:00" table:style-name="ce6">
            <text:p>2026-05-09 01:12</text:p>
          </table:table-cell>
          <table:table-cell table:number-columns-repeated="16369"/>
        </table:table-row>
        <table:table-row table:style-name="ro1">
          <table:table-cell office:value-type="float" office:value="511" table:style-name="ce3">
            <text:p>51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3446886</text:p>
          </table:table-cell>
          <table:table-cell office:value-type="string" table:style-name="ce1">
            <text:p>Esteban Castro Mendoza</text:p>
          </table:table-cell>
          <table:table-cell office:value-type="date" office:date-value="1981-09-08T00:00:00" table:style-name="ce4">
            <text:p>1981-09-08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213943222</text:p>
          </table:table-cell>
          <table:table-cell office:value-type="string" table:style-name="ce1">
            <text:p>esteban.castro511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06T07:22:00" table:style-name="ce5">
            <text:p>2026-04-06 07:22</text:p>
          </table:table-cell>
          <table:table-cell office:value-type="date" office:date-value="2026-04-21T15:15:00" table:style-name="ce6">
            <text:p>2026-04-21 15:15</text:p>
          </table:table-cell>
          <table:table-cell table:number-columns-repeated="16369"/>
        </table:table-row>
        <table:table-row table:style-name="ro1">
          <table:table-cell office:value-type="float" office:value="512" table:style-name="ce3">
            <text:p>51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22484463</text:p>
          </table:table-cell>
          <table:table-cell office:value-type="string" table:style-name="ce1">
            <text:p>Sebastián Sánchez Romero</text:p>
          </table:table-cell>
          <table:table-cell office:value-type="date" office:date-value="1987-02-07T00:00:00" table:style-name="ce4">
            <text:p>1987-02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4991650</text:p>
          </table:table-cell>
          <table:table-cell office:value-type="string" table:style-name="ce1">
            <text:p>sebastian.sanchez512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3-31T13:42:00" table:style-name="ce5">
            <text:p>2026-03-31 13:42</text:p>
          </table:table-cell>
          <table:table-cell office:value-type="date" office:date-value="2026-06-22T10:57:00" table:style-name="ce6">
            <text:p>2026-06-22 10:57</text:p>
          </table:table-cell>
          <table:table-cell table:number-columns-repeated="16369"/>
        </table:table-row>
        <table:table-row table:style-name="ro1">
          <table:table-cell office:value-type="float" office:value="513" table:style-name="ce3">
            <text:p>51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06403578</text:p>
          </table:table-cell>
          <table:table-cell office:value-type="string" table:style-name="ce1">
            <text:p>David Muñoz Romero</text:p>
          </table:table-cell>
          <table:table-cell office:value-type="date" office:date-value="1937-12-07T00:00:00" table:style-name="ce4">
            <text:p>1937-12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5784686</text:p>
          </table:table-cell>
          <table:table-cell office:value-type="string" table:style-name="ce1">
            <text:p>david.munoz51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13T04:19:00" table:style-name="ce5">
            <text:p>2026-06-13 04:19</text:p>
          </table:table-cell>
          <table:table-cell office:value-type="date" office:date-value="2026-06-20T03:33:00" table:style-name="ce6">
            <text:p>2026-06-20 03:33</text:p>
          </table:table-cell>
          <table:table-cell table:number-columns-repeated="16369"/>
        </table:table-row>
        <table:table-row table:style-name="ro1">
          <table:table-cell office:value-type="float" office:value="514" table:style-name="ce3">
            <text:p>51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0355934</text:p>
          </table:table-cell>
          <table:table-cell office:value-type="string" table:style-name="ce1">
            <text:p>Paula Ospina Valencia</text:p>
          </table:table-cell>
          <table:table-cell office:value-type="date" office:date-value="1977-04-04T00:00:00" table:style-name="ce4">
            <text:p>1977-04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6227676</text:p>
          </table:table-cell>
          <table:table-cell office:value-type="string" table:style-name="ce1">
            <text:p>paula.ospina514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25T19:08:00" table:style-name="ce5">
            <text:p>2026-05-25 19:08</text:p>
          </table:table-cell>
          <table:table-cell office:value-type="date" office:date-value="2026-06-13T02:51:00" table:style-name="ce6">
            <text:p>2026-06-13 02:51</text:p>
          </table:table-cell>
          <table:table-cell table:number-columns-repeated="16369"/>
        </table:table-row>
        <table:table-row table:style-name="ro1">
          <table:table-cell office:value-type="float" office:value="515" table:style-name="ce3">
            <text:p>51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98761749</text:p>
          </table:table-cell>
          <table:table-cell office:value-type="string" table:style-name="ce1">
            <text:p>Andrea Diana Jiménez Castaño</text:p>
          </table:table-cell>
          <table:table-cell office:value-type="date" office:date-value="1985-02-20T00:00:00" table:style-name="ce4">
            <text:p>1985-02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3290103</text:p>
          </table:table-cell>
          <table:table-cell office:value-type="string" table:style-name="ce1">
            <text:p>andrea.jimenez515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3-29T15:33:00" table:style-name="ce5">
            <text:p>2026-03-29 15:33</text:p>
          </table:table-cell>
          <table:table-cell office:value-type="date" office:date-value="2026-07-09T19:43:00" table:style-name="ce6">
            <text:p>2026-07-09 19:43</text:p>
          </table:table-cell>
          <table:table-cell table:number-columns-repeated="16369"/>
        </table:table-row>
        <table:table-row table:style-name="ro1">
          <table:table-cell office:value-type="float" office:value="516" table:style-name="ce3">
            <text:p>51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64552967</text:p>
          </table:table-cell>
          <table:table-cell office:value-type="string" table:style-name="ce1">
            <text:p>Santiago Romero Mendoza</text:p>
          </table:table-cell>
          <table:table-cell office:value-type="date" office:date-value="1988-04-13T00:00:00" table:style-name="ce4">
            <text:p>1988-04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3940339</text:p>
          </table:table-cell>
          <table:table-cell office:value-type="string" table:style-name="ce1">
            <text:p>santiago.romero516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6-08T21:50:00" table:style-name="ce5">
            <text:p>2026-06-08 21:50</text:p>
          </table:table-cell>
          <table:table-cell office:value-type="date" office:date-value="2026-06-18T00:39:00" table:style-name="ce6">
            <text:p>2026-06-18 00:39</text:p>
          </table:table-cell>
          <table:table-cell table:number-columns-repeated="16369"/>
        </table:table-row>
        <table:table-row table:style-name="ro1">
          <table:table-cell office:value-type="float" office:value="517" table:style-name="ce3">
            <text:p>517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245444342</text:p>
          </table:table-cell>
          <table:table-cell office:value-type="string" table:style-name="ce1">
            <text:p>María Castro Quintero</text:p>
          </table:table-cell>
          <table:table-cell office:value-type="date" office:date-value="2017-04-19T00:00:00" table:style-name="ce4">
            <text:p>2017-04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8131502</text:p>
          </table:table-cell>
          <table:table-cell office:value-type="string" table:style-name="ce1">
            <text:p>maria.castro517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27T00:07:00" table:style-name="ce5">
            <text:p>2026-06-27 00:07</text:p>
          </table:table-cell>
          <table:table-cell office:value-type="date" office:date-value="2026-07-01T12:38:00" table:style-name="ce6">
            <text:p>2026-07-01 12:38</text:p>
          </table:table-cell>
          <table:table-cell table:number-columns-repeated="16369"/>
        </table:table-row>
        <table:table-row table:style-name="ro1">
          <table:table-cell office:value-type="float" office:value="518" table:style-name="ce3">
            <text:p>51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24842421</text:p>
          </table:table-cell>
          <table:table-cell office:value-type="string" table:style-name="ce1">
            <text:p>Julián Santiago Castro Ramírez</text:p>
          </table:table-cell>
          <table:table-cell office:value-type="date" office:date-value="1986-06-03T00:00:00" table:style-name="ce4">
            <text:p>1986-06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5419811</text:p>
          </table:table-cell>
          <table:table-cell office:value-type="string" table:style-name="ce1">
            <text:p>julian.castro51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17T09:20:00" table:style-name="ce5">
            <text:p>2026-06-17 09:20</text:p>
          </table:table-cell>
          <table:table-cell office:value-type="date" office:date-value="2026-06-29T01:33:00" table:style-name="ce6">
            <text:p>2026-06-29 01:33</text:p>
          </table:table-cell>
          <table:table-cell table:number-columns-repeated="16369"/>
        </table:table-row>
        <table:table-row table:style-name="ro1">
          <table:table-cell office:value-type="float" office:value="519" table:style-name="ce3">
            <text:p>51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3321889</text:p>
          </table:table-cell>
          <table:table-cell office:value-type="string" table:style-name="ce1">
            <text:p>Isabella Jiménez Ruiz</text:p>
          </table:table-cell>
          <table:table-cell office:value-type="date" office:date-value="1997-06-22T00:00:00" table:style-name="ce4">
            <text:p>1997-06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8710707</text:p>
          </table:table-cell>
          <table:table-cell office:value-type="string" table:style-name="ce1">
            <text:p>isabella.jimenez51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7-06T14:54:00" table:style-name="ce5">
            <text:p>2026-07-06 14:54</text:p>
          </table:table-cell>
          <table:table-cell office:value-type="date" office:date-value="2026-07-06T17:41:00" table:style-name="ce6">
            <text:p>2026-07-06 17:41</text:p>
          </table:table-cell>
          <table:table-cell table:number-columns-repeated="16369"/>
        </table:table-row>
        <table:table-row table:style-name="ro1">
          <table:table-cell office:value-type="float" office:value="520" table:style-name="ce3">
            <text:p>52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21336585</text:p>
          </table:table-cell>
          <table:table-cell office:value-type="string" table:style-name="ce1">
            <text:p>José Sánchez Cárdenas</text:p>
          </table:table-cell>
          <table:table-cell office:value-type="date" office:date-value="1972-12-08T00:00:00" table:style-name="ce4">
            <text:p>1972-12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4554318</text:p>
          </table:table-cell>
          <table:table-cell office:value-type="string" table:style-name="ce1">
            <text:p>jose.sanchez520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15T18:01:00" table:style-name="ce5">
            <text:p>2026-06-15 18:01</text:p>
          </table:table-cell>
          <table:table-cell office:value-type="date" office:date-value="2026-07-04T01:31:00" table:style-name="ce6">
            <text:p>2026-07-04 01:31</text:p>
          </table:table-cell>
          <table:table-cell table:number-columns-repeated="16369"/>
        </table:table-row>
        <table:table-row table:style-name="ro1">
          <table:table-cell office:value-type="float" office:value="521" table:style-name="ce3">
            <text:p>52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46841287</text:p>
          </table:table-cell>
          <table:table-cell office:value-type="string" table:style-name="ce1">
            <text:p>Daniel Ospina Castaño</text:p>
          </table:table-cell>
          <table:table-cell office:value-type="date" office:date-value="2007-09-05T00:00:00" table:style-name="ce4">
            <text:p>2007-09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1490574</text:p>
          </table:table-cell>
          <table:table-cell office:value-type="string" table:style-name="ce1">
            <text:p>daniel.ospina521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7-01T19:52:00" table:style-name="ce5">
            <text:p>2026-07-01 19:52</text:p>
          </table:table-cell>
          <table:table-cell office:value-type="date" office:date-value="2026-07-06T18:58:00" table:style-name="ce6">
            <text:p>2026-07-06 18:58</text:p>
          </table:table-cell>
          <table:table-cell table:number-columns-repeated="16369"/>
        </table:table-row>
        <table:table-row table:style-name="ro1">
          <table:table-cell office:value-type="float" office:value="522" table:style-name="ce3">
            <text:p>52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50184000</text:p>
          </table:table-cell>
          <table:table-cell office:value-type="string" table:style-name="ce1">
            <text:p>Mateo Giraldo Ortiz</text:p>
          </table:table-cell>
          <table:table-cell office:value-type="date" office:date-value="1973-06-25T00:00:00" table:style-name="ce4">
            <text:p>1973-06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8728290</text:p>
          </table:table-cell>
          <table:table-cell office:value-type="string" table:style-name="ce1">
            <text:p>mateo.giraldo522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10T20:29:00" table:style-name="ce5">
            <text:p>2026-06-10 20:29</text:p>
          </table:table-cell>
          <table:table-cell office:value-type="date" office:date-value="2026-06-14T13:49:00" table:style-name="ce6">
            <text:p>2026-06-14 13:49</text:p>
          </table:table-cell>
          <table:table-cell table:number-columns-repeated="16369"/>
        </table:table-row>
        <table:table-row table:style-name="ro1">
          <table:table-cell office:value-type="float" office:value="523" table:style-name="ce3">
            <text:p>52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32572006</text:p>
          </table:table-cell>
          <table:table-cell office:value-type="string" table:style-name="ce1">
            <text:p>Camila Giraldo Rojas</text:p>
          </table:table-cell>
          <table:table-cell office:value-type="date" office:date-value="1980-12-01T00:00:00" table:style-name="ce4">
            <text:p>1980-12-0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9084844</text:p>
          </table:table-cell>
          <table:table-cell office:value-type="string" table:style-name="ce1">
            <text:p>camila.giraldo523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4-23T20:53:00" table:style-name="ce5">
            <text:p>2026-04-23 20:53</text:p>
          </table:table-cell>
          <table:table-cell office:value-type="date" office:date-value="2026-05-26T06:24:00" table:style-name="ce6">
            <text:p>2026-05-26 06:24</text:p>
          </table:table-cell>
          <table:table-cell table:number-columns-repeated="16369"/>
        </table:table-row>
        <table:table-row table:style-name="ro1">
          <table:table-cell office:value-type="float" office:value="524" table:style-name="ce3">
            <text:p>52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5533129</text:p>
          </table:table-cell>
          <table:table-cell office:value-type="string" table:style-name="ce1">
            <text:p>Carlos Hernández Torres</text:p>
          </table:table-cell>
          <table:table-cell office:value-type="date" office:date-value="1974-07-29T00:00:00" table:style-name="ce4">
            <text:p>1974-07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9395256</text:p>
          </table:table-cell>
          <table:table-cell office:value-type="string" table:style-name="ce1">
            <text:p>carlos.hernandez524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25T09:22:00" table:style-name="ce5">
            <text:p>2026-04-25 09:22</text:p>
          </table:table-cell>
          <table:table-cell office:value-type="date" office:date-value="2026-05-08T14:56:00" table:style-name="ce6">
            <text:p>2026-05-08 14:56</text:p>
          </table:table-cell>
          <table:table-cell table:number-columns-repeated="16369"/>
        </table:table-row>
        <table:table-row table:style-name="ro1">
          <table:table-cell office:value-type="float" office:value="525" table:style-name="ce3">
            <text:p>52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17542848</text:p>
          </table:table-cell>
          <table:table-cell office:value-type="string" table:style-name="ce1">
            <text:p>Paula Luisa González Romero</text:p>
          </table:table-cell>
          <table:table-cell office:value-type="date" office:date-value="1993-07-03T00:00:00" table:style-name="ce4">
            <text:p>1993-07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3716134</text:p>
          </table:table-cell>
          <table:table-cell office:value-type="string" table:style-name="ce1">
            <text:p>paula.gonzalez525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5-11T09:27:00" table:style-name="ce5">
            <text:p>2026-05-11 09:27</text:p>
          </table:table-cell>
          <table:table-cell office:value-type="date" office:date-value="2026-05-19T20:08:00" table:style-name="ce6">
            <text:p>2026-05-19 20:08</text:p>
          </table:table-cell>
          <table:table-cell table:number-columns-repeated="16369"/>
        </table:table-row>
        <table:table-row table:style-name="ro1">
          <table:table-cell office:value-type="float" office:value="526" table:style-name="ce3">
            <text:p>52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96855401</text:p>
          </table:table-cell>
          <table:table-cell office:value-type="string" table:style-name="ce1">
            <text:p>Paula Restrepo González</text:p>
          </table:table-cell>
          <table:table-cell office:value-type="date" office:date-value="1944-12-17T00:00:00" table:style-name="ce4">
            <text:p>1944-12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6743689</text:p>
          </table:table-cell>
          <table:table-cell office:value-type="string" table:style-name="ce1">
            <text:p>paula.restrepo52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4-19T16:10:00" table:style-name="ce5">
            <text:p>2026-04-19 16:10</text:p>
          </table:table-cell>
          <table:table-cell office:value-type="date" office:date-value="2026-06-16T07:26:00" table:style-name="ce6">
            <text:p>2026-06-16 07:26</text:p>
          </table:table-cell>
          <table:table-cell table:number-columns-repeated="16369"/>
        </table:table-row>
        <table:table-row table:style-name="ro1">
          <table:table-cell office:value-type="float" office:value="527" table:style-name="ce3">
            <text:p>52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30401609</text:p>
          </table:table-cell>
          <table:table-cell office:value-type="string" table:style-name="ce1">
            <text:p>Felipe Juan Pérez Martínez</text:p>
          </table:table-cell>
          <table:table-cell office:value-type="date" office:date-value="1977-03-15T00:00:00" table:style-name="ce4">
            <text:p>1977-03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4112272</text:p>
          </table:table-cell>
          <table:table-cell office:value-type="string" table:style-name="ce1">
            <text:p>felipe.perez527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22T14:29:00" table:style-name="ce5">
            <text:p>2026-05-22 14:29</text:p>
          </table:table-cell>
          <table:table-cell office:value-type="date" office:date-value="2026-07-01T00:44:00" table:style-name="ce6">
            <text:p>2026-07-01 00:44</text:p>
          </table:table-cell>
          <table:table-cell table:number-columns-repeated="16369"/>
        </table:table-row>
        <table:table-row table:style-name="ro1">
          <table:table-cell office:value-type="float" office:value="528" table:style-name="ce3">
            <text:p>52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98422925</text:p>
          </table:table-cell>
          <table:table-cell office:value-type="string" table:style-name="ce1">
            <text:p>Sebastián Andrés Díaz Restrepo</text:p>
          </table:table-cell>
          <table:table-cell office:value-type="date" office:date-value="2004-01-05T00:00:00" table:style-name="ce4">
            <text:p>2004-01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6430882</text:p>
          </table:table-cell>
          <table:table-cell office:value-type="string" table:style-name="ce1">
            <text:p>sebastian.diaz528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26T23:09:00" table:style-name="ce5">
            <text:p>2026-04-26 23:09</text:p>
          </table:table-cell>
          <table:table-cell office:value-type="date" office:date-value="2026-06-22T19:11:00" table:style-name="ce6">
            <text:p>2026-06-22 19:11</text:p>
          </table:table-cell>
          <table:table-cell table:number-columns-repeated="16369"/>
        </table:table-row>
        <table:table-row table:style-name="ro1">
          <table:table-cell office:value-type="float" office:value="529" table:style-name="ce3">
            <text:p>52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88948095</text:p>
          </table:table-cell>
          <table:table-cell office:value-type="string" table:style-name="ce1">
            <text:p>Natalia Ramírez Valencia</text:p>
          </table:table-cell>
          <table:table-cell office:value-type="date" office:date-value="1973-01-07T00:00:00" table:style-name="ce4">
            <text:p>1973-01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7276046</text:p>
          </table:table-cell>
          <table:table-cell office:value-type="string" table:style-name="ce1">
            <text:p>natalia.ramirez529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20T07:09:00" table:style-name="ce5">
            <text:p>2026-05-20 07:09</text:p>
          </table:table-cell>
          <table:table-cell office:value-type="date" office:date-value="2026-06-17T16:05:00" table:style-name="ce6">
            <text:p>2026-06-17 16:05</text:p>
          </table:table-cell>
          <table:table-cell table:number-columns-repeated="16369"/>
        </table:table-row>
        <table:table-row table:style-name="ro1">
          <table:table-cell office:value-type="float" office:value="530" table:style-name="ce3">
            <text:p>53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54350541</text:p>
          </table:table-cell>
          <table:table-cell office:value-type="string" table:style-name="ce1">
            <text:p>Valentina Ramírez Ruiz</text:p>
          </table:table-cell>
          <table:table-cell office:value-type="date" office:date-value="2013-12-04T00:00:00" table:style-name="ce4">
            <text:p>2013-12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8629272</text:p>
          </table:table-cell>
          <table:table-cell office:value-type="string" table:style-name="ce1">
            <text:p>valentina.ramirez530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4-24T09:03:00" table:style-name="ce5">
            <text:p>2026-04-24 09:03</text:p>
          </table:table-cell>
          <table:table-cell office:value-type="date" office:date-value="2026-05-22T20:22:00" table:style-name="ce6">
            <text:p>2026-05-22 20:22</text:p>
          </table:table-cell>
          <table:table-cell table:number-columns-repeated="16369"/>
        </table:table-row>
        <table:table-row table:style-name="ro1">
          <table:table-cell office:value-type="float" office:value="531" table:style-name="ce3">
            <text:p>53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32897836</text:p>
          </table:table-cell>
          <table:table-cell office:value-type="string" table:style-name="ce1">
            <text:p>Luisa María Torres García</text:p>
          </table:table-cell>
          <table:table-cell office:value-type="date" office:date-value="2008-02-25T00:00:00" table:style-name="ce4">
            <text:p>2008-02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7384731</text:p>
          </table:table-cell>
          <table:table-cell office:value-type="string" table:style-name="ce1">
            <text:p>luisa.torres531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5-29T19:15:00" table:style-name="ce5">
            <text:p>2026-05-29 19:15</text:p>
          </table:table-cell>
          <table:table-cell office:value-type="date" office:date-value="2026-07-05T09:20:00" table:style-name="ce6">
            <text:p>2026-07-05 09:20</text:p>
          </table:table-cell>
          <table:table-cell table:number-columns-repeated="16369"/>
        </table:table-row>
        <table:table-row table:style-name="ro1">
          <table:table-cell office:value-type="float" office:value="532" table:style-name="ce3">
            <text:p>53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00044317</text:p>
          </table:table-cell>
          <table:table-cell office:value-type="string" table:style-name="ce1">
            <text:p>Sara Romero Ortiz</text:p>
          </table:table-cell>
          <table:table-cell office:value-type="date" office:date-value="2013-01-04T00:00:00" table:style-name="ce4">
            <text:p>2013-01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7508291</text:p>
          </table:table-cell>
          <table:table-cell office:value-type="string" table:style-name="ce1">
            <text:p>sara.romero532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7-03T05:32:00" table:style-name="ce5">
            <text:p>2026-07-03 05:32</text:p>
          </table:table-cell>
          <table:table-cell office:value-type="date" office:date-value="2026-07-04T12:06:00" table:style-name="ce6">
            <text:p>2026-07-04 12:06</text:p>
          </table:table-cell>
          <table:table-cell table:number-columns-repeated="16369"/>
        </table:table-row>
        <table:table-row table:style-name="ro1">
          <table:table-cell office:value-type="float" office:value="533" table:style-name="ce3">
            <text:p>53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58725412</text:p>
          </table:table-cell>
          <table:table-cell office:value-type="string" table:style-name="ce1">
            <text:p>Tomás Restrepo González</text:p>
          </table:table-cell>
          <table:table-cell office:value-type="date" office:date-value="1998-02-11T00:00:00" table:style-name="ce4">
            <text:p>1998-02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9238465</text:p>
          </table:table-cell>
          <table:table-cell office:value-type="string" table:style-name="ce1">
            <text:p>tomas.restrepo53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12T10:57:00" table:style-name="ce5">
            <text:p>2026-05-12 10:57</text:p>
          </table:table-cell>
          <table:table-cell office:value-type="date" office:date-value="2026-06-19T06:12:00" table:style-name="ce6">
            <text:p>2026-06-19 06:12</text:p>
          </table:table-cell>
          <table:table-cell table:number-columns-repeated="16369"/>
        </table:table-row>
        <table:table-row table:style-name="ro1">
          <table:table-cell office:value-type="float" office:value="534" table:style-name="ce3">
            <text:p>534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064244697</text:p>
          </table:table-cell>
          <table:table-cell office:value-type="string" table:style-name="ce1">
            <text:p>Carolina Ospina Hernández</text:p>
          </table:table-cell>
          <table:table-cell office:value-type="date" office:date-value="1973-08-26T00:00:00" table:style-name="ce4">
            <text:p>1973-08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4106967</text:p>
          </table:table-cell>
          <table:table-cell office:value-type="string" table:style-name="ce1">
            <text:p>carolina.ospina534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30T06:40:00" table:style-name="ce5">
            <text:p>2026-03-30 06:40</text:p>
          </table:table-cell>
          <table:table-cell office:value-type="date" office:date-value="2026-06-03T15:03:00" table:style-name="ce6">
            <text:p>2026-06-03 15:03</text:p>
          </table:table-cell>
          <table:table-cell table:number-columns-repeated="16369"/>
        </table:table-row>
        <table:table-row table:style-name="ro1">
          <table:table-cell office:value-type="float" office:value="535" table:style-name="ce3">
            <text:p>535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055100729</text:p>
          </table:table-cell>
          <table:table-cell office:value-type="string" table:style-name="ce1">
            <text:p>Julián Álvarez Restrepo</text:p>
          </table:table-cell>
          <table:table-cell office:value-type="date" office:date-value="2015-03-29T00:00:00" table:style-name="ce4">
            <text:p>2015-03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2704284</text:p>
          </table:table-cell>
          <table:table-cell office:value-type="string" table:style-name="ce1">
            <text:p>julian.alvarez53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4-03T23:07:00" table:style-name="ce5">
            <text:p>2026-04-03 23:07</text:p>
          </table:table-cell>
          <table:table-cell office:value-type="date" office:date-value="2026-05-11T16:31:00" table:style-name="ce6">
            <text:p>2026-05-11 16:31</text:p>
          </table:table-cell>
          <table:table-cell table:number-columns-repeated="16369"/>
        </table:table-row>
        <table:table-row table:style-name="ro1">
          <table:table-cell office:value-type="float" office:value="536" table:style-name="ce3">
            <text:p>53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3310835</text:p>
          </table:table-cell>
          <table:table-cell office:value-type="string" table:style-name="ce1">
            <text:p>David Moreno Giraldo</text:p>
          </table:table-cell>
          <table:table-cell office:value-type="date" office:date-value="1971-01-12T00:00:00" table:style-name="ce4">
            <text:p>1971-01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4743124</text:p>
          </table:table-cell>
          <table:table-cell office:value-type="string" table:style-name="ce1">
            <text:p>david.moreno536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05T00:41:00" table:style-name="ce5">
            <text:p>2026-06-05 00:41</text:p>
          </table:table-cell>
          <table:table-cell office:value-type="date" office:date-value="2026-07-07T19:18:00" table:style-name="ce6">
            <text:p>2026-07-07 19:18</text:p>
          </table:table-cell>
          <table:table-cell table:number-columns-repeated="16369"/>
        </table:table-row>
        <table:table-row table:style-name="ro1">
          <table:table-cell office:value-type="float" office:value="537" table:style-name="ce3">
            <text:p>53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2668919</text:p>
          </table:table-cell>
          <table:table-cell office:value-type="string" table:style-name="ce1">
            <text:p>Catalina Paula Jiménez Sánchez</text:p>
          </table:table-cell>
          <table:table-cell office:value-type="date" office:date-value="1984-12-14T00:00:00" table:style-name="ce4">
            <text:p>1984-12-1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4946026</text:p>
          </table:table-cell>
          <table:table-cell office:value-type="string" table:style-name="ce1">
            <text:p>catalina.jimenez537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10T06:04:00" table:style-name="ce5">
            <text:p>2026-05-10 06:04</text:p>
          </table:table-cell>
          <table:table-cell office:value-type="date" office:date-value="2026-05-12T19:45:00" table:style-name="ce6">
            <text:p>2026-05-12 19:45</text:p>
          </table:table-cell>
          <table:table-cell table:number-columns-repeated="16369"/>
        </table:table-row>
        <table:table-row table:style-name="ro1">
          <table:table-cell office:value-type="float" office:value="538" table:style-name="ce3">
            <text:p>53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50485777</text:p>
          </table:table-cell>
          <table:table-cell office:value-type="string" table:style-name="ce1">
            <text:p>Daniela Carolina Castro Vargas</text:p>
          </table:table-cell>
          <table:table-cell office:value-type="date" office:date-value="1988-12-25T00:00:00" table:style-name="ce4">
            <text:p>1988-12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6735108</text:p>
          </table:table-cell>
          <table:table-cell office:value-type="string" table:style-name="ce1">
            <text:p>daniela.castro538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3-27T14:29:00" table:style-name="ce5">
            <text:p>2026-03-27 14:29</text:p>
          </table:table-cell>
          <table:table-cell office:value-type="date" office:date-value="2026-05-27T02:35:00" table:style-name="ce6">
            <text:p>2026-05-27 02:35</text:p>
          </table:table-cell>
          <table:table-cell table:number-columns-repeated="16369"/>
        </table:table-row>
        <table:table-row table:style-name="ro1">
          <table:table-cell office:value-type="float" office:value="539" table:style-name="ce3">
            <text:p>53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76189868</text:p>
          </table:table-cell>
          <table:table-cell office:value-type="string" table:style-name="ce1">
            <text:p>Sebastián Cárdenas Castro</text:p>
          </table:table-cell>
          <table:table-cell office:value-type="date" office:date-value="1958-07-10T00:00:00" table:style-name="ce4">
            <text:p>1958-07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9709556</text:p>
          </table:table-cell>
          <table:table-cell office:value-type="string" table:style-name="ce1">
            <text:p>sebastian.cardenas539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10T00:48:00" table:style-name="ce5">
            <text:p>2026-05-10 00:48</text:p>
          </table:table-cell>
          <table:table-cell office:value-type="date" office:date-value="2026-06-11T13:22:00" table:style-name="ce6">
            <text:p>2026-06-11 13:22</text:p>
          </table:table-cell>
          <table:table-cell table:number-columns-repeated="16369"/>
        </table:table-row>
        <table:table-row table:style-name="ro1">
          <table:table-cell office:value-type="float" office:value="540" table:style-name="ce3">
            <text:p>54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69207477</text:p>
          </table:table-cell>
          <table:table-cell office:value-type="string" table:style-name="ce1">
            <text:p>Paula Martínez Ruiz</text:p>
          </table:table-cell>
          <table:table-cell office:value-type="date" office:date-value="2004-03-22T00:00:00" table:style-name="ce4">
            <text:p>2004-03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6248699</text:p>
          </table:table-cell>
          <table:table-cell office:value-type="string" table:style-name="ce1">
            <text:p>paula.martinez54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5-19T21:34:00" table:style-name="ce5">
            <text:p>2026-05-19 21:34</text:p>
          </table:table-cell>
          <table:table-cell office:value-type="date" office:date-value="2026-06-16T15:27:00" table:style-name="ce6">
            <text:p>2026-06-16 15:27</text:p>
          </table:table-cell>
          <table:table-cell table:number-columns-repeated="16369"/>
        </table:table-row>
        <table:table-row table:style-name="ro1">
          <table:table-cell office:value-type="float" office:value="541" table:style-name="ce3">
            <text:p>54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1602698</text:p>
          </table:table-cell>
          <table:table-cell office:value-type="string" table:style-name="ce1">
            <text:p>Daniela Castaño González</text:p>
          </table:table-cell>
          <table:table-cell office:value-type="date" office:date-value="1965-03-25T00:00:00" table:style-name="ce4">
            <text:p>1965-03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5852369</text:p>
          </table:table-cell>
          <table:table-cell office:value-type="string" table:style-name="ce1">
            <text:p>daniela.castano541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20T07:14:00" table:style-name="ce5">
            <text:p>2026-06-20 07:14</text:p>
          </table:table-cell>
          <table:table-cell office:value-type="date" office:date-value="2026-07-01T03:34:00" table:style-name="ce6">
            <text:p>2026-07-01 03:34</text:p>
          </table:table-cell>
          <table:table-cell table:number-columns-repeated="16369"/>
        </table:table-row>
        <table:table-row table:style-name="ro1">
          <table:table-cell office:value-type="float" office:value="542" table:style-name="ce3">
            <text:p>54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56040608</text:p>
          </table:table-cell>
          <table:table-cell office:value-type="string" table:style-name="ce1">
            <text:p>María Rojas Silva</text:p>
          </table:table-cell>
          <table:table-cell office:value-type="date" office:date-value="1986-11-13T00:00:00" table:style-name="ce4">
            <text:p>1986-11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1491961</text:p>
          </table:table-cell>
          <table:table-cell office:value-type="string" table:style-name="ce1">
            <text:p>maria.rojas542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4-16T12:06:00" table:style-name="ce5">
            <text:p>2026-04-16 12:06</text:p>
          </table:table-cell>
          <table:table-cell office:value-type="date" office:date-value="2026-06-04T08:40:00" table:style-name="ce6">
            <text:p>2026-06-04 08:40</text:p>
          </table:table-cell>
          <table:table-cell table:number-columns-repeated="16369"/>
        </table:table-row>
        <table:table-row table:style-name="ro1">
          <table:table-cell office:value-type="float" office:value="543" table:style-name="ce3">
            <text:p>54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30025868</text:p>
          </table:table-cell>
          <table:table-cell office:value-type="string" table:style-name="ce1">
            <text:p>Santiago Díaz Rodríguez</text:p>
          </table:table-cell>
          <table:table-cell office:value-type="date" office:date-value="1992-02-09T00:00:00" table:style-name="ce4">
            <text:p>1992-02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9351450</text:p>
          </table:table-cell>
          <table:table-cell office:value-type="string" table:style-name="ce1">
            <text:p>santiago.diaz54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14T15:47:00" table:style-name="ce5">
            <text:p>2026-05-14 15:47</text:p>
          </table:table-cell>
          <table:table-cell office:value-type="date" office:date-value="2026-05-27T14:06:00" table:style-name="ce6">
            <text:p>2026-05-27 14:06</text:p>
          </table:table-cell>
          <table:table-cell table:number-columns-repeated="16369"/>
        </table:table-row>
        <table:table-row table:style-name="ro1">
          <table:table-cell office:value-type="float" office:value="544" table:style-name="ce3">
            <text:p>54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55031180</text:p>
          </table:table-cell>
          <table:table-cell office:value-type="string" table:style-name="ce1">
            <text:p>Juliana Torres López</text:p>
          </table:table-cell>
          <table:table-cell office:value-type="date" office:date-value="1996-08-20T00:00:00" table:style-name="ce4">
            <text:p>1996-08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3834474</text:p>
          </table:table-cell>
          <table:table-cell office:value-type="string" table:style-name="ce1">
            <text:p>juliana.torres544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7-05T23:24:00" table:style-name="ce5">
            <text:p>2026-07-05 23:24</text:p>
          </table:table-cell>
          <table:table-cell office:value-type="date" office:date-value="2026-07-06T11:36:00" table:style-name="ce6">
            <text:p>2026-07-06 11:36</text:p>
          </table:table-cell>
          <table:table-cell table:number-columns-repeated="16369"/>
        </table:table-row>
        <table:table-row table:style-name="ro1">
          <table:table-cell office:value-type="float" office:value="545" table:style-name="ce3">
            <text:p>54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11660664</text:p>
          </table:table-cell>
          <table:table-cell office:value-type="string" table:style-name="ce1">
            <text:p>Camila Quintero Pérez</text:p>
          </table:table-cell>
          <table:table-cell office:value-type="date" office:date-value="1999-03-25T00:00:00" table:style-name="ce4">
            <text:p>1999-03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9402676</text:p>
          </table:table-cell>
          <table:table-cell office:value-type="string" table:style-name="ce1">
            <text:p>camila.quintero54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31T13:37:00" table:style-name="ce5">
            <text:p>2026-05-31 13:37</text:p>
          </table:table-cell>
          <table:table-cell office:value-type="date" office:date-value="2026-06-20T16:35:00" table:style-name="ce6">
            <text:p>2026-06-20 16:35</text:p>
          </table:table-cell>
          <table:table-cell table:number-columns-repeated="16369"/>
        </table:table-row>
        <table:table-row table:style-name="ro1">
          <table:table-cell office:value-type="float" office:value="546" table:style-name="ce3">
            <text:p>54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83883930</text:p>
          </table:table-cell>
          <table:table-cell office:value-type="string" table:style-name="ce1">
            <text:p>Alejandro Sánchez Valencia</text:p>
          </table:table-cell>
          <table:table-cell office:value-type="date" office:date-value="1981-05-02T00:00:00" table:style-name="ce4">
            <text:p>1981-05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6788354</text:p>
          </table:table-cell>
          <table:table-cell office:value-type="string" table:style-name="ce1">
            <text:p>alejandro.sanchez54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5-30T21:01:00" table:style-name="ce5">
            <text:p>2026-05-30 21:01</text:p>
          </table:table-cell>
          <table:table-cell office:value-type="date" office:date-value="2026-06-14T03:29:00" table:style-name="ce6">
            <text:p>2026-06-14 03:29</text:p>
          </table:table-cell>
          <table:table-cell table:number-columns-repeated="16369"/>
        </table:table-row>
        <table:table-row table:style-name="ro1">
          <table:table-cell office:value-type="float" office:value="547" table:style-name="ce3">
            <text:p>54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773998</text:p>
          </table:table-cell>
          <table:table-cell office:value-type="string" table:style-name="ce1">
            <text:p>Julián Castaño Ospina</text:p>
          </table:table-cell>
          <table:table-cell office:value-type="date" office:date-value="1961-01-01T00:00:00" table:style-name="ce4">
            <text:p>1961-01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5161535</text:p>
          </table:table-cell>
          <table:table-cell office:value-type="string" table:style-name="ce1">
            <text:p>julian.castano547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3-11T19:43:00" table:style-name="ce5">
            <text:p>2026-03-11 19:43</text:p>
          </table:table-cell>
          <table:table-cell office:value-type="date" office:date-value="2026-06-15T02:03:00" table:style-name="ce6">
            <text:p>2026-06-15 02:03</text:p>
          </table:table-cell>
          <table:table-cell table:number-columns-repeated="16369"/>
        </table:table-row>
        <table:table-row table:style-name="ro1">
          <table:table-cell office:value-type="float" office:value="548" table:style-name="ce3">
            <text:p>54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58499665</text:p>
          </table:table-cell>
          <table:table-cell office:value-type="string" table:style-name="ce1">
            <text:p>Paula Ospina Pérez</text:p>
          </table:table-cell>
          <table:table-cell office:value-type="date" office:date-value="1975-07-01T00:00:00" table:style-name="ce4">
            <text:p>1975-07-0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1282753</text:p>
          </table:table-cell>
          <table:table-cell office:value-type="string" table:style-name="ce1">
            <text:p>paula.ospina548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18T03:18:00" table:style-name="ce5">
            <text:p>2026-05-18 03:18</text:p>
          </table:table-cell>
          <table:table-cell office:value-type="date" office:date-value="2026-05-21T18:39:00" table:style-name="ce6">
            <text:p>2026-05-21 18:39</text:p>
          </table:table-cell>
          <table:table-cell table:number-columns-repeated="16369"/>
        </table:table-row>
        <table:table-row table:style-name="ro1">
          <table:table-cell office:value-type="float" office:value="549" table:style-name="ce3">
            <text:p>54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45224467</text:p>
          </table:table-cell>
          <table:table-cell office:value-type="string" table:style-name="ce1">
            <text:p>Mateo Moreno Ospina</text:p>
          </table:table-cell>
          <table:table-cell office:value-type="date" office:date-value="1971-08-24T00:00:00" table:style-name="ce4">
            <text:p>1971-08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4645116</text:p>
          </table:table-cell>
          <table:table-cell office:value-type="string" table:style-name="ce1">
            <text:p>mateo.moreno549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4-29T01:38:00" table:style-name="ce5">
            <text:p>2026-04-29 01:38</text:p>
          </table:table-cell>
          <table:table-cell office:value-type="date" office:date-value="2026-04-29T01:54:00" table:style-name="ce6">
            <text:p>2026-04-29 01:54</text:p>
          </table:table-cell>
          <table:table-cell table:number-columns-repeated="16369"/>
        </table:table-row>
        <table:table-row table:style-name="ro1">
          <table:table-cell office:value-type="float" office:value="550" table:style-name="ce3">
            <text:p>55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61609433</text:p>
          </table:table-cell>
          <table:table-cell office:value-type="string" table:style-name="ce1">
            <text:p>Isabella Ospina Restrepo</text:p>
          </table:table-cell>
          <table:table-cell office:value-type="date" office:date-value="1969-10-01T00:00:00" table:style-name="ce4">
            <text:p>1969-10-0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3516615</text:p>
          </table:table-cell>
          <table:table-cell office:value-type="string" table:style-name="ce1">
            <text:p>isabella.ospina550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3-19T08:43:00" table:style-name="ce5">
            <text:p>2026-03-19 08:43</text:p>
          </table:table-cell>
          <table:table-cell office:value-type="date" office:date-value="2026-03-30T19:30:00" table:style-name="ce6">
            <text:p>2026-03-30 19:30</text:p>
          </table:table-cell>
          <table:table-cell table:number-columns-repeated="16369"/>
        </table:table-row>
        <table:table-row table:style-name="ro1">
          <table:table-cell office:value-type="float" office:value="551" table:style-name="ce3">
            <text:p>55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34180765</text:p>
          </table:table-cell>
          <table:table-cell office:value-type="string" table:style-name="ce1">
            <text:p>Santiago José Silva Pérez</text:p>
          </table:table-cell>
          <table:table-cell office:value-type="date" office:date-value="1976-02-22T00:00:00" table:style-name="ce4">
            <text:p>1976-02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3122092</text:p>
          </table:table-cell>
          <table:table-cell office:value-type="string" table:style-name="ce1">
            <text:p>santiago.silva55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24T12:01:00" table:style-name="ce5">
            <text:p>2026-03-24 12:01</text:p>
          </table:table-cell>
          <table:table-cell office:value-type="date" office:date-value="2026-06-07T14:33:00" table:style-name="ce6">
            <text:p>2026-06-07 14:33</text:p>
          </table:table-cell>
          <table:table-cell table:number-columns-repeated="16369"/>
        </table:table-row>
        <table:table-row table:style-name="ro1">
          <table:table-cell office:value-type="float" office:value="552" table:style-name="ce3">
            <text:p>55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48337199</text:p>
          </table:table-cell>
          <table:table-cell office:value-type="string" table:style-name="ce1">
            <text:p>Andrea Pérez Ortiz</text:p>
          </table:table-cell>
          <table:table-cell office:value-type="date" office:date-value="1979-12-16T00:00:00" table:style-name="ce4">
            <text:p>1979-12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1235296</text:p>
          </table:table-cell>
          <table:table-cell office:value-type="string" table:style-name="ce1">
            <text:p>andrea.perez55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28T18:42:00" table:style-name="ce5">
            <text:p>2026-06-28 18:42</text:p>
          </table:table-cell>
          <table:table-cell office:value-type="date" office:date-value="2026-06-28T22:05:00" table:style-name="ce6">
            <text:p>2026-06-28 22:05</text:p>
          </table:table-cell>
          <table:table-cell table:number-columns-repeated="16369"/>
        </table:table-row>
        <table:table-row table:style-name="ro1">
          <table:table-cell office:value-type="float" office:value="553" table:style-name="ce3">
            <text:p>55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2033422</text:p>
          </table:table-cell>
          <table:table-cell office:value-type="string" table:style-name="ce1">
            <text:p>Juliana García Jiménez</text:p>
          </table:table-cell>
          <table:table-cell office:value-type="date" office:date-value="1983-10-26T00:00:00" table:style-name="ce4">
            <text:p>1983-10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8915476</text:p>
          </table:table-cell>
          <table:table-cell office:value-type="string" table:style-name="ce1">
            <text:p>juliana.garcia553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7-01T00:56:00" table:style-name="ce5">
            <text:p>2026-07-01 00:56</text:p>
          </table:table-cell>
          <table:table-cell office:value-type="date" office:date-value="2026-07-06T23:07:00" table:style-name="ce6">
            <text:p>2026-07-06 23:07</text:p>
          </table:table-cell>
          <table:table-cell table:number-columns-repeated="16369"/>
        </table:table-row>
        <table:table-row table:style-name="ro1">
          <table:table-cell office:value-type="float" office:value="554" table:style-name="ce3">
            <text:p>55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26875634</text:p>
          </table:table-cell>
          <table:table-cell office:value-type="string" table:style-name="ce1">
            <text:p>Catalina García Álvarez</text:p>
          </table:table-cell>
          <table:table-cell office:value-type="date" office:date-value="1973-08-08T00:00:00" table:style-name="ce4">
            <text:p>1973-08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3511475</text:p>
          </table:table-cell>
          <table:table-cell office:value-type="string" table:style-name="ce1">
            <text:p>catalina.garcia55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12T14:32:00" table:style-name="ce5">
            <text:p>2026-04-12 14:32</text:p>
          </table:table-cell>
          <table:table-cell office:value-type="date" office:date-value="2026-07-01T07:09:00" table:style-name="ce6">
            <text:p>2026-07-01 07:09</text:p>
          </table:table-cell>
          <table:table-cell table:number-columns-repeated="16369"/>
        </table:table-row>
        <table:table-row table:style-name="ro1">
          <table:table-cell office:value-type="float" office:value="555" table:style-name="ce3">
            <text:p>55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76593403</text:p>
          </table:table-cell>
          <table:table-cell office:value-type="string" table:style-name="ce1">
            <text:p>Valentina Martínez Cárdenas</text:p>
          </table:table-cell>
          <table:table-cell office:value-type="date" office:date-value="1986-08-13T00:00:00" table:style-name="ce4">
            <text:p>1986-08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9657360</text:p>
          </table:table-cell>
          <table:table-cell office:value-type="string" table:style-name="ce1">
            <text:p>valentina.martinez555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4-03T21:59:00" table:style-name="ce5">
            <text:p>2026-04-03 21:59</text:p>
          </table:table-cell>
          <table:table-cell office:value-type="date" office:date-value="2026-06-27T19:12:00" table:style-name="ce6">
            <text:p>2026-06-27 19:12</text:p>
          </table:table-cell>
          <table:table-cell table:number-columns-repeated="16369"/>
        </table:table-row>
        <table:table-row table:style-name="ro1">
          <table:table-cell office:value-type="float" office:value="556" table:style-name="ce3">
            <text:p>55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59937258</text:p>
          </table:table-cell>
          <table:table-cell office:value-type="string" table:style-name="ce1">
            <text:p>José Hernández García</text:p>
          </table:table-cell>
          <table:table-cell office:value-type="date" office:date-value="1983-06-04T00:00:00" table:style-name="ce4">
            <text:p>1983-06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1498254</text:p>
          </table:table-cell>
          <table:table-cell office:value-type="string" table:style-name="ce1">
            <text:p>jose.hernandez556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6-01T11:19:00" table:style-name="ce5">
            <text:p>2026-06-01 11:19</text:p>
          </table:table-cell>
          <table:table-cell office:value-type="date" office:date-value="2026-07-01T11:32:00" table:style-name="ce6">
            <text:p>2026-07-01 11:32</text:p>
          </table:table-cell>
          <table:table-cell table:number-columns-repeated="16369"/>
        </table:table-row>
        <table:table-row table:style-name="ro1">
          <table:table-cell office:value-type="float" office:value="557" table:style-name="ce3">
            <text:p>557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169865430</text:p>
          </table:table-cell>
          <table:table-cell office:value-type="string" table:style-name="ce1">
            <text:p>Ana López Sánchez</text:p>
          </table:table-cell>
          <table:table-cell office:value-type="date" office:date-value="2015-09-04T00:00:00" table:style-name="ce4">
            <text:p>2015-09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2816238</text:p>
          </table:table-cell>
          <table:table-cell office:value-type="string" table:style-name="ce1">
            <text:p>ana.lopez55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4-18T16:48:00" table:style-name="ce5">
            <text:p>2026-04-18 16:48</text:p>
          </table:table-cell>
          <table:table-cell office:value-type="date" office:date-value="2026-04-28T00:57:00" table:style-name="ce6">
            <text:p>2026-04-28 00:57</text:p>
          </table:table-cell>
          <table:table-cell table:number-columns-repeated="16369"/>
        </table:table-row>
        <table:table-row table:style-name="ro1">
          <table:table-cell office:value-type="float" office:value="558" table:style-name="ce3">
            <text:p>55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84651424</text:p>
          </table:table-cell>
          <table:table-cell office:value-type="string" table:style-name="ce1">
            <text:p>Luisa Cárdenas Torres</text:p>
          </table:table-cell>
          <table:table-cell office:value-type="date" office:date-value="1990-01-19T00:00:00" table:style-name="ce4">
            <text:p>1990-01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9803699</text:p>
          </table:table-cell>
          <table:table-cell office:value-type="string" table:style-name="ce1">
            <text:p>luisa.cardenas55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3-31T13:56:00" table:style-name="ce5">
            <text:p>2026-03-31 13:56</text:p>
          </table:table-cell>
          <table:table-cell office:value-type="date" office:date-value="2026-06-11T21:31:00" table:style-name="ce6">
            <text:p>2026-06-11 21:31</text:p>
          </table:table-cell>
          <table:table-cell table:number-columns-repeated="16369"/>
        </table:table-row>
        <table:table-row table:style-name="ro1">
          <table:table-cell office:value-type="float" office:value="559" table:style-name="ce3">
            <text:p>55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5338510</text:p>
          </table:table-cell>
          <table:table-cell office:value-type="string" table:style-name="ce1">
            <text:p>Sara Castro Rodríguez</text:p>
          </table:table-cell>
          <table:table-cell office:value-type="date" office:date-value="2001-05-06T00:00:00" table:style-name="ce4">
            <text:p>2001-05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6698311</text:p>
          </table:table-cell>
          <table:table-cell office:value-type="string" table:style-name="ce1">
            <text:p>sara.castro559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04T16:46:00" table:style-name="ce5">
            <text:p>2026-04-04 16:46</text:p>
          </table:table-cell>
          <table:table-cell office:value-type="date" office:date-value="2026-06-27T05:00:00" table:style-name="ce6">
            <text:p>2026-06-27 05:00</text:p>
          </table:table-cell>
          <table:table-cell table:number-columns-repeated="16369"/>
        </table:table-row>
        <table:table-row table:style-name="ro1">
          <table:table-cell office:value-type="float" office:value="560" table:style-name="ce3">
            <text:p>56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0189797</text:p>
          </table:table-cell>
          <table:table-cell office:value-type="string" table:style-name="ce1">
            <text:p>Andrea Torres Sánchez</text:p>
          </table:table-cell>
          <table:table-cell office:value-type="date" office:date-value="1974-09-26T00:00:00" table:style-name="ce4">
            <text:p>1974-09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5685617</text:p>
          </table:table-cell>
          <table:table-cell office:value-type="string" table:style-name="ce1">
            <text:p>andrea.torres560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24T17:52:00" table:style-name="ce5">
            <text:p>2026-05-24 17:52</text:p>
          </table:table-cell>
          <table:table-cell office:value-type="date" office:date-value="2026-06-04T06:02:00" table:style-name="ce6">
            <text:p>2026-06-04 06:02</text:p>
          </table:table-cell>
          <table:table-cell table:number-columns-repeated="16369"/>
        </table:table-row>
        <table:table-row table:style-name="ro1">
          <table:table-cell office:value-type="float" office:value="561" table:style-name="ce3">
            <text:p>56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70455600</text:p>
          </table:table-cell>
          <table:table-cell office:value-type="string" table:style-name="ce1">
            <text:p>Esteban Ospina Mendoza</text:p>
          </table:table-cell>
          <table:table-cell office:value-type="date" office:date-value="1994-03-23T00:00:00" table:style-name="ce4">
            <text:p>1994-03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7827386</text:p>
          </table:table-cell>
          <table:table-cell office:value-type="string" table:style-name="ce1">
            <text:p>esteban.ospina56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18T00:03:00" table:style-name="ce5">
            <text:p>2026-05-18 00:03</text:p>
          </table:table-cell>
          <table:table-cell office:value-type="date" office:date-value="2026-05-20T20:32:00" table:style-name="ce6">
            <text:p>2026-05-20 20:32</text:p>
          </table:table-cell>
          <table:table-cell table:number-columns-repeated="16369"/>
        </table:table-row>
        <table:table-row table:style-name="ro1">
          <table:table-cell office:value-type="float" office:value="562" table:style-name="ce3">
            <text:p>56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09636111</text:p>
          </table:table-cell>
          <table:table-cell office:value-type="string" table:style-name="ce1">
            <text:p>Andrés Quintero Castro</text:p>
          </table:table-cell>
          <table:table-cell office:value-type="date" office:date-value="1995-07-21T00:00:00" table:style-name="ce4">
            <text:p>1995-07-21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3189885718</text:p>
          </table:table-cell>
          <table:table-cell office:value-type="string" table:style-name="ce1">
            <text:p>andres.quintero562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5-23T00:45:00" table:style-name="ce5">
            <text:p>2026-05-23 00:45</text:p>
          </table:table-cell>
          <table:table-cell office:value-type="date" office:date-value="2026-06-03T06:22:00" table:style-name="ce6">
            <text:p>2026-06-03 06:22</text:p>
          </table:table-cell>
          <table:table-cell table:number-columns-repeated="16369"/>
        </table:table-row>
        <table:table-row table:style-name="ro1">
          <table:table-cell office:value-type="float" office:value="563" table:style-name="ce3">
            <text:p>56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2463325</text:p>
          </table:table-cell>
          <table:table-cell office:value-type="string" table:style-name="ce1">
            <text:p>María Ruiz Muñoz</text:p>
          </table:table-cell>
          <table:table-cell office:value-type="date" office:date-value="2004-04-08T00:00:00" table:style-name="ce4">
            <text:p>2004-04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4101801</text:p>
          </table:table-cell>
          <table:table-cell office:value-type="string" table:style-name="ce1">
            <text:p>maria.ruiz56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11T03:40:00" table:style-name="ce5">
            <text:p>2026-04-11 03:40</text:p>
          </table:table-cell>
          <table:table-cell office:value-type="date" office:date-value="2026-04-27T20:17:00" table:style-name="ce6">
            <text:p>2026-04-27 20:17</text:p>
          </table:table-cell>
          <table:table-cell table:number-columns-repeated="16369"/>
        </table:table-row>
        <table:table-row table:style-name="ro1">
          <table:table-cell office:value-type="float" office:value="564" table:style-name="ce3">
            <text:p>56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63556562</text:p>
          </table:table-cell>
          <table:table-cell office:value-type="string" table:style-name="ce1">
            <text:p>Nicolás Andrés Castaño Díaz</text:p>
          </table:table-cell>
          <table:table-cell office:value-type="date" office:date-value="1994-10-24T00:00:00" table:style-name="ce4">
            <text:p>1994-10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7922331</text:p>
          </table:table-cell>
          <table:table-cell office:value-type="string" table:style-name="ce1">
            <text:p>nicolas.castano564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29T13:21:00" table:style-name="ce5">
            <text:p>2026-05-29 13:21</text:p>
          </table:table-cell>
          <table:table-cell office:value-type="date" office:date-value="2026-07-06T02:06:00" table:style-name="ce6">
            <text:p>2026-07-06 02:06</text:p>
          </table:table-cell>
          <table:table-cell table:number-columns-repeated="16369"/>
        </table:table-row>
        <table:table-row table:style-name="ro1">
          <table:table-cell office:value-type="float" office:value="565" table:style-name="ce3">
            <text:p>56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31013332</text:p>
          </table:table-cell>
          <table:table-cell office:value-type="string" table:style-name="ce1">
            <text:p>Valentina Álvarez Jiménez</text:p>
          </table:table-cell>
          <table:table-cell office:value-type="date" office:date-value="1994-09-10T00:00:00" table:style-name="ce4">
            <text:p>1994-09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6886166</text:p>
          </table:table-cell>
          <table:table-cell office:value-type="string" table:style-name="ce1">
            <text:p>valentina.alvarez56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19T16:41:00" table:style-name="ce5">
            <text:p>2026-06-19 16:41</text:p>
          </table:table-cell>
          <table:table-cell office:value-type="date" office:date-value="2026-07-10T06:22:00" table:style-name="ce6">
            <text:p>2026-07-10 06:22</text:p>
          </table:table-cell>
          <table:table-cell table:number-columns-repeated="16369"/>
        </table:table-row>
        <table:table-row table:style-name="ro1">
          <table:table-cell office:value-type="float" office:value="566" table:style-name="ce3">
            <text:p>566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943968028</text:p>
          </table:table-cell>
          <table:table-cell office:value-type="string" table:style-name="ce1">
            <text:p>Ricardo José Rojas Sánchez</text:p>
          </table:table-cell>
          <table:table-cell office:value-type="date" office:date-value="1964-07-27T00:00:00" table:style-name="ce4">
            <text:p>1964-07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4388346</text:p>
          </table:table-cell>
          <table:table-cell office:value-type="string" table:style-name="ce1">
            <text:p>ricardo.rojas566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23T22:15:00" table:style-name="ce5">
            <text:p>2026-04-23 22:15</text:p>
          </table:table-cell>
          <table:table-cell office:value-type="date" office:date-value="2026-05-06T05:05:00" table:style-name="ce6">
            <text:p>2026-05-06 05:05</text:p>
          </table:table-cell>
          <table:table-cell table:number-columns-repeated="16369"/>
        </table:table-row>
        <table:table-row table:style-name="ro1">
          <table:table-cell office:value-type="float" office:value="567" table:style-name="ce3">
            <text:p>56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21955486</text:p>
          </table:table-cell>
          <table:table-cell office:value-type="string" table:style-name="ce1">
            <text:p>Alejandra Cárdenas Vargas</text:p>
          </table:table-cell>
          <table:table-cell office:value-type="date" office:date-value="2003-03-08T00:00:00" table:style-name="ce4">
            <text:p>2003-03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5224065</text:p>
          </table:table-cell>
          <table:table-cell office:value-type="string" table:style-name="ce1">
            <text:p>alejandra.cardenas567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3-19T21:04:00" table:style-name="ce5">
            <text:p>2026-03-19 21:04</text:p>
          </table:table-cell>
          <table:table-cell office:value-type="date" office:date-value="2026-03-21T00:31:00" table:style-name="ce6">
            <text:p>2026-03-21 00:31</text:p>
          </table:table-cell>
          <table:table-cell table:number-columns-repeated="16369"/>
        </table:table-row>
        <table:table-row table:style-name="ro1">
          <table:table-cell office:value-type="float" office:value="568" table:style-name="ce3">
            <text:p>56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69195615</text:p>
          </table:table-cell>
          <table:table-cell office:value-type="string" table:style-name="ce1">
            <text:p>Carlos Rodríguez Castaño</text:p>
          </table:table-cell>
          <table:table-cell office:value-type="date" office:date-value="1979-10-23T00:00:00" table:style-name="ce4">
            <text:p>1979-10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3067476</text:p>
          </table:table-cell>
          <table:table-cell office:value-type="string" table:style-name="ce1">
            <text:p>carlos.rodriguez56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5-17T10:35:00" table:style-name="ce5">
            <text:p>2026-05-17 10:35</text:p>
          </table:table-cell>
          <table:table-cell office:value-type="date" office:date-value="2026-06-23T07:50:00" table:style-name="ce6">
            <text:p>2026-06-23 07:50</text:p>
          </table:table-cell>
          <table:table-cell table:number-columns-repeated="16369"/>
        </table:table-row>
        <table:table-row table:style-name="ro1">
          <table:table-cell office:value-type="float" office:value="569" table:style-name="ce3">
            <text:p>56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68817665</text:p>
          </table:table-cell>
          <table:table-cell office:value-type="string" table:style-name="ce1">
            <text:p>Andrea Álvarez Valencia</text:p>
          </table:table-cell>
          <table:table-cell office:value-type="date" office:date-value="1936-11-04T00:00:00" table:style-name="ce4">
            <text:p>1936-11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7542414</text:p>
          </table:table-cell>
          <table:table-cell office:value-type="string" table:style-name="ce1">
            <text:p>andrea.alvarez569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26T02:52:00" table:style-name="ce5">
            <text:p>2026-05-26 02:52</text:p>
          </table:table-cell>
          <table:table-cell office:value-type="date" office:date-value="2026-05-31T15:15:00" table:style-name="ce6">
            <text:p>2026-05-31 15:15</text:p>
          </table:table-cell>
          <table:table-cell table:number-columns-repeated="16369"/>
        </table:table-row>
        <table:table-row table:style-name="ro1">
          <table:table-cell office:value-type="float" office:value="570" table:style-name="ce3">
            <text:p>57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25286747</text:p>
          </table:table-cell>
          <table:table-cell office:value-type="string" table:style-name="ce1">
            <text:p>Laura Castaño Silva</text:p>
          </table:table-cell>
          <table:table-cell office:value-type="date" office:date-value="1984-02-27T00:00:00" table:style-name="ce4">
            <text:p>1984-02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7787216</text:p>
          </table:table-cell>
          <table:table-cell office:value-type="string" table:style-name="ce1">
            <text:p>laura.castano570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15T08:22:00" table:style-name="ce5">
            <text:p>2026-05-15 08:22</text:p>
          </table:table-cell>
          <table:table-cell office:value-type="date" office:date-value="2026-05-27T21:39:00" table:style-name="ce6">
            <text:p>2026-05-27 21:39</text:p>
          </table:table-cell>
          <table:table-cell table:number-columns-repeated="16369"/>
        </table:table-row>
        <table:table-row table:style-name="ro1">
          <table:table-cell office:value-type="float" office:value="571" table:style-name="ce3">
            <text:p>57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86923214</text:p>
          </table:table-cell>
          <table:table-cell office:value-type="string" table:style-name="ce1">
            <text:p>Daniel Jiménez García</text:p>
          </table:table-cell>
          <table:table-cell office:value-type="date" office:date-value="2003-05-31T00:00:00" table:style-name="ce4">
            <text:p>2003-05-3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8026874</text:p>
          </table:table-cell>
          <table:table-cell office:value-type="string" table:style-name="ce1">
            <text:p>daniel.jimenez571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26T18:44:00" table:style-name="ce5">
            <text:p>2026-06-26 18:44</text:p>
          </table:table-cell>
          <table:table-cell office:value-type="date" office:date-value="2026-07-04T23:04:00" table:style-name="ce6">
            <text:p>2026-07-04 23:04</text:p>
          </table:table-cell>
          <table:table-cell table:number-columns-repeated="16369"/>
        </table:table-row>
        <table:table-row table:style-name="ro1">
          <table:table-cell office:value-type="float" office:value="572" table:style-name="ce3">
            <text:p>57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579796811</text:p>
          </table:table-cell>
          <table:table-cell office:value-type="string" table:style-name="ce1">
            <text:p>Alejandra López Muñoz</text:p>
          </table:table-cell>
          <table:table-cell office:value-type="date" office:date-value="2011-01-09T00:00:00" table:style-name="ce4">
            <text:p>2011-01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2989998</text:p>
          </table:table-cell>
          <table:table-cell office:value-type="string" table:style-name="ce1">
            <text:p>alejandra.lopez572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07T03:41:00" table:style-name="ce5">
            <text:p>2026-05-07 03:41</text:p>
          </table:table-cell>
          <table:table-cell office:value-type="date" office:date-value="2026-05-20T04:15:00" table:style-name="ce6">
            <text:p>2026-05-20 04:15</text:p>
          </table:table-cell>
          <table:table-cell table:number-columns-repeated="16369"/>
        </table:table-row>
        <table:table-row table:style-name="ro1">
          <table:table-cell office:value-type="float" office:value="573" table:style-name="ce3">
            <text:p>573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81524984</text:p>
          </table:table-cell>
          <table:table-cell office:value-type="string" table:style-name="ce1">
            <text:p>Miguel Tomás Romero Giraldo</text:p>
          </table:table-cell>
          <table:table-cell office:value-type="date" office:date-value="2008-12-06T00:00:00" table:style-name="ce4">
            <text:p>2008-12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7163416</text:p>
          </table:table-cell>
          <table:table-cell office:value-type="string" table:style-name="ce1">
            <text:p>miguel.romero57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4-20T02:59:00" table:style-name="ce5">
            <text:p>2026-04-20 02:59</text:p>
          </table:table-cell>
          <table:table-cell office:value-type="date" office:date-value="2026-04-27T23:34:00" table:style-name="ce6">
            <text:p>2026-04-27 23:34</text:p>
          </table:table-cell>
          <table:table-cell table:number-columns-repeated="16369"/>
        </table:table-row>
        <table:table-row table:style-name="ro1">
          <table:table-cell office:value-type="float" office:value="574" table:style-name="ce3">
            <text:p>57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49615036</text:p>
          </table:table-cell>
          <table:table-cell office:value-type="string" table:style-name="ce1">
            <text:p>Cristian Cárdenas Rojas</text:p>
          </table:table-cell>
          <table:table-cell office:value-type="date" office:date-value="1957-07-22T00:00:00" table:style-name="ce4">
            <text:p>1957-07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8124385</text:p>
          </table:table-cell>
          <table:table-cell office:value-type="string" table:style-name="ce1">
            <text:p>cristian.cardenas574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07T23:03:00" table:style-name="ce5">
            <text:p>2026-06-07 23:03</text:p>
          </table:table-cell>
          <table:table-cell office:value-type="date" office:date-value="2026-06-17T07:38:00" table:style-name="ce6">
            <text:p>2026-06-17 07:38</text:p>
          </table:table-cell>
          <table:table-cell table:number-columns-repeated="16369"/>
        </table:table-row>
        <table:table-row table:style-name="ro1">
          <table:table-cell office:value-type="float" office:value="575" table:style-name="ce3">
            <text:p>57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122675</text:p>
          </table:table-cell>
          <table:table-cell office:value-type="string" table:style-name="ce1">
            <text:p>Samuel Carlos Quintero Muñoz</text:p>
          </table:table-cell>
          <table:table-cell office:value-type="date" office:date-value="1984-01-07T00:00:00" table:style-name="ce4">
            <text:p>1984-01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8790876</text:p>
          </table:table-cell>
          <table:table-cell office:value-type="string" table:style-name="ce1">
            <text:p>samuel.quintero575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6-17T11:03:00" table:style-name="ce5">
            <text:p>2026-06-17 11:03</text:p>
          </table:table-cell>
          <table:table-cell office:value-type="date" office:date-value="2026-06-22T22:42:00" table:style-name="ce6">
            <text:p>2026-06-22 22:42</text:p>
          </table:table-cell>
          <table:table-cell table:number-columns-repeated="16369"/>
        </table:table-row>
        <table:table-row table:style-name="ro1">
          <table:table-cell office:value-type="float" office:value="576" table:style-name="ce3">
            <text:p>57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18407262</text:p>
          </table:table-cell>
          <table:table-cell office:value-type="string" table:style-name="ce1">
            <text:p>Miguel Muñoz Giraldo</text:p>
          </table:table-cell>
          <table:table-cell office:value-type="date" office:date-value="1970-05-20T00:00:00" table:style-name="ce4">
            <text:p>1970-05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6038143</text:p>
          </table:table-cell>
          <table:table-cell office:value-type="string" table:style-name="ce1">
            <text:p>miguel.munoz57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13T23:59:00" table:style-name="ce5">
            <text:p>2026-04-13 23:59</text:p>
          </table:table-cell>
          <table:table-cell office:value-type="date" office:date-value="2026-04-25T22:36:00" table:style-name="ce6">
            <text:p>2026-04-25 22:36</text:p>
          </table:table-cell>
          <table:table-cell table:number-columns-repeated="16369"/>
        </table:table-row>
        <table:table-row table:style-name="ro1">
          <table:table-cell office:value-type="float" office:value="577" table:style-name="ce3">
            <text:p>57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55965725</text:p>
          </table:table-cell>
          <table:table-cell office:value-type="string" table:style-name="ce1">
            <text:p>Laura Ruiz García</text:p>
          </table:table-cell>
          <table:table-cell office:value-type="date" office:date-value="2000-04-06T00:00:00" table:style-name="ce4">
            <text:p>2000-04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2731054</text:p>
          </table:table-cell>
          <table:table-cell office:value-type="string" table:style-name="ce1">
            <text:p>laura.ruiz577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31T23:58:00" table:style-name="ce5">
            <text:p>2026-05-31 23:58</text:p>
          </table:table-cell>
          <table:table-cell office:value-type="date" office:date-value="2026-07-01T22:53:00" table:style-name="ce6">
            <text:p>2026-07-01 22:53</text:p>
          </table:table-cell>
          <table:table-cell table:number-columns-repeated="16369"/>
        </table:table-row>
        <table:table-row table:style-name="ro1">
          <table:table-cell office:value-type="float" office:value="578" table:style-name="ce3">
            <text:p>57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87153542</text:p>
          </table:table-cell>
          <table:table-cell office:value-type="string" table:style-name="ce1">
            <text:p>Natalia Ruiz Hernández</text:p>
          </table:table-cell>
          <table:table-cell office:value-type="date" office:date-value="1974-07-30T00:00:00" table:style-name="ce4">
            <text:p>1974-07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2992013</text:p>
          </table:table-cell>
          <table:table-cell office:value-type="string" table:style-name="ce1">
            <text:p>natalia.ruiz57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3-17T18:10:00" table:style-name="ce5">
            <text:p>2026-03-17 18:10</text:p>
          </table:table-cell>
          <table:table-cell office:value-type="date" office:date-value="2026-06-29T20:16:00" table:style-name="ce6">
            <text:p>2026-06-29 20:16</text:p>
          </table:table-cell>
          <table:table-cell table:number-columns-repeated="16369"/>
        </table:table-row>
        <table:table-row table:style-name="ro1">
          <table:table-cell office:value-type="float" office:value="579" table:style-name="ce3">
            <text:p>57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23033053</text:p>
          </table:table-cell>
          <table:table-cell office:value-type="string" table:style-name="ce1">
            <text:p>Nicolás Restrepo López</text:p>
          </table:table-cell>
          <table:table-cell office:value-type="date" office:date-value="2005-08-13T00:00:00" table:style-name="ce4">
            <text:p>2005-08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2892495</text:p>
          </table:table-cell>
          <table:table-cell office:value-type="string" table:style-name="ce1">
            <text:p>nicolas.restrepo579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3-28T00:27:00" table:style-name="ce5">
            <text:p>2026-03-28 00:27</text:p>
          </table:table-cell>
          <table:table-cell office:value-type="date" office:date-value="2026-06-10T06:50:00" table:style-name="ce6">
            <text:p>2026-06-10 06:50</text:p>
          </table:table-cell>
          <table:table-cell table:number-columns-repeated="16369"/>
        </table:table-row>
        <table:table-row table:style-name="ro1">
          <table:table-cell office:value-type="float" office:value="580" table:style-name="ce3">
            <text:p>58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72058945</text:p>
          </table:table-cell>
          <table:table-cell office:value-type="string" table:style-name="ce1">
            <text:p>Paula Castro Muñoz</text:p>
          </table:table-cell>
          <table:table-cell office:value-type="date" office:date-value="1965-03-01T00:00:00" table:style-name="ce4">
            <text:p>1965-03-0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3346730</text:p>
          </table:table-cell>
          <table:table-cell office:value-type="string" table:style-name="ce1">
            <text:p>paula.castro580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5-04T03:27:00" table:style-name="ce5">
            <text:p>2026-05-04 03:27</text:p>
          </table:table-cell>
          <table:table-cell office:value-type="date" office:date-value="2026-07-06T09:40:00" table:style-name="ce6">
            <text:p>2026-07-06 09:40</text:p>
          </table:table-cell>
          <table:table-cell table:number-columns-repeated="16369"/>
        </table:table-row>
        <table:table-row table:style-name="ro1">
          <table:table-cell office:value-type="float" office:value="581" table:style-name="ce3">
            <text:p>58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59139102</text:p>
          </table:table-cell>
          <table:table-cell office:value-type="string" table:style-name="ce1">
            <text:p>Andrea Álvarez García</text:p>
          </table:table-cell>
          <table:table-cell office:value-type="date" office:date-value="1983-04-03T00:00:00" table:style-name="ce4">
            <text:p>1983-04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6542809</text:p>
          </table:table-cell>
          <table:table-cell office:value-type="string" table:style-name="ce1">
            <text:p>andrea.alvarez581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7-04T09:34:00" table:style-name="ce5">
            <text:p>2026-07-04 09:34</text:p>
          </table:table-cell>
          <table:table-cell office:value-type="date" office:date-value="2026-07-05T13:20:00" table:style-name="ce6">
            <text:p>2026-07-05 13:20</text:p>
          </table:table-cell>
          <table:table-cell table:number-columns-repeated="16369"/>
        </table:table-row>
        <table:table-row table:style-name="ro1">
          <table:table-cell office:value-type="float" office:value="582" table:style-name="ce3">
            <text:p>58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19857886</text:p>
          </table:table-cell>
          <table:table-cell office:value-type="string" table:style-name="ce1">
            <text:p>Cristian Vargas Restrepo</text:p>
          </table:table-cell>
          <table:table-cell office:value-type="date" office:date-value="1976-07-07T00:00:00" table:style-name="ce4">
            <text:p>1976-07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3354308</text:p>
          </table:table-cell>
          <table:table-cell office:value-type="string" table:style-name="ce1">
            <text:p>cristian.vargas58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20T02:41:00" table:style-name="ce5">
            <text:p>2026-06-20 02:41</text:p>
          </table:table-cell>
          <table:table-cell office:value-type="date" office:date-value="2026-07-07T21:52:00" table:style-name="ce6">
            <text:p>2026-07-07 21:52</text:p>
          </table:table-cell>
          <table:table-cell table:number-columns-repeated="16369"/>
        </table:table-row>
        <table:table-row table:style-name="ro1">
          <table:table-cell office:value-type="float" office:value="583" table:style-name="ce3">
            <text:p>58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99257414</text:p>
          </table:table-cell>
          <table:table-cell office:value-type="string" table:style-name="ce1">
            <text:p>Sofía Rodríguez Hernández</text:p>
          </table:table-cell>
          <table:table-cell office:value-type="date" office:date-value="1982-06-06T00:00:00" table:style-name="ce4">
            <text:p>1982-06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9740446</text:p>
          </table:table-cell>
          <table:table-cell office:value-type="string" table:style-name="ce1">
            <text:p>sofia.rodriguez58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29T09:04:00" table:style-name="ce5">
            <text:p>2026-04-29 09:04</text:p>
          </table:table-cell>
          <table:table-cell office:value-type="date" office:date-value="2026-06-30T21:53:00" table:style-name="ce6">
            <text:p>2026-06-30 21:53</text:p>
          </table:table-cell>
          <table:table-cell table:number-columns-repeated="16369"/>
        </table:table-row>
        <table:table-row table:style-name="ro1">
          <table:table-cell office:value-type="float" office:value="584" table:style-name="ce3">
            <text:p>58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56485862</text:p>
          </table:table-cell>
          <table:table-cell office:value-type="string" table:style-name="ce1">
            <text:p>Camila Alejandra González Martínez</text:p>
          </table:table-cell>
          <table:table-cell office:value-type="date" office:date-value="1983-10-01T00:00:00" table:style-name="ce4">
            <text:p>1983-10-0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7440887</text:p>
          </table:table-cell>
          <table:table-cell office:value-type="string" table:style-name="ce1">
            <text:p>camila.gonzalez584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5-28T14:24:00" table:style-name="ce5">
            <text:p>2026-05-28 14:24</text:p>
          </table:table-cell>
          <table:table-cell office:value-type="date" office:date-value="2026-06-22T20:43:00" table:style-name="ce6">
            <text:p>2026-06-22 20:43</text:p>
          </table:table-cell>
          <table:table-cell table:number-columns-repeated="16369"/>
        </table:table-row>
        <table:table-row table:style-name="ro1">
          <table:table-cell office:value-type="float" office:value="585" table:style-name="ce3">
            <text:p>58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99941035</text:p>
          </table:table-cell>
          <table:table-cell office:value-type="string" table:style-name="ce1">
            <text:p>Daniel Castaño Sánchez</text:p>
          </table:table-cell>
          <table:table-cell office:value-type="date" office:date-value="1997-12-13T00:00:00" table:style-name="ce4">
            <text:p>1997-12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3758698</text:p>
          </table:table-cell>
          <table:table-cell office:value-type="string" table:style-name="ce1">
            <text:p>daniel.castano58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5-26T08:16:00" table:style-name="ce5">
            <text:p>2026-05-26 08:16</text:p>
          </table:table-cell>
          <table:table-cell office:value-type="date" office:date-value="2026-07-05T23:21:00" table:style-name="ce6">
            <text:p>2026-07-05 23:21</text:p>
          </table:table-cell>
          <table:table-cell table:number-columns-repeated="16369"/>
        </table:table-row>
        <table:table-row table:style-name="ro1">
          <table:table-cell office:value-type="float" office:value="586" table:style-name="ce3">
            <text:p>58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77894403</text:p>
          </table:table-cell>
          <table:table-cell office:value-type="string" table:style-name="ce1">
            <text:p>Tomás Cristian Restrepo Rojas</text:p>
          </table:table-cell>
          <table:table-cell office:value-type="date" office:date-value="1988-02-03T00:00:00" table:style-name="ce4">
            <text:p>1988-02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6697079</text:p>
          </table:table-cell>
          <table:table-cell office:value-type="string" table:style-name="ce1">
            <text:p>tomas.restrepo586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4-05T11:04:00" table:style-name="ce5">
            <text:p>2026-04-05 11:04</text:p>
          </table:table-cell>
          <table:table-cell office:value-type="date" office:date-value="2026-05-05T05:46:00" table:style-name="ce6">
            <text:p>2026-05-05 05:46</text:p>
          </table:table-cell>
          <table:table-cell table:number-columns-repeated="16369"/>
        </table:table-row>
        <table:table-row table:style-name="ro1">
          <table:table-cell office:value-type="float" office:value="587" table:style-name="ce3">
            <text:p>58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55285594</text:p>
          </table:table-cell>
          <table:table-cell office:value-type="string" table:style-name="ce1">
            <text:p>Carolina Ortiz Muñoz</text:p>
          </table:table-cell>
          <table:table-cell office:value-type="date" office:date-value="1950-08-22T00:00:00" table:style-name="ce4">
            <text:p>1950-08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4822271</text:p>
          </table:table-cell>
          <table:table-cell office:value-type="string" table:style-name="ce1">
            <text:p>carolina.ortiz587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06T08:11:00" table:style-name="ce5">
            <text:p>2026-06-06 08:11</text:p>
          </table:table-cell>
          <table:table-cell office:value-type="date" office:date-value="2026-06-16T19:37:00" table:style-name="ce6">
            <text:p>2026-06-16 19:37</text:p>
          </table:table-cell>
          <table:table-cell table:number-columns-repeated="16369"/>
        </table:table-row>
        <table:table-row table:style-name="ro1">
          <table:table-cell office:value-type="float" office:value="588" table:style-name="ce3">
            <text:p>58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3354454</text:p>
          </table:table-cell>
          <table:table-cell office:value-type="string" table:style-name="ce1">
            <text:p>Laura Ortiz Moreno</text:p>
          </table:table-cell>
          <table:table-cell office:value-type="date" office:date-value="1967-12-22T00:00:00" table:style-name="ce4">
            <text:p>1967-12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6435952</text:p>
          </table:table-cell>
          <table:table-cell office:value-type="string" table:style-name="ce1">
            <text:p>laura.ortiz58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5-08T09:24:00" table:style-name="ce5">
            <text:p>2026-05-08 09:24</text:p>
          </table:table-cell>
          <table:table-cell office:value-type="date" office:date-value="2026-06-17T08:42:00" table:style-name="ce6">
            <text:p>2026-06-17 08:42</text:p>
          </table:table-cell>
          <table:table-cell table:number-columns-repeated="16369"/>
        </table:table-row>
        <table:table-row table:style-name="ro1">
          <table:table-cell office:value-type="float" office:value="589" table:style-name="ce3">
            <text:p>58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92281175</text:p>
          </table:table-cell>
          <table:table-cell office:value-type="string" table:style-name="ce1">
            <text:p>Carolina Castro Ortiz</text:p>
          </table:table-cell>
          <table:table-cell office:value-type="date" office:date-value="1966-09-04T00:00:00" table:style-name="ce4">
            <text:p>1966-09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2547850</text:p>
          </table:table-cell>
          <table:table-cell office:value-type="string" table:style-name="ce1">
            <text:p>carolina.castro589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13T23:49:00" table:style-name="ce5">
            <text:p>2026-05-13 23:49</text:p>
          </table:table-cell>
          <table:table-cell office:value-type="date" office:date-value="2026-05-31T20:37:00" table:style-name="ce6">
            <text:p>2026-05-31 20:37</text:p>
          </table:table-cell>
          <table:table-cell table:number-columns-repeated="16369"/>
        </table:table-row>
        <table:table-row table:style-name="ro1">
          <table:table-cell office:value-type="float" office:value="590" table:style-name="ce3">
            <text:p>59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9252476</text:p>
          </table:table-cell>
          <table:table-cell office:value-type="string" table:style-name="ce1">
            <text:p>Esteban Ortiz Rojas</text:p>
          </table:table-cell>
          <table:table-cell office:value-type="date" office:date-value="2009-12-21T00:00:00" table:style-name="ce4">
            <text:p>2009-12-2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1685707</text:p>
          </table:table-cell>
          <table:table-cell office:value-type="string" table:style-name="ce1">
            <text:p>esteban.ortiz590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20T18:18:00" table:style-name="ce5">
            <text:p>2026-04-20 18:18</text:p>
          </table:table-cell>
          <table:table-cell office:value-type="date" office:date-value="2026-05-22T10:19:00" table:style-name="ce6">
            <text:p>2026-05-22 10:19</text:p>
          </table:table-cell>
          <table:table-cell table:number-columns-repeated="16369"/>
        </table:table-row>
        <table:table-row table:style-name="ro1">
          <table:table-cell office:value-type="float" office:value="591" table:style-name="ce3">
            <text:p>59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73907595</text:p>
          </table:table-cell>
          <table:table-cell office:value-type="string" table:style-name="ce1">
            <text:p>Santiago Andrés Quintero Vargas</text:p>
          </table:table-cell>
          <table:table-cell office:value-type="date" office:date-value="1982-09-20T00:00:00" table:style-name="ce4">
            <text:p>1982-09-20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3125680685</text:p>
          </table:table-cell>
          <table:table-cell office:value-type="string" table:style-name="ce1">
            <text:p>santiago.quintero591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12T05:12:00" table:style-name="ce5">
            <text:p>2026-05-12 05:12</text:p>
          </table:table-cell>
          <table:table-cell office:value-type="date" office:date-value="2026-06-13T00:17:00" table:style-name="ce6">
            <text:p>2026-06-13 00:17</text:p>
          </table:table-cell>
          <table:table-cell table:number-columns-repeated="16369"/>
        </table:table-row>
        <table:table-row table:style-name="ro1">
          <table:table-cell office:value-type="float" office:value="592" table:style-name="ce3">
            <text:p>59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698116449</text:p>
          </table:table-cell>
          <table:table-cell office:value-type="string" table:style-name="ce1">
            <text:p>Juan Valencia Pérez</text:p>
          </table:table-cell>
          <table:table-cell office:value-type="date" office:date-value="2012-12-29T00:00:00" table:style-name="ce4">
            <text:p>2012-12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1241420</text:p>
          </table:table-cell>
          <table:table-cell office:value-type="string" table:style-name="ce1">
            <text:p>juan.valencia592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5-14T04:16:00" table:style-name="ce5">
            <text:p>2026-05-14 04:16</text:p>
          </table:table-cell>
          <table:table-cell office:value-type="date" office:date-value="2026-06-02T01:33:00" table:style-name="ce6">
            <text:p>2026-06-02 01:33</text:p>
          </table:table-cell>
          <table:table-cell table:number-columns-repeated="16369"/>
        </table:table-row>
        <table:table-row table:style-name="ro1">
          <table:table-cell office:value-type="float" office:value="593" table:style-name="ce3">
            <text:p>59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0701842</text:p>
          </table:table-cell>
          <table:table-cell office:value-type="string" table:style-name="ce1">
            <text:p>Laura Juliana Hernández García</text:p>
          </table:table-cell>
          <table:table-cell office:value-type="date" office:date-value="1961-11-28T00:00:00" table:style-name="ce4">
            <text:p>1961-11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1240467</text:p>
          </table:table-cell>
          <table:table-cell office:value-type="string" table:style-name="ce1">
            <text:p>laura.hernandez59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05T02:13:00" table:style-name="ce5">
            <text:p>2026-05-05 02:13</text:p>
          </table:table-cell>
          <table:table-cell office:value-type="date" office:date-value="2026-05-06T02:36:00" table:style-name="ce6">
            <text:p>2026-05-06 02:36</text:p>
          </table:table-cell>
          <table:table-cell table:number-columns-repeated="16369"/>
        </table:table-row>
        <table:table-row table:style-name="ro1">
          <table:table-cell office:value-type="float" office:value="594" table:style-name="ce3">
            <text:p>59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29263585</text:p>
          </table:table-cell>
          <table:table-cell office:value-type="string" table:style-name="ce1">
            <text:p>Laura García Sánchez</text:p>
          </table:table-cell>
          <table:table-cell office:value-type="date" office:date-value="1966-11-04T00:00:00" table:style-name="ce4">
            <text:p>1966-11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3773592</text:p>
          </table:table-cell>
          <table:table-cell office:value-type="string" table:style-name="ce1">
            <text:p>laura.garcia594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4-12T12:08:00" table:style-name="ce5">
            <text:p>2026-04-12 12:08</text:p>
          </table:table-cell>
          <table:table-cell office:value-type="date" office:date-value="2026-07-05T01:51:00" table:style-name="ce6">
            <text:p>2026-07-05 01:51</text:p>
          </table:table-cell>
          <table:table-cell table:number-columns-repeated="16369"/>
        </table:table-row>
        <table:table-row table:style-name="ro1">
          <table:table-cell office:value-type="float" office:value="595" table:style-name="ce3">
            <text:p>59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02693817</text:p>
          </table:table-cell>
          <table:table-cell office:value-type="string" table:style-name="ce1">
            <text:p>Isabella Muñoz Mendoza</text:p>
          </table:table-cell>
          <table:table-cell office:value-type="date" office:date-value="1961-08-14T00:00:00" table:style-name="ce4">
            <text:p>1961-08-1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7393311</text:p>
          </table:table-cell>
          <table:table-cell office:value-type="string" table:style-name="ce1">
            <text:p>isabella.munoz595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7-04T06:16:00" table:style-name="ce5">
            <text:p>2026-07-04 06:16</text:p>
          </table:table-cell>
          <table:table-cell office:value-type="date" office:date-value="2026-07-04T18:03:00" table:style-name="ce6">
            <text:p>2026-07-04 18:03</text:p>
          </table:table-cell>
          <table:table-cell table:number-columns-repeated="16369"/>
        </table:table-row>
        <table:table-row table:style-name="ro1">
          <table:table-cell office:value-type="float" office:value="596" table:style-name="ce3">
            <text:p>59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21853597</text:p>
          </table:table-cell>
          <table:table-cell office:value-type="string" table:style-name="ce1">
            <text:p>Tomás Pérez Giraldo</text:p>
          </table:table-cell>
          <table:table-cell office:value-type="date" office:date-value="1970-12-17T00:00:00" table:style-name="ce4">
            <text:p>1970-12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5542316</text:p>
          </table:table-cell>
          <table:table-cell office:value-type="string" table:style-name="ce1">
            <text:p>tomas.perez596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6-16T18:47:00" table:style-name="ce5">
            <text:p>2026-06-16 18:47</text:p>
          </table:table-cell>
          <table:table-cell office:value-type="date" office:date-value="2026-06-18T20:12:00" table:style-name="ce6">
            <text:p>2026-06-18 20:12</text:p>
          </table:table-cell>
          <table:table-cell table:number-columns-repeated="16369"/>
        </table:table-row>
        <table:table-row table:style-name="ro1">
          <table:table-cell office:value-type="float" office:value="597" table:style-name="ce3">
            <text:p>59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9325382</text:p>
          </table:table-cell>
          <table:table-cell office:value-type="string" table:style-name="ce1">
            <text:p>David Silva Ruiz</text:p>
          </table:table-cell>
          <table:table-cell office:value-type="date" office:date-value="1985-04-17T00:00:00" table:style-name="ce4">
            <text:p>1985-04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8389905</text:p>
          </table:table-cell>
          <table:table-cell office:value-type="string" table:style-name="ce1">
            <text:p>david.silva597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11T02:17:00" table:style-name="ce5">
            <text:p>2026-04-11 02:17</text:p>
          </table:table-cell>
          <table:table-cell office:value-type="date" office:date-value="2026-07-03T14:15:00" table:style-name="ce6">
            <text:p>2026-07-03 14:15</text:p>
          </table:table-cell>
          <table:table-cell table:number-columns-repeated="16369"/>
        </table:table-row>
        <table:table-row table:style-name="ro1">
          <table:table-cell office:value-type="float" office:value="598" table:style-name="ce3">
            <text:p>59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3065306</text:p>
          </table:table-cell>
          <table:table-cell office:value-type="string" table:style-name="ce1">
            <text:p>Manuela Rodríguez Ramírez</text:p>
          </table:table-cell>
          <table:table-cell office:value-type="date" office:date-value="1970-11-03T00:00:00" table:style-name="ce4">
            <text:p>1970-11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4496000</text:p>
          </table:table-cell>
          <table:table-cell office:value-type="string" table:style-name="ce1">
            <text:p>manuela.rodriguez598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12T09:11:00" table:style-name="ce5">
            <text:p>2026-05-12 09:11</text:p>
          </table:table-cell>
          <table:table-cell office:value-type="date" office:date-value="2026-06-15T05:47:00" table:style-name="ce6">
            <text:p>2026-06-15 05:47</text:p>
          </table:table-cell>
          <table:table-cell table:number-columns-repeated="16369"/>
        </table:table-row>
        <table:table-row table:style-name="ro1">
          <table:table-cell office:value-type="float" office:value="599" table:style-name="ce3">
            <text:p>59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61049983</text:p>
          </table:table-cell>
          <table:table-cell office:value-type="string" table:style-name="ce1">
            <text:p>Carolina Ruiz Restrepo</text:p>
          </table:table-cell>
          <table:table-cell office:value-type="date" office:date-value="1981-10-04T00:00:00" table:style-name="ce4">
            <text:p>1981-10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9122541</text:p>
          </table:table-cell>
          <table:table-cell office:value-type="string" table:style-name="ce1">
            <text:p>carolina.ruiz599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09T12:20:00" table:style-name="ce5">
            <text:p>2026-04-09 12:20</text:p>
          </table:table-cell>
          <table:table-cell office:value-type="date" office:date-value="2026-06-15T02:02:00" table:style-name="ce6">
            <text:p>2026-06-15 02:02</text:p>
          </table:table-cell>
          <table:table-cell table:number-columns-repeated="16369"/>
        </table:table-row>
        <table:table-row table:style-name="ro1">
          <table:table-cell office:value-type="float" office:value="600" table:style-name="ce3">
            <text:p>60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83940269</text:p>
          </table:table-cell>
          <table:table-cell office:value-type="string" table:style-name="ce1">
            <text:p>Alejandro David Martínez Valencia</text:p>
          </table:table-cell>
          <table:table-cell office:value-type="date" office:date-value="1983-10-26T00:00:00" table:style-name="ce4">
            <text:p>1983-10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2598458</text:p>
          </table:table-cell>
          <table:table-cell office:value-type="string" table:style-name="ce1">
            <text:p>alejandro.martinez600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3-29T17:14:00" table:style-name="ce5">
            <text:p>2026-03-29 17:14</text:p>
          </table:table-cell>
          <table:table-cell office:value-type="date" office:date-value="2026-06-08T14:45:00" table:style-name="ce6">
            <text:p>2026-06-08 14:45</text:p>
          </table:table-cell>
          <table:table-cell table:number-columns-repeated="16369"/>
        </table:table-row>
        <table:table-row table:style-name="ro1">
          <table:table-cell office:value-type="float" office:value="601" table:style-name="ce3">
            <text:p>60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79499601</text:p>
          </table:table-cell>
          <table:table-cell office:value-type="string" table:style-name="ce1">
            <text:p>Nicolás Ramírez Sánchez</text:p>
          </table:table-cell>
          <table:table-cell office:value-type="date" office:date-value="1990-09-28T00:00:00" table:style-name="ce4">
            <text:p>1990-09-28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125304629</text:p>
          </table:table-cell>
          <table:table-cell office:value-type="string" table:style-name="ce1">
            <text:p>nicolas.ramirez601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13T13:21:00" table:style-name="ce5">
            <text:p>2026-06-13 13:21</text:p>
          </table:table-cell>
          <table:table-cell office:value-type="date" office:date-value="2026-07-07T15:14:00" table:style-name="ce6">
            <text:p>2026-07-07 15:14</text:p>
          </table:table-cell>
          <table:table-cell table:number-columns-repeated="16369"/>
        </table:table-row>
        <table:table-row table:style-name="ro1">
          <table:table-cell office:value-type="float" office:value="602" table:style-name="ce3">
            <text:p>60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6856933</text:p>
          </table:table-cell>
          <table:table-cell office:value-type="string" table:style-name="ce1">
            <text:p>Juan Hernández Cárdenas</text:p>
          </table:table-cell>
          <table:table-cell office:value-type="date" office:date-value="2007-09-02T00:00:00" table:style-name="ce4">
            <text:p>2007-09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5020203</text:p>
          </table:table-cell>
          <table:table-cell office:value-type="string" table:style-name="ce1">
            <text:p>juan.hernandez602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06T17:23:00" table:style-name="ce5">
            <text:p>2026-06-06 17:23</text:p>
          </table:table-cell>
          <table:table-cell office:value-type="date" office:date-value="2026-06-10T10:57:00" table:style-name="ce6">
            <text:p>2026-06-10 10:57</text:p>
          </table:table-cell>
          <table:table-cell table:number-columns-repeated="16369"/>
        </table:table-row>
        <table:table-row table:style-name="ro1">
          <table:table-cell office:value-type="float" office:value="603" table:style-name="ce3">
            <text:p>60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77700094</text:p>
          </table:table-cell>
          <table:table-cell office:value-type="string" table:style-name="ce1">
            <text:p>Manuela Castaño Pérez</text:p>
          </table:table-cell>
          <table:table-cell office:value-type="date" office:date-value="1960-03-02T00:00:00" table:style-name="ce4">
            <text:p>1960-03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4634732</text:p>
          </table:table-cell>
          <table:table-cell office:value-type="string" table:style-name="ce1">
            <text:p>manuela.castano603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3-25T20:16:00" table:style-name="ce5">
            <text:p>2026-03-25 20:16</text:p>
          </table:table-cell>
          <table:table-cell office:value-type="date" office:date-value="2026-05-16T02:22:00" table:style-name="ce6">
            <text:p>2026-05-16 02:22</text:p>
          </table:table-cell>
          <table:table-cell table:number-columns-repeated="16369"/>
        </table:table-row>
        <table:table-row table:style-name="ro1">
          <table:table-cell office:value-type="float" office:value="604" table:style-name="ce3">
            <text:p>60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0330698</text:p>
          </table:table-cell>
          <table:table-cell office:value-type="string" table:style-name="ce1">
            <text:p>Sara Álvarez Vargas</text:p>
          </table:table-cell>
          <table:table-cell office:value-type="date" office:date-value="1981-10-11T00:00:00" table:style-name="ce4">
            <text:p>1981-10-1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3827279</text:p>
          </table:table-cell>
          <table:table-cell office:value-type="string" table:style-name="ce1">
            <text:p>sara.alvarez60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6-12T00:25:00" table:style-name="ce5">
            <text:p>2026-06-12 00:25</text:p>
          </table:table-cell>
          <table:table-cell office:value-type="date" office:date-value="2026-07-07T12:29:00" table:style-name="ce6">
            <text:p>2026-07-07 12:29</text:p>
          </table:table-cell>
          <table:table-cell table:number-columns-repeated="16369"/>
        </table:table-row>
        <table:table-row table:style-name="ro1">
          <table:table-cell office:value-type="float" office:value="605" table:style-name="ce3">
            <text:p>60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84477389</text:p>
          </table:table-cell>
          <table:table-cell office:value-type="string" table:style-name="ce1">
            <text:p>Ricardo Romero Martínez</text:p>
          </table:table-cell>
          <table:table-cell office:value-type="date" office:date-value="1945-10-19T00:00:00" table:style-name="ce4">
            <text:p>1945-10-19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224637467</text:p>
          </table:table-cell>
          <table:table-cell office:value-type="string" table:style-name="ce1">
            <text:p>ricardo.romero605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05T03:21:00" table:style-name="ce5">
            <text:p>2026-06-05 03:21</text:p>
          </table:table-cell>
          <table:table-cell office:value-type="date" office:date-value="2026-06-14T03:34:00" table:style-name="ce6">
            <text:p>2026-06-14 03:34</text:p>
          </table:table-cell>
          <table:table-cell table:number-columns-repeated="16369"/>
        </table:table-row>
        <table:table-row table:style-name="ro1">
          <table:table-cell office:value-type="float" office:value="606" table:style-name="ce3">
            <text:p>60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08334475</text:p>
          </table:table-cell>
          <table:table-cell office:value-type="string" table:style-name="ce1">
            <text:p>Ricardo Moreno Ortiz</text:p>
          </table:table-cell>
          <table:table-cell office:value-type="date" office:date-value="1969-12-19T00:00:00" table:style-name="ce4">
            <text:p>1969-12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2021570</text:p>
          </table:table-cell>
          <table:table-cell office:value-type="string" table:style-name="ce1">
            <text:p>ricardo.moreno606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6-15T22:54:00" table:style-name="ce5">
            <text:p>2026-06-15 22:54</text:p>
          </table:table-cell>
          <table:table-cell office:value-type="date" office:date-value="2026-06-22T16:49:00" table:style-name="ce6">
            <text:p>2026-06-22 16:49</text:p>
          </table:table-cell>
          <table:table-cell table:number-columns-repeated="16369"/>
        </table:table-row>
        <table:table-row table:style-name="ro1">
          <table:table-cell office:value-type="float" office:value="607" table:style-name="ce3">
            <text:p>60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78412907</text:p>
          </table:table-cell>
          <table:table-cell office:value-type="string" table:style-name="ce1">
            <text:p>María Valencia Martínez</text:p>
          </table:table-cell>
          <table:table-cell office:value-type="date" office:date-value="1984-04-07T00:00:00" table:style-name="ce4">
            <text:p>1984-04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8395005</text:p>
          </table:table-cell>
          <table:table-cell office:value-type="string" table:style-name="ce1">
            <text:p>maria.valencia607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19T20:52:00" table:style-name="ce5">
            <text:p>2026-03-19 20:52</text:p>
          </table:table-cell>
          <table:table-cell office:value-type="date" office:date-value="2026-03-29T01:31:00" table:style-name="ce6">
            <text:p>2026-03-29 01:31</text:p>
          </table:table-cell>
          <table:table-cell table:number-columns-repeated="16369"/>
        </table:table-row>
        <table:table-row table:style-name="ro1">
          <table:table-cell office:value-type="float" office:value="608" table:style-name="ce3">
            <text:p>60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66501751</text:p>
          </table:table-cell>
          <table:table-cell office:value-type="string" table:style-name="ce1">
            <text:p>Gabriela Quintero Romero</text:p>
          </table:table-cell>
          <table:table-cell office:value-type="date" office:date-value="1952-07-27T00:00:00" table:style-name="ce4">
            <text:p>1952-07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3762059</text:p>
          </table:table-cell>
          <table:table-cell office:value-type="string" table:style-name="ce1">
            <text:p>gabriela.quintero608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01T07:54:00" table:style-name="ce5">
            <text:p>2026-06-01 07:54</text:p>
          </table:table-cell>
          <table:table-cell office:value-type="date" office:date-value="2026-07-04T01:52:00" table:style-name="ce6">
            <text:p>2026-07-04 01:52</text:p>
          </table:table-cell>
          <table:table-cell table:number-columns-repeated="16369"/>
        </table:table-row>
        <table:table-row table:style-name="ro1">
          <table:table-cell office:value-type="float" office:value="609" table:style-name="ce3">
            <text:p>609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248322459</text:p>
          </table:table-cell>
          <table:table-cell office:value-type="string" table:style-name="ce1">
            <text:p>David Ortiz Silva</text:p>
          </table:table-cell>
          <table:table-cell office:value-type="date" office:date-value="2010-01-26T00:00:00" table:style-name="ce4">
            <text:p>2010-01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7351753</text:p>
          </table:table-cell>
          <table:table-cell office:value-type="string" table:style-name="ce1">
            <text:p>david.ortiz609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13T14:01:00" table:style-name="ce5">
            <text:p>2026-04-13 14:01</text:p>
          </table:table-cell>
          <table:table-cell office:value-type="date" office:date-value="2026-06-13T20:26:00" table:style-name="ce6">
            <text:p>2026-06-13 20:26</text:p>
          </table:table-cell>
          <table:table-cell table:number-columns-repeated="16369"/>
        </table:table-row>
        <table:table-row table:style-name="ro1">
          <table:table-cell office:value-type="float" office:value="610" table:style-name="ce3">
            <text:p>61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65848128</text:p>
          </table:table-cell>
          <table:table-cell office:value-type="string" table:style-name="ce1">
            <text:p>Luisa Ramírez Ospina</text:p>
          </table:table-cell>
          <table:table-cell office:value-type="date" office:date-value="1955-02-11T00:00:00" table:style-name="ce4">
            <text:p>1955-02-1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1275287</text:p>
          </table:table-cell>
          <table:table-cell office:value-type="string" table:style-name="ce1">
            <text:p>luisa.ramirez61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3-21T01:07:00" table:style-name="ce5">
            <text:p>2026-03-21 01:07</text:p>
          </table:table-cell>
          <table:table-cell office:value-type="date" office:date-value="2026-05-31T11:58:00" table:style-name="ce6">
            <text:p>2026-05-31 11:58</text:p>
          </table:table-cell>
          <table:table-cell table:number-columns-repeated="16369"/>
        </table:table-row>
        <table:table-row table:style-name="ro1">
          <table:table-cell office:value-type="float" office:value="611" table:style-name="ce3">
            <text:p>611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86486562</text:p>
          </table:table-cell>
          <table:table-cell office:value-type="string" table:style-name="ce1">
            <text:p>Camila Sofía Giraldo Hernández</text:p>
          </table:table-cell>
          <table:table-cell office:value-type="date" office:date-value="2020-01-07T00:00:00" table:style-name="ce4">
            <text:p>2020-01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2977395</text:p>
          </table:table-cell>
          <table:table-cell office:value-type="string" table:style-name="ce1">
            <text:p>camila.giraldo611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4-27T12:14:00" table:style-name="ce5">
            <text:p>2026-04-27 12:14</text:p>
          </table:table-cell>
          <table:table-cell office:value-type="date" office:date-value="2026-07-09T17:40:00" table:style-name="ce6">
            <text:p>2026-07-09 17:40</text:p>
          </table:table-cell>
          <table:table-cell table:number-columns-repeated="16369"/>
        </table:table-row>
        <table:table-row table:style-name="ro1">
          <table:table-cell office:value-type="float" office:value="612" table:style-name="ce3">
            <text:p>61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49263566</text:p>
          </table:table-cell>
          <table:table-cell office:value-type="string" table:style-name="ce1">
            <text:p>Sebastián Cristian Ruiz Romero</text:p>
          </table:table-cell>
          <table:table-cell office:value-type="date" office:date-value="1971-05-27T00:00:00" table:style-name="ce4">
            <text:p>1971-05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3362285</text:p>
          </table:table-cell>
          <table:table-cell office:value-type="string" table:style-name="ce1">
            <text:p>sebastian.ruiz61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5-19T08:44:00" table:style-name="ce5">
            <text:p>2026-05-19 08:44</text:p>
          </table:table-cell>
          <table:table-cell office:value-type="date" office:date-value="2026-06-11T23:40:00" table:style-name="ce6">
            <text:p>2026-06-11 23:40</text:p>
          </table:table-cell>
          <table:table-cell table:number-columns-repeated="16369"/>
        </table:table-row>
        <table:table-row table:style-name="ro1">
          <table:table-cell office:value-type="float" office:value="613" table:style-name="ce3">
            <text:p>61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44203427</text:p>
          </table:table-cell>
          <table:table-cell office:value-type="string" table:style-name="ce1">
            <text:p>Camila Silva Álvarez</text:p>
          </table:table-cell>
          <table:table-cell office:value-type="date" office:date-value="1951-05-12T00:00:00" table:style-name="ce4">
            <text:p>1951-05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3426443</text:p>
          </table:table-cell>
          <table:table-cell office:value-type="string" table:style-name="ce1">
            <text:p>camila.silva61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05T18:37:00" table:style-name="ce5">
            <text:p>2026-06-05 18:37</text:p>
          </table:table-cell>
          <table:table-cell office:value-type="date" office:date-value="2026-06-26T07:00:00" table:style-name="ce6">
            <text:p>2026-06-26 07:00</text:p>
          </table:table-cell>
          <table:table-cell table:number-columns-repeated="16369"/>
        </table:table-row>
        <table:table-row table:style-name="ro1">
          <table:table-cell office:value-type="float" office:value="614" table:style-name="ce3">
            <text:p>61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02863099</text:p>
          </table:table-cell>
          <table:table-cell office:value-type="string" table:style-name="ce1">
            <text:p>Carlos Jorge Romero Quintero</text:p>
          </table:table-cell>
          <table:table-cell office:value-type="date" office:date-value="1983-04-22T00:00:00" table:style-name="ce4">
            <text:p>1983-04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6654962</text:p>
          </table:table-cell>
          <table:table-cell office:value-type="string" table:style-name="ce1">
            <text:p>carlos.romero614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03T18:08:00" table:style-name="ce5">
            <text:p>2026-04-03 18:08</text:p>
          </table:table-cell>
          <table:table-cell office:value-type="date" office:date-value="2026-04-11T21:39:00" table:style-name="ce6">
            <text:p>2026-04-11 21:39</text:p>
          </table:table-cell>
          <table:table-cell table:number-columns-repeated="16369"/>
        </table:table-row>
        <table:table-row table:style-name="ro1">
          <table:table-cell office:value-type="float" office:value="615" table:style-name="ce3">
            <text:p>61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75808120</text:p>
          </table:table-cell>
          <table:table-cell office:value-type="string" table:style-name="ce1">
            <text:p>Julián Cárdenas García</text:p>
          </table:table-cell>
          <table:table-cell office:value-type="date" office:date-value="1970-12-19T00:00:00" table:style-name="ce4">
            <text:p>1970-12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2198393</text:p>
          </table:table-cell>
          <table:table-cell office:value-type="string" table:style-name="ce1">
            <text:p>julian.cardenas615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7-06T09:25:00" table:style-name="ce5">
            <text:p>2026-07-06 09:25</text:p>
          </table:table-cell>
          <table:table-cell office:value-type="date" office:date-value="2026-07-10T07:44:00" table:style-name="ce6">
            <text:p>2026-07-10 07:44</text:p>
          </table:table-cell>
          <table:table-cell table:number-columns-repeated="16369"/>
        </table:table-row>
        <table:table-row table:style-name="ro1">
          <table:table-cell office:value-type="float" office:value="616" table:style-name="ce3">
            <text:p>616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062510044</text:p>
          </table:table-cell>
          <table:table-cell office:value-type="string" table:style-name="ce1">
            <text:p>Isabella Díaz Vargas</text:p>
          </table:table-cell>
          <table:table-cell office:value-type="date" office:date-value="2011-04-02T00:00:00" table:style-name="ce4">
            <text:p>2011-04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1413259</text:p>
          </table:table-cell>
          <table:table-cell office:value-type="string" table:style-name="ce1">
            <text:p>isabella.diaz616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7-10T06:08:00" table:style-name="ce5">
            <text:p>2026-07-10 06:08</text:p>
          </table:table-cell>
          <table:table-cell office:value-type="date" office:date-value="2026-07-10T08:07:00" table:style-name="ce6">
            <text:p>2026-07-10 08:07</text:p>
          </table:table-cell>
          <table:table-cell table:number-columns-repeated="16369"/>
        </table:table-row>
        <table:table-row table:style-name="ro1">
          <table:table-cell office:value-type="float" office:value="617" table:style-name="ce3">
            <text:p>617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462280508</text:p>
          </table:table-cell>
          <table:table-cell office:value-type="string" table:style-name="ce1">
            <text:p>Nicolás Carlos Moreno Hernández</text:p>
          </table:table-cell>
          <table:table-cell office:value-type="date" office:date-value="2019-04-06T00:00:00" table:style-name="ce4">
            <text:p>2019-04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8924952</text:p>
          </table:table-cell>
          <table:table-cell office:value-type="string" table:style-name="ce1">
            <text:p>nicolas.moreno617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4-19T21:11:00" table:style-name="ce5">
            <text:p>2026-04-19 21:11</text:p>
          </table:table-cell>
          <table:table-cell office:value-type="date" office:date-value="2026-05-12T21:13:00" table:style-name="ce6">
            <text:p>2026-05-12 21:13</text:p>
          </table:table-cell>
          <table:table-cell table:number-columns-repeated="16369"/>
        </table:table-row>
        <table:table-row table:style-name="ro1">
          <table:table-cell office:value-type="float" office:value="618" table:style-name="ce3">
            <text:p>61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64562641</text:p>
          </table:table-cell>
          <table:table-cell office:value-type="string" table:style-name="ce1">
            <text:p>Isabella Muñoz Jiménez</text:p>
          </table:table-cell>
          <table:table-cell office:value-type="date" office:date-value="2006-12-14T00:00:00" table:style-name="ce4">
            <text:p>2006-12-1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3355482</text:p>
          </table:table-cell>
          <table:table-cell office:value-type="string" table:style-name="ce1">
            <text:p>isabella.munoz618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14T12:12:00" table:style-name="ce5">
            <text:p>2026-04-14 12:12</text:p>
          </table:table-cell>
          <table:table-cell office:value-type="date" office:date-value="2026-04-18T15:52:00" table:style-name="ce6">
            <text:p>2026-04-18 15:52</text:p>
          </table:table-cell>
          <table:table-cell table:number-columns-repeated="16369"/>
        </table:table-row>
        <table:table-row table:style-name="ro1">
          <table:table-cell office:value-type="float" office:value="619" table:style-name="ce3">
            <text:p>61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90485921</text:p>
          </table:table-cell>
          <table:table-cell office:value-type="string" table:style-name="ce1">
            <text:p>Daniel Muñoz Martínez</text:p>
          </table:table-cell>
          <table:table-cell office:value-type="date" office:date-value="1975-02-12T00:00:00" table:style-name="ce4">
            <text:p>1975-02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9018465</text:p>
          </table:table-cell>
          <table:table-cell office:value-type="string" table:style-name="ce1">
            <text:p>daniel.munoz619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09T04:57:00" table:style-name="ce5">
            <text:p>2026-06-09 04:57</text:p>
          </table:table-cell>
          <table:table-cell office:value-type="date" office:date-value="2026-07-05T03:08:00" table:style-name="ce6">
            <text:p>2026-07-05 03:08</text:p>
          </table:table-cell>
          <table:table-cell table:number-columns-repeated="16369"/>
        </table:table-row>
        <table:table-row table:style-name="ro1">
          <table:table-cell office:value-type="float" office:value="620" table:style-name="ce3">
            <text:p>62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07999338</text:p>
          </table:table-cell>
          <table:table-cell office:value-type="string" table:style-name="ce1">
            <text:p>Valentina Álvarez Jiménez</text:p>
          </table:table-cell>
          <table:table-cell office:value-type="date" office:date-value="2003-03-28T00:00:00" table:style-name="ce4">
            <text:p>2003-03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7737204</text:p>
          </table:table-cell>
          <table:table-cell office:value-type="string" table:style-name="ce1">
            <text:p>valentina.alvarez620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3-27T11:12:00" table:style-name="ce5">
            <text:p>2026-03-27 11:12</text:p>
          </table:table-cell>
          <table:table-cell office:value-type="date" office:date-value="2026-07-04T23:01:00" table:style-name="ce6">
            <text:p>2026-07-04 23:01</text:p>
          </table:table-cell>
          <table:table-cell table:number-columns-repeated="16369"/>
        </table:table-row>
        <table:table-row table:style-name="ro1">
          <table:table-cell office:value-type="float" office:value="621" table:style-name="ce3">
            <text:p>62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01691576</text:p>
          </table:table-cell>
          <table:table-cell office:value-type="string" table:style-name="ce1">
            <text:p>Sofía Alejandra Muñoz Díaz</text:p>
          </table:table-cell>
          <table:table-cell office:value-type="date" office:date-value="1985-09-02T00:00:00" table:style-name="ce4">
            <text:p>1985-09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2473825</text:p>
          </table:table-cell>
          <table:table-cell office:value-type="string" table:style-name="ce1">
            <text:p>sofia.munoz621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11T20:21:00" table:style-name="ce5">
            <text:p>2026-05-11 20:21</text:p>
          </table:table-cell>
          <table:table-cell office:value-type="date" office:date-value="2026-05-15T05:08:00" table:style-name="ce6">
            <text:p>2026-05-15 05:08</text:p>
          </table:table-cell>
          <table:table-cell table:number-columns-repeated="16369"/>
        </table:table-row>
        <table:table-row table:style-name="ro1">
          <table:table-cell office:value-type="float" office:value="622" table:style-name="ce3">
            <text:p>62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88957974</text:p>
          </table:table-cell>
          <table:table-cell office:value-type="string" table:style-name="ce1">
            <text:p>Carolina Moreno Martínez</text:p>
          </table:table-cell>
          <table:table-cell office:value-type="date" office:date-value="1967-03-30T00:00:00" table:style-name="ce4">
            <text:p>1967-03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2400653</text:p>
          </table:table-cell>
          <table:table-cell office:value-type="string" table:style-name="ce1">
            <text:p>carolina.moreno62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7-01T04:45:00" table:style-name="ce5">
            <text:p>2026-07-01 04:45</text:p>
          </table:table-cell>
          <table:table-cell office:value-type="date" office:date-value="2026-07-03T06:08:00" table:style-name="ce6">
            <text:p>2026-07-03 06:08</text:p>
          </table:table-cell>
          <table:table-cell table:number-columns-repeated="16369"/>
        </table:table-row>
        <table:table-row table:style-name="ro1">
          <table:table-cell office:value-type="float" office:value="623" table:style-name="ce3">
            <text:p>62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9909476</text:p>
          </table:table-cell>
          <table:table-cell office:value-type="string" table:style-name="ce1">
            <text:p>Carlos Sánchez Jiménez</text:p>
          </table:table-cell>
          <table:table-cell office:value-type="date" office:date-value="1991-05-11T00:00:00" table:style-name="ce4">
            <text:p>1991-05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6436804</text:p>
          </table:table-cell>
          <table:table-cell office:value-type="string" table:style-name="ce1">
            <text:p>carlos.sanchez62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25T21:55:00" table:style-name="ce5">
            <text:p>2026-05-25 21:55</text:p>
          </table:table-cell>
          <table:table-cell office:value-type="date" office:date-value="2026-05-31T07:11:00" table:style-name="ce6">
            <text:p>2026-05-31 07:11</text:p>
          </table:table-cell>
          <table:table-cell table:number-columns-repeated="16369"/>
        </table:table-row>
        <table:table-row table:style-name="ro1">
          <table:table-cell office:value-type="float" office:value="624" table:style-name="ce3">
            <text:p>62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52778687</text:p>
          </table:table-cell>
          <table:table-cell office:value-type="string" table:style-name="ce1">
            <text:p>Andrea Castaño Hernández</text:p>
          </table:table-cell>
          <table:table-cell office:value-type="date" office:date-value="1985-08-15T00:00:00" table:style-name="ce4">
            <text:p>1985-08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4091337</text:p>
          </table:table-cell>
          <table:table-cell office:value-type="string" table:style-name="ce1">
            <text:p>andrea.castano624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02T13:51:00" table:style-name="ce5">
            <text:p>2026-06-02 13:51</text:p>
          </table:table-cell>
          <table:table-cell office:value-type="date" office:date-value="2026-07-01T10:04:00" table:style-name="ce6">
            <text:p>2026-07-01 10:04</text:p>
          </table:table-cell>
          <table:table-cell table:number-columns-repeated="16369"/>
        </table:table-row>
        <table:table-row table:style-name="ro1">
          <table:table-cell office:value-type="float" office:value="625" table:style-name="ce3">
            <text:p>62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32650811</text:p>
          </table:table-cell>
          <table:table-cell office:value-type="string" table:style-name="ce1">
            <text:p>Sofía Sara Hernández Martínez</text:p>
          </table:table-cell>
          <table:table-cell office:value-type="date" office:date-value="1981-09-09T00:00:00" table:style-name="ce4">
            <text:p>1981-09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9145728</text:p>
          </table:table-cell>
          <table:table-cell office:value-type="string" table:style-name="ce1">
            <text:p>sofia.hernandez625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20T00:19:00" table:style-name="ce5">
            <text:p>2026-05-20 00:19</text:p>
          </table:table-cell>
          <table:table-cell office:value-type="date" office:date-value="2026-07-03T20:51:00" table:style-name="ce6">
            <text:p>2026-07-03 20:51</text:p>
          </table:table-cell>
          <table:table-cell table:number-columns-repeated="16369"/>
        </table:table-row>
        <table:table-row table:style-name="ro1">
          <table:table-cell office:value-type="float" office:value="626" table:style-name="ce3">
            <text:p>62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5212880</text:p>
          </table:table-cell>
          <table:table-cell office:value-type="string" table:style-name="ce1">
            <text:p>Felipe Castro Muñoz</text:p>
          </table:table-cell>
          <table:table-cell office:value-type="date" office:date-value="1957-07-24T00:00:00" table:style-name="ce4">
            <text:p>1957-07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3783383</text:p>
          </table:table-cell>
          <table:table-cell office:value-type="string" table:style-name="ce1">
            <text:p>felipe.castro626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5-31T18:29:00" table:style-name="ce5">
            <text:p>2026-05-31 18:29</text:p>
          </table:table-cell>
          <table:table-cell office:value-type="date" office:date-value="2026-06-24T12:08:00" table:style-name="ce6">
            <text:p>2026-06-24 12:08</text:p>
          </table:table-cell>
          <table:table-cell table:number-columns-repeated="16369"/>
        </table:table-row>
        <table:table-row table:style-name="ro1">
          <table:table-cell office:value-type="float" office:value="627" table:style-name="ce3">
            <text:p>62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79488966</text:p>
          </table:table-cell>
          <table:table-cell office:value-type="string" table:style-name="ce1">
            <text:p>Santiago Muñoz López</text:p>
          </table:table-cell>
          <table:table-cell office:value-type="date" office:date-value="1998-05-01T00:00:00" table:style-name="ce4">
            <text:p>1998-05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4084741</text:p>
          </table:table-cell>
          <table:table-cell office:value-type="string" table:style-name="ce1">
            <text:p>santiago.munoz627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7-10T07:41:00" table:style-name="ce5">
            <text:p>2026-07-10 07:41</text:p>
          </table:table-cell>
          <table:table-cell office:value-type="date" office:date-value="2026-07-10T09:45:00" table:style-name="ce6">
            <text:p>2026-07-10 09:45</text:p>
          </table:table-cell>
          <table:table-cell table:number-columns-repeated="16369"/>
        </table:table-row>
        <table:table-row table:style-name="ro1">
          <table:table-cell office:value-type="float" office:value="628" table:style-name="ce3">
            <text:p>62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02310931</text:p>
          </table:table-cell>
          <table:table-cell office:value-type="string" table:style-name="ce1">
            <text:p>Santiago Romero Rodríguez</text:p>
          </table:table-cell>
          <table:table-cell office:value-type="date" office:date-value="1999-05-13T00:00:00" table:style-name="ce4">
            <text:p>1999-05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6094730</text:p>
          </table:table-cell>
          <table:table-cell office:value-type="string" table:style-name="ce1">
            <text:p>santiago.romero62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7-01T02:44:00" table:style-name="ce5">
            <text:p>2026-07-01 02:44</text:p>
          </table:table-cell>
          <table:table-cell office:value-type="date" office:date-value="2026-07-05T10:39:00" table:style-name="ce6">
            <text:p>2026-07-05 10:39</text:p>
          </table:table-cell>
          <table:table-cell table:number-columns-repeated="16369"/>
        </table:table-row>
        <table:table-row table:style-name="ro1">
          <table:table-cell office:value-type="float" office:value="629" table:style-name="ce3">
            <text:p>62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55288749</text:p>
          </table:table-cell>
          <table:table-cell office:value-type="string" table:style-name="ce1">
            <text:p>Tomás Torres Ruiz</text:p>
          </table:table-cell>
          <table:table-cell office:value-type="date" office:date-value="1956-02-04T00:00:00" table:style-name="ce4">
            <text:p>1956-02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5796883</text:p>
          </table:table-cell>
          <table:table-cell office:value-type="string" table:style-name="ce1">
            <text:p>tomas.torres62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06T01:00:00" table:style-name="ce5">
            <text:p>2026-04-06 01:00</text:p>
          </table:table-cell>
          <table:table-cell office:value-type="date" office:date-value="2026-07-04T02:57:00" table:style-name="ce6">
            <text:p>2026-07-04 02:57</text:p>
          </table:table-cell>
          <table:table-cell table:number-columns-repeated="16369"/>
        </table:table-row>
        <table:table-row table:style-name="ro1">
          <table:table-cell office:value-type="float" office:value="630" table:style-name="ce3">
            <text:p>63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6433186</text:p>
          </table:table-cell>
          <table:table-cell office:value-type="string" table:style-name="ce1">
            <text:p>Isabella Sánchez Giraldo</text:p>
          </table:table-cell>
          <table:table-cell office:value-type="date" office:date-value="2004-08-03T00:00:00" table:style-name="ce4">
            <text:p>2004-08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8342929</text:p>
          </table:table-cell>
          <table:table-cell office:value-type="string" table:style-name="ce1">
            <text:p>isabella.sanchez630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07T04:24:00" table:style-name="ce5">
            <text:p>2026-06-07 04:24</text:p>
          </table:table-cell>
          <table:table-cell office:value-type="date" office:date-value="2026-07-04T05:56:00" table:style-name="ce6">
            <text:p>2026-07-04 05:56</text:p>
          </table:table-cell>
          <table:table-cell table:number-columns-repeated="16369"/>
        </table:table-row>
        <table:table-row table:style-name="ro1">
          <table:table-cell office:value-type="float" office:value="631" table:style-name="ce3">
            <text:p>631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376202437</text:p>
          </table:table-cell>
          <table:table-cell office:value-type="string" table:style-name="ce1">
            <text:p>Ricardo Julián Díaz Sánchez</text:p>
          </table:table-cell>
          <table:table-cell office:value-type="date" office:date-value="1984-05-01T00:00:00" table:style-name="ce4">
            <text:p>1984-05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2460963</text:p>
          </table:table-cell>
          <table:table-cell office:value-type="string" table:style-name="ce1">
            <text:p>ricardo.diaz631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07T16:34:00" table:style-name="ce5">
            <text:p>2026-06-07 16:34</text:p>
          </table:table-cell>
          <table:table-cell office:value-type="date" office:date-value="2026-06-12T22:35:00" table:style-name="ce6">
            <text:p>2026-06-12 22:35</text:p>
          </table:table-cell>
          <table:table-cell table:number-columns-repeated="16369"/>
        </table:table-row>
        <table:table-row table:style-name="ro1">
          <table:table-cell office:value-type="float" office:value="632" table:style-name="ce3">
            <text:p>63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59215825</text:p>
          </table:table-cell>
          <table:table-cell office:value-type="string" table:style-name="ce1">
            <text:p>Sofía Romero García</text:p>
          </table:table-cell>
          <table:table-cell office:value-type="date" office:date-value="2016-10-12T00:00:00" table:style-name="ce4">
            <text:p>2016-10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7518619</text:p>
          </table:table-cell>
          <table:table-cell office:value-type="string" table:style-name="ce1">
            <text:p>sofia.romero63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28T06:42:00" table:style-name="ce5">
            <text:p>2026-04-28 06:42</text:p>
          </table:table-cell>
          <table:table-cell office:value-type="date" office:date-value="2026-06-04T08:14:00" table:style-name="ce6">
            <text:p>2026-06-04 08:14</text:p>
          </table:table-cell>
          <table:table-cell table:number-columns-repeated="16369"/>
        </table:table-row>
        <table:table-row table:style-name="ro1">
          <table:table-cell office:value-type="float" office:value="633" table:style-name="ce3">
            <text:p>633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619565257</text:p>
          </table:table-cell>
          <table:table-cell office:value-type="string" table:style-name="ce1">
            <text:p>Samuel Silva Vargas</text:p>
          </table:table-cell>
          <table:table-cell office:value-type="date" office:date-value="1983-06-09T00:00:00" table:style-name="ce4">
            <text:p>1983-06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1429639</text:p>
          </table:table-cell>
          <table:table-cell office:value-type="string" table:style-name="ce1">
            <text:p>samuel.silva633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4-17T05:58:00" table:style-name="ce5">
            <text:p>2026-04-17 05:58</text:p>
          </table:table-cell>
          <table:table-cell office:value-type="date" office:date-value="2026-07-08T13:09:00" table:style-name="ce6">
            <text:p>2026-07-08 13:09</text:p>
          </table:table-cell>
          <table:table-cell table:number-columns-repeated="16369"/>
        </table:table-row>
        <table:table-row table:style-name="ro1">
          <table:table-cell office:value-type="float" office:value="634" table:style-name="ce3">
            <text:p>63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02535990</text:p>
          </table:table-cell>
          <table:table-cell office:value-type="string" table:style-name="ce1">
            <text:p>Andrés Moreno Sánchez</text:p>
          </table:table-cell>
          <table:table-cell office:value-type="date" office:date-value="1995-01-15T00:00:00" table:style-name="ce4">
            <text:p>1995-01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5114326</text:p>
          </table:table-cell>
          <table:table-cell office:value-type="string" table:style-name="ce1">
            <text:p>andres.moreno634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4-04T02:43:00" table:style-name="ce5">
            <text:p>2026-04-04 02:43</text:p>
          </table:table-cell>
          <table:table-cell office:value-type="date" office:date-value="2026-06-14T17:21:00" table:style-name="ce6">
            <text:p>2026-06-14 17:21</text:p>
          </table:table-cell>
          <table:table-cell table:number-columns-repeated="16369"/>
        </table:table-row>
        <table:table-row table:style-name="ro1">
          <table:table-cell office:value-type="float" office:value="635" table:style-name="ce3">
            <text:p>635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422380288</text:p>
          </table:table-cell>
          <table:table-cell office:value-type="string" table:style-name="ce1">
            <text:p>Gabriela Isabella Torres Pérez</text:p>
          </table:table-cell>
          <table:table-cell office:value-type="date" office:date-value="2005-01-02T00:00:00" table:style-name="ce4">
            <text:p>2005-01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3894976</text:p>
          </table:table-cell>
          <table:table-cell office:value-type="string" table:style-name="ce1">
            <text:p>gabriela.torres63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30T09:03:00" table:style-name="ce5">
            <text:p>2026-03-30 09:03</text:p>
          </table:table-cell>
          <table:table-cell office:value-type="date" office:date-value="2026-04-30T06:12:00" table:style-name="ce6">
            <text:p>2026-04-30 06:12</text:p>
          </table:table-cell>
          <table:table-cell table:number-columns-repeated="16369"/>
        </table:table-row>
        <table:table-row table:style-name="ro1">
          <table:table-cell office:value-type="float" office:value="636" table:style-name="ce3">
            <text:p>63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79377688</text:p>
          </table:table-cell>
          <table:table-cell office:value-type="string" table:style-name="ce1">
            <text:p>Cristian Pérez Rojas</text:p>
          </table:table-cell>
          <table:table-cell office:value-type="date" office:date-value="1982-07-15T00:00:00" table:style-name="ce4">
            <text:p>1982-07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7571361</text:p>
          </table:table-cell>
          <table:table-cell office:value-type="string" table:style-name="ce1">
            <text:p>cristian.perez63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05T13:33:00" table:style-name="ce5">
            <text:p>2026-04-05 13:33</text:p>
          </table:table-cell>
          <table:table-cell office:value-type="date" office:date-value="2026-04-16T19:25:00" table:style-name="ce6">
            <text:p>2026-04-16 19:25</text:p>
          </table:table-cell>
          <table:table-cell table:number-columns-repeated="16369"/>
        </table:table-row>
        <table:table-row table:style-name="ro1">
          <table:table-cell office:value-type="float" office:value="637" table:style-name="ce3">
            <text:p>63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74719157</text:p>
          </table:table-cell>
          <table:table-cell office:value-type="string" table:style-name="ce1">
            <text:p>Diana Valentina Ortiz Giraldo</text:p>
          </table:table-cell>
          <table:table-cell office:value-type="date" office:date-value="2001-05-03T00:00:00" table:style-name="ce4">
            <text:p>2001-05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1869789</text:p>
          </table:table-cell>
          <table:table-cell office:value-type="string" table:style-name="ce1">
            <text:p>diana.ortiz63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5-26T07:24:00" table:style-name="ce5">
            <text:p>2026-05-26 07:24</text:p>
          </table:table-cell>
          <table:table-cell office:value-type="date" office:date-value="2026-06-11T07:04:00" table:style-name="ce6">
            <text:p>2026-06-11 07:04</text:p>
          </table:table-cell>
          <table:table-cell table:number-columns-repeated="16369"/>
        </table:table-row>
        <table:table-row table:style-name="ro1">
          <table:table-cell office:value-type="float" office:value="638" table:style-name="ce3">
            <text:p>63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1681145</text:p>
          </table:table-cell>
          <table:table-cell office:value-type="string" table:style-name="ce1">
            <text:p>Samuel Rodríguez Castaño</text:p>
          </table:table-cell>
          <table:table-cell office:value-type="date" office:date-value="1981-05-10T00:00:00" table:style-name="ce4">
            <text:p>1981-05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6275173</text:p>
          </table:table-cell>
          <table:table-cell office:value-type="string" table:style-name="ce1">
            <text:p>samuel.rodriguez638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19T19:56:00" table:style-name="ce5">
            <text:p>2026-04-19 19:56</text:p>
          </table:table-cell>
          <table:table-cell office:value-type="date" office:date-value="2026-07-08T11:00:00" table:style-name="ce6">
            <text:p>2026-07-08 11:00</text:p>
          </table:table-cell>
          <table:table-cell table:number-columns-repeated="16369"/>
        </table:table-row>
        <table:table-row table:style-name="ro1">
          <table:table-cell office:value-type="float" office:value="639" table:style-name="ce3">
            <text:p>63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39428794</text:p>
          </table:table-cell>
          <table:table-cell office:value-type="string" table:style-name="ce1">
            <text:p>David Rojas Quintero</text:p>
          </table:table-cell>
          <table:table-cell office:value-type="date" office:date-value="1971-07-15T00:00:00" table:style-name="ce4">
            <text:p>1971-07-15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3134796130</text:p>
          </table:table-cell>
          <table:table-cell office:value-type="string" table:style-name="ce1">
            <text:p>david.rojas639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29T09:05:00" table:style-name="ce5">
            <text:p>2026-05-29 09:05</text:p>
          </table:table-cell>
          <table:table-cell office:value-type="date" office:date-value="2026-07-05T13:42:00" table:style-name="ce6">
            <text:p>2026-07-05 13:42</text:p>
          </table:table-cell>
          <table:table-cell table:number-columns-repeated="16369"/>
        </table:table-row>
        <table:table-row table:style-name="ro1">
          <table:table-cell office:value-type="float" office:value="640" table:style-name="ce3">
            <text:p>64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3508895</text:p>
          </table:table-cell>
          <table:table-cell office:value-type="string" table:style-name="ce1">
            <text:p>María Sánchez Ramírez</text:p>
          </table:table-cell>
          <table:table-cell office:value-type="date" office:date-value="1965-09-07T00:00:00" table:style-name="ce4">
            <text:p>1965-09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5780543</text:p>
          </table:table-cell>
          <table:table-cell office:value-type="string" table:style-name="ce1">
            <text:p>maria.sanchez640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5-02T11:31:00" table:style-name="ce5">
            <text:p>2026-05-02 11:31</text:p>
          </table:table-cell>
          <table:table-cell office:value-type="date" office:date-value="2026-05-13T08:09:00" table:style-name="ce6">
            <text:p>2026-05-13 08:09</text:p>
          </table:table-cell>
          <table:table-cell table:number-columns-repeated="16369"/>
        </table:table-row>
        <table:table-row table:style-name="ro1">
          <table:table-cell office:value-type="float" office:value="641" table:style-name="ce3">
            <text:p>64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4143568</text:p>
          </table:table-cell>
          <table:table-cell office:value-type="string" table:style-name="ce1">
            <text:p>Carlos Muñoz Jiménez</text:p>
          </table:table-cell>
          <table:table-cell office:value-type="date" office:date-value="1949-07-20T00:00:00" table:style-name="ce4">
            <text:p>1949-07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2185869</text:p>
          </table:table-cell>
          <table:table-cell office:value-type="string" table:style-name="ce1">
            <text:p>carlos.munoz641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26T00:36:00" table:style-name="ce5">
            <text:p>2026-06-26 00:36</text:p>
          </table:table-cell>
          <table:table-cell office:value-type="date" office:date-value="2026-07-09T10:44:00" table:style-name="ce6">
            <text:p>2026-07-09 10:44</text:p>
          </table:table-cell>
          <table:table-cell table:number-columns-repeated="16369"/>
        </table:table-row>
        <table:table-row table:style-name="ro1">
          <table:table-cell office:value-type="float" office:value="642" table:style-name="ce3">
            <text:p>64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85318523</text:p>
          </table:table-cell>
          <table:table-cell office:value-type="string" table:style-name="ce1">
            <text:p>Natalia Pérez Castro</text:p>
          </table:table-cell>
          <table:table-cell office:value-type="date" office:date-value="1992-02-08T00:00:00" table:style-name="ce4">
            <text:p>1992-02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1232871</text:p>
          </table:table-cell>
          <table:table-cell office:value-type="string" table:style-name="ce1">
            <text:p>natalia.perez64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5-22T23:47:00" table:style-name="ce5">
            <text:p>2026-05-22 23:47</text:p>
          </table:table-cell>
          <table:table-cell office:value-type="date" office:date-value="2026-06-01T14:38:00" table:style-name="ce6">
            <text:p>2026-06-01 14:38</text:p>
          </table:table-cell>
          <table:table-cell table:number-columns-repeated="16369"/>
        </table:table-row>
        <table:table-row table:style-name="ro1">
          <table:table-cell office:value-type="float" office:value="643" table:style-name="ce3">
            <text:p>64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78941605</text:p>
          </table:table-cell>
          <table:table-cell office:value-type="string" table:style-name="ce1">
            <text:p>David Martínez Moreno</text:p>
          </table:table-cell>
          <table:table-cell office:value-type="date" office:date-value="2007-01-23T00:00:00" table:style-name="ce4">
            <text:p>2007-01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3482969</text:p>
          </table:table-cell>
          <table:table-cell office:value-type="string" table:style-name="ce1">
            <text:p>david.martinez64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5-04T14:46:00" table:style-name="ce5">
            <text:p>2026-05-04 14:46</text:p>
          </table:table-cell>
          <table:table-cell office:value-type="date" office:date-value="2026-05-08T12:56:00" table:style-name="ce6">
            <text:p>2026-05-08 12:56</text:p>
          </table:table-cell>
          <table:table-cell table:number-columns-repeated="16369"/>
        </table:table-row>
        <table:table-row table:style-name="ro1">
          <table:table-cell office:value-type="float" office:value="644" table:style-name="ce3">
            <text:p>644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83655387</text:p>
          </table:table-cell>
          <table:table-cell office:value-type="string" table:style-name="ce1">
            <text:p>Felipe Nicolás Ramírez Muñoz</text:p>
          </table:table-cell>
          <table:table-cell office:value-type="date" office:date-value="1996-09-11T00:00:00" table:style-name="ce4">
            <text:p>1996-09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4436234</text:p>
          </table:table-cell>
          <table:table-cell office:value-type="string" table:style-name="ce1">
            <text:p>felipe.ramirez644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23T08:14:00" table:style-name="ce5">
            <text:p>2026-03-23 08:14</text:p>
          </table:table-cell>
          <table:table-cell office:value-type="date" office:date-value="2026-03-24T22:19:00" table:style-name="ce6">
            <text:p>2026-03-24 22:19</text:p>
          </table:table-cell>
          <table:table-cell table:number-columns-repeated="16369"/>
        </table:table-row>
        <table:table-row table:style-name="ro1">
          <table:table-cell office:value-type="float" office:value="645" table:style-name="ce3">
            <text:p>645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436558859</text:p>
          </table:table-cell>
          <table:table-cell office:value-type="string" table:style-name="ce1">
            <text:p>Camila Ortiz Sánchez</text:p>
          </table:table-cell>
          <table:table-cell office:value-type="date" office:date-value="2012-10-17T00:00:00" table:style-name="ce4">
            <text:p>2012-10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4230768</text:p>
          </table:table-cell>
          <table:table-cell office:value-type="string" table:style-name="ce1">
            <text:p>camila.ortiz64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21T18:47:00" table:style-name="ce5">
            <text:p>2026-04-21 18:47</text:p>
          </table:table-cell>
          <table:table-cell office:value-type="date" office:date-value="2026-05-12T07:00:00" table:style-name="ce6">
            <text:p>2026-05-12 07:00</text:p>
          </table:table-cell>
          <table:table-cell table:number-columns-repeated="16369"/>
        </table:table-row>
        <table:table-row table:style-name="ro1">
          <table:table-cell office:value-type="float" office:value="646" table:style-name="ce3">
            <text:p>64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01616004</text:p>
          </table:table-cell>
          <table:table-cell office:value-type="string" table:style-name="ce1">
            <text:p>Carlos Hernández Rojas</text:p>
          </table:table-cell>
          <table:table-cell office:value-type="date" office:date-value="1970-01-07T00:00:00" table:style-name="ce4">
            <text:p>1970-01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6483453</text:p>
          </table:table-cell>
          <table:table-cell office:value-type="string" table:style-name="ce1">
            <text:p>carlos.hernandez646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26T22:09:00" table:style-name="ce5">
            <text:p>2026-04-26 22:09</text:p>
          </table:table-cell>
          <table:table-cell office:value-type="date" office:date-value="2026-05-02T02:20:00" table:style-name="ce6">
            <text:p>2026-05-02 02:20</text:p>
          </table:table-cell>
          <table:table-cell table:number-columns-repeated="16369"/>
        </table:table-row>
        <table:table-row table:style-name="ro1">
          <table:table-cell office:value-type="float" office:value="647" table:style-name="ce3">
            <text:p>64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55115169</text:p>
          </table:table-cell>
          <table:table-cell office:value-type="string" table:style-name="ce1">
            <text:p>Sofía Laura Castaño Cárdenas</text:p>
          </table:table-cell>
          <table:table-cell office:value-type="date" office:date-value="1996-05-16T00:00:00" table:style-name="ce4">
            <text:p>1996-05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1688275</text:p>
          </table:table-cell>
          <table:table-cell office:value-type="string" table:style-name="ce1">
            <text:p>sofia.castano647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3-30T21:28:00" table:style-name="ce5">
            <text:p>2026-03-30 21:28</text:p>
          </table:table-cell>
          <table:table-cell office:value-type="date" office:date-value="2026-06-28T20:01:00" table:style-name="ce6">
            <text:p>2026-06-28 20:01</text:p>
          </table:table-cell>
          <table:table-cell table:number-columns-repeated="16369"/>
        </table:table-row>
        <table:table-row table:style-name="ro1">
          <table:table-cell office:value-type="float" office:value="648" table:style-name="ce3">
            <text:p>64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7513056</text:p>
          </table:table-cell>
          <table:table-cell office:value-type="string" table:style-name="ce1">
            <text:p>Carolina Romero Martínez</text:p>
          </table:table-cell>
          <table:table-cell office:value-type="date" office:date-value="1992-05-09T00:00:00" table:style-name="ce4">
            <text:p>1992-05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7666977</text:p>
          </table:table-cell>
          <table:table-cell office:value-type="string" table:style-name="ce1">
            <text:p>carolina.romero64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4-23T05:20:00" table:style-name="ce5">
            <text:p>2026-04-23 05:20</text:p>
          </table:table-cell>
          <table:table-cell office:value-type="date" office:date-value="2026-05-20T05:44:00" table:style-name="ce6">
            <text:p>2026-05-20 05:44</text:p>
          </table:table-cell>
          <table:table-cell table:number-columns-repeated="16369"/>
        </table:table-row>
        <table:table-row table:style-name="ro1">
          <table:table-cell office:value-type="float" office:value="649" table:style-name="ce3">
            <text:p>64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83752283</text:p>
          </table:table-cell>
          <table:table-cell office:value-type="string" table:style-name="ce1">
            <text:p>Luisa Ruiz Quintero</text:p>
          </table:table-cell>
          <table:table-cell office:value-type="date" office:date-value="1977-09-05T00:00:00" table:style-name="ce4">
            <text:p>1977-09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9045214</text:p>
          </table:table-cell>
          <table:table-cell office:value-type="string" table:style-name="ce1">
            <text:p>luisa.ruiz649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06T06:38:00" table:style-name="ce5">
            <text:p>2026-05-06 06:38</text:p>
          </table:table-cell>
          <table:table-cell office:value-type="date" office:date-value="2026-06-21T03:50:00" table:style-name="ce6">
            <text:p>2026-06-21 03:50</text:p>
          </table:table-cell>
          <table:table-cell table:number-columns-repeated="16369"/>
        </table:table-row>
        <table:table-row table:style-name="ro1">
          <table:table-cell office:value-type="float" office:value="650" table:style-name="ce3">
            <text:p>65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3184100</text:p>
          </table:table-cell>
          <table:table-cell office:value-type="string" table:style-name="ce1">
            <text:p>Natalia Ruiz Muñoz</text:p>
          </table:table-cell>
          <table:table-cell office:value-type="date" office:date-value="1958-07-09T00:00:00" table:style-name="ce4">
            <text:p>1958-07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7719368</text:p>
          </table:table-cell>
          <table:table-cell office:value-type="string" table:style-name="ce1">
            <text:p>natalia.ruiz650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6-17T13:01:00" table:style-name="ce5">
            <text:p>2026-06-17 13:01</text:p>
          </table:table-cell>
          <table:table-cell office:value-type="date" office:date-value="2026-06-24T22:37:00" table:style-name="ce6">
            <text:p>2026-06-24 22:37</text:p>
          </table:table-cell>
          <table:table-cell table:number-columns-repeated="16369"/>
        </table:table-row>
        <table:table-row table:style-name="ro1">
          <table:table-cell office:value-type="float" office:value="651" table:style-name="ce3">
            <text:p>65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81486085</text:p>
          </table:table-cell>
          <table:table-cell office:value-type="string" table:style-name="ce1">
            <text:p>Isabella Hernández Díaz</text:p>
          </table:table-cell>
          <table:table-cell office:value-type="date" office:date-value="1942-06-23T00:00:00" table:style-name="ce4">
            <text:p>1942-06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8445136</text:p>
          </table:table-cell>
          <table:table-cell office:value-type="string" table:style-name="ce1">
            <text:p>isabella.hernandez651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6-06T06:39:00" table:style-name="ce5">
            <text:p>2026-06-06 06:39</text:p>
          </table:table-cell>
          <table:table-cell office:value-type="date" office:date-value="2026-06-19T15:49:00" table:style-name="ce6">
            <text:p>2026-06-19 15:49</text:p>
          </table:table-cell>
          <table:table-cell table:number-columns-repeated="16369"/>
        </table:table-row>
        <table:table-row table:style-name="ro1">
          <table:table-cell office:value-type="float" office:value="652" table:style-name="ce3">
            <text:p>65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1835218</text:p>
          </table:table-cell>
          <table:table-cell office:value-type="string" table:style-name="ce1">
            <text:p>Daniel Díaz Vargas</text:p>
          </table:table-cell>
          <table:table-cell office:value-type="date" office:date-value="2014-02-22T00:00:00" table:style-name="ce4">
            <text:p>2014-02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1548392</text:p>
          </table:table-cell>
          <table:table-cell office:value-type="string" table:style-name="ce1">
            <text:p>daniel.diaz65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4-02T21:41:00" table:style-name="ce5">
            <text:p>2026-04-02 21:41</text:p>
          </table:table-cell>
          <table:table-cell office:value-type="date" office:date-value="2026-04-22T20:35:00" table:style-name="ce6">
            <text:p>2026-04-22 20:35</text:p>
          </table:table-cell>
          <table:table-cell table:number-columns-repeated="16369"/>
        </table:table-row>
        <table:table-row table:style-name="ro1">
          <table:table-cell office:value-type="float" office:value="653" table:style-name="ce3">
            <text:p>65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64168176</text:p>
          </table:table-cell>
          <table:table-cell office:value-type="string" table:style-name="ce1">
            <text:p>David Hernández Torres</text:p>
          </table:table-cell>
          <table:table-cell office:value-type="date" office:date-value="1991-01-06T00:00:00" table:style-name="ce4">
            <text:p>1991-01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9959177</text:p>
          </table:table-cell>
          <table:table-cell office:value-type="string" table:style-name="ce1">
            <text:p>david.hernandez65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21T05:59:00" table:style-name="ce5">
            <text:p>2026-06-21 05:59</text:p>
          </table:table-cell>
          <table:table-cell office:value-type="date" office:date-value="2026-07-05T23:52:00" table:style-name="ce6">
            <text:p>2026-07-05 23:52</text:p>
          </table:table-cell>
          <table:table-cell table:number-columns-repeated="16369"/>
        </table:table-row>
        <table:table-row table:style-name="ro1">
          <table:table-cell office:value-type="float" office:value="654" table:style-name="ce3">
            <text:p>65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3768552</text:p>
          </table:table-cell>
          <table:table-cell office:value-type="string" table:style-name="ce1">
            <text:p>Juliana López Pérez</text:p>
          </table:table-cell>
          <table:table-cell office:value-type="date" office:date-value="1983-10-24T00:00:00" table:style-name="ce4">
            <text:p>1983-10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1135612</text:p>
          </table:table-cell>
          <table:table-cell office:value-type="string" table:style-name="ce1">
            <text:p>juliana.lopez654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10T05:32:00" table:style-name="ce5">
            <text:p>2026-04-10 05:32</text:p>
          </table:table-cell>
          <table:table-cell office:value-type="date" office:date-value="2026-04-26T22:41:00" table:style-name="ce6">
            <text:p>2026-04-26 22:41</text:p>
          </table:table-cell>
          <table:table-cell table:number-columns-repeated="16369"/>
        </table:table-row>
        <table:table-row table:style-name="ro1">
          <table:table-cell office:value-type="float" office:value="655" table:style-name="ce3">
            <text:p>65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45034783</text:p>
          </table:table-cell>
          <table:table-cell office:value-type="string" table:style-name="ce1">
            <text:p>Jorge Sebastián Moreno Castaño</text:p>
          </table:table-cell>
          <table:table-cell office:value-type="date" office:date-value="1977-10-05T00:00:00" table:style-name="ce4">
            <text:p>1977-10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5662312</text:p>
          </table:table-cell>
          <table:table-cell office:value-type="string" table:style-name="ce1">
            <text:p>jorge.moreno65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19T07:28:00" table:style-name="ce5">
            <text:p>2026-06-19 07:28</text:p>
          </table:table-cell>
          <table:table-cell office:value-type="date" office:date-value="2026-06-29T07:18:00" table:style-name="ce6">
            <text:p>2026-06-29 07:18</text:p>
          </table:table-cell>
          <table:table-cell table:number-columns-repeated="16369"/>
        </table:table-row>
        <table:table-row table:style-name="ro1">
          <table:table-cell office:value-type="float" office:value="656" table:style-name="ce3">
            <text:p>65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57962014</text:p>
          </table:table-cell>
          <table:table-cell office:value-type="string" table:style-name="ce1">
            <text:p>Paula Quintero Romero</text:p>
          </table:table-cell>
          <table:table-cell office:value-type="date" office:date-value="1976-12-08T00:00:00" table:style-name="ce4">
            <text:p>1976-12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6992867</text:p>
          </table:table-cell>
          <table:table-cell office:value-type="string" table:style-name="ce1">
            <text:p>paula.quintero65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7-06T19:14:00" table:style-name="ce5">
            <text:p>2026-07-06 19:14</text:p>
          </table:table-cell>
          <table:table-cell office:value-type="date" office:date-value="2026-07-09T20:48:00" table:style-name="ce6">
            <text:p>2026-07-09 20:48</text:p>
          </table:table-cell>
          <table:table-cell table:number-columns-repeated="16369"/>
        </table:table-row>
        <table:table-row table:style-name="ro1">
          <table:table-cell office:value-type="float" office:value="657" table:style-name="ce3">
            <text:p>65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2890948</text:p>
          </table:table-cell>
          <table:table-cell office:value-type="string" table:style-name="ce1">
            <text:p>Diana Martínez Valencia</text:p>
          </table:table-cell>
          <table:table-cell office:value-type="date" office:date-value="1945-02-16T00:00:00" table:style-name="ce4">
            <text:p>1945-02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2482824</text:p>
          </table:table-cell>
          <table:table-cell office:value-type="string" table:style-name="ce1">
            <text:p>diana.martinez657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26T19:52:00" table:style-name="ce5">
            <text:p>2026-04-26 19:52</text:p>
          </table:table-cell>
          <table:table-cell office:value-type="date" office:date-value="2026-05-13T12:34:00" table:style-name="ce6">
            <text:p>2026-05-13 12:34</text:p>
          </table:table-cell>
          <table:table-cell table:number-columns-repeated="16369"/>
        </table:table-row>
        <table:table-row table:style-name="ro1">
          <table:table-cell office:value-type="float" office:value="658" table:style-name="ce3">
            <text:p>65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72051883</text:p>
          </table:table-cell>
          <table:table-cell office:value-type="string" table:style-name="ce1">
            <text:p>Andrés Silva Moreno</text:p>
          </table:table-cell>
          <table:table-cell office:value-type="date" office:date-value="1956-12-21T00:00:00" table:style-name="ce4">
            <text:p>1956-12-2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6111674</text:p>
          </table:table-cell>
          <table:table-cell office:value-type="string" table:style-name="ce1">
            <text:p>andres.silva658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01T09:17:00" table:style-name="ce5">
            <text:p>2026-05-01 09:17</text:p>
          </table:table-cell>
          <table:table-cell office:value-type="date" office:date-value="2026-05-21T05:20:00" table:style-name="ce6">
            <text:p>2026-05-21 05:20</text:p>
          </table:table-cell>
          <table:table-cell table:number-columns-repeated="16369"/>
        </table:table-row>
        <table:table-row table:style-name="ro1">
          <table:table-cell office:value-type="float" office:value="659" table:style-name="ce3">
            <text:p>65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85896460</text:p>
          </table:table-cell>
          <table:table-cell office:value-type="string" table:style-name="ce1">
            <text:p>Daniela Torres Sánchez</text:p>
          </table:table-cell>
          <table:table-cell office:value-type="date" office:date-value="1963-01-21T00:00:00" table:style-name="ce4">
            <text:p>1963-01-2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8122267</text:p>
          </table:table-cell>
          <table:table-cell office:value-type="string" table:style-name="ce1">
            <text:p>daniela.torres659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01T13:24:00" table:style-name="ce5">
            <text:p>2026-04-01 13:24</text:p>
          </table:table-cell>
          <table:table-cell office:value-type="date" office:date-value="2026-04-30T19:04:00" table:style-name="ce6">
            <text:p>2026-04-30 19:04</text:p>
          </table:table-cell>
          <table:table-cell table:number-columns-repeated="16369"/>
        </table:table-row>
        <table:table-row table:style-name="ro1">
          <table:table-cell office:value-type="float" office:value="660" table:style-name="ce3">
            <text:p>66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741075126</text:p>
          </table:table-cell>
          <table:table-cell office:value-type="string" table:style-name="ce1">
            <text:p>Camila Mendoza López</text:p>
          </table:table-cell>
          <table:table-cell office:value-type="date" office:date-value="1973-06-25T00:00:00" table:style-name="ce4">
            <text:p>1973-06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2875956</text:p>
          </table:table-cell>
          <table:table-cell office:value-type="string" table:style-name="ce1">
            <text:p>camila.mendoza660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17T02:57:00" table:style-name="ce5">
            <text:p>2026-04-17 02:57</text:p>
          </table:table-cell>
          <table:table-cell office:value-type="date" office:date-value="2026-04-26T04:05:00" table:style-name="ce6">
            <text:p>2026-04-26 04:05</text:p>
          </table:table-cell>
          <table:table-cell table:number-columns-repeated="16369"/>
        </table:table-row>
        <table:table-row table:style-name="ro1">
          <table:table-cell office:value-type="float" office:value="661" table:style-name="ce3">
            <text:p>66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6027007</text:p>
          </table:table-cell>
          <table:table-cell office:value-type="string" table:style-name="ce1">
            <text:p>Esteban Carlos Ruiz Martínez</text:p>
          </table:table-cell>
          <table:table-cell office:value-type="date" office:date-value="1976-05-13T00:00:00" table:style-name="ce4">
            <text:p>1976-05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9937526</text:p>
          </table:table-cell>
          <table:table-cell office:value-type="string" table:style-name="ce1">
            <text:p>esteban.ruiz661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6-03T05:55:00" table:style-name="ce5">
            <text:p>2026-06-03 05:55</text:p>
          </table:table-cell>
          <table:table-cell office:value-type="date" office:date-value="2026-06-13T23:58:00" table:style-name="ce6">
            <text:p>2026-06-13 23:58</text:p>
          </table:table-cell>
          <table:table-cell table:number-columns-repeated="16369"/>
        </table:table-row>
        <table:table-row table:style-name="ro1">
          <table:table-cell office:value-type="float" office:value="662" table:style-name="ce3">
            <text:p>662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036677761</text:p>
          </table:table-cell>
          <table:table-cell office:value-type="string" table:style-name="ce1">
            <text:p>Diana Vargas Muñoz</text:p>
          </table:table-cell>
          <table:table-cell office:value-type="date" office:date-value="1988-01-13T00:00:00" table:style-name="ce4">
            <text:p>1988-01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5326020</text:p>
          </table:table-cell>
          <table:table-cell office:value-type="string" table:style-name="ce1">
            <text:p>diana.vargas66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21T21:02:00" table:style-name="ce5">
            <text:p>2026-06-21 21:02</text:p>
          </table:table-cell>
          <table:table-cell office:value-type="date" office:date-value="2026-06-24T17:43:00" table:style-name="ce6">
            <text:p>2026-06-24 17:43</text:p>
          </table:table-cell>
          <table:table-cell table:number-columns-repeated="16369"/>
        </table:table-row>
        <table:table-row table:style-name="ro1">
          <table:table-cell office:value-type="float" office:value="663" table:style-name="ce3">
            <text:p>66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9356821</text:p>
          </table:table-cell>
          <table:table-cell office:value-type="string" table:style-name="ce1">
            <text:p>Natalia Paula Rojas Jiménez</text:p>
          </table:table-cell>
          <table:table-cell office:value-type="date" office:date-value="1980-05-05T00:00:00" table:style-name="ce4">
            <text:p>1980-05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7728725</text:p>
          </table:table-cell>
          <table:table-cell office:value-type="string" table:style-name="ce1">
            <text:p>natalia.rojas663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7-02T19:17:00" table:style-name="ce5">
            <text:p>2026-07-02 19:17</text:p>
          </table:table-cell>
          <table:table-cell office:value-type="date" office:date-value="2026-07-03T08:53:00" table:style-name="ce6">
            <text:p>2026-07-03 08:53</text:p>
          </table:table-cell>
          <table:table-cell table:number-columns-repeated="16369"/>
        </table:table-row>
        <table:table-row table:style-name="ro1">
          <table:table-cell office:value-type="float" office:value="664" table:style-name="ce3">
            <text:p>66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01639356</text:p>
          </table:table-cell>
          <table:table-cell office:value-type="string" table:style-name="ce1">
            <text:p>Paula Ruiz Pérez</text:p>
          </table:table-cell>
          <table:table-cell office:value-type="date" office:date-value="1982-04-23T00:00:00" table:style-name="ce4">
            <text:p>1982-04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2072764</text:p>
          </table:table-cell>
          <table:table-cell office:value-type="string" table:style-name="ce1">
            <text:p>paula.ruiz66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3-15T20:34:00" table:style-name="ce5">
            <text:p>2026-03-15 20:34</text:p>
          </table:table-cell>
          <table:table-cell office:value-type="date" office:date-value="2026-06-13T20:37:00" table:style-name="ce6">
            <text:p>2026-06-13 20:37</text:p>
          </table:table-cell>
          <table:table-cell table:number-columns-repeated="16369"/>
        </table:table-row>
        <table:table-row table:style-name="ro1">
          <table:table-cell office:value-type="float" office:value="665" table:style-name="ce3">
            <text:p>665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409876665</text:p>
          </table:table-cell>
          <table:table-cell office:value-type="string" table:style-name="ce1">
            <text:p>Daniel Silva Moreno</text:p>
          </table:table-cell>
          <table:table-cell office:value-type="date" office:date-value="1977-01-21T00:00:00" table:style-name="ce4">
            <text:p>1977-01-2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5624251</text:p>
          </table:table-cell>
          <table:table-cell office:value-type="string" table:style-name="ce1">
            <text:p>daniel.silva665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25T00:56:00" table:style-name="ce5">
            <text:p>2026-06-25 00:56</text:p>
          </table:table-cell>
          <table:table-cell office:value-type="date" office:date-value="2026-07-01T06:16:00" table:style-name="ce6">
            <text:p>2026-07-01 06:16</text:p>
          </table:table-cell>
          <table:table-cell table:number-columns-repeated="16369"/>
        </table:table-row>
        <table:table-row table:style-name="ro1">
          <table:table-cell office:value-type="float" office:value="666" table:style-name="ce3">
            <text:p>66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3035661</text:p>
          </table:table-cell>
          <table:table-cell office:value-type="string" table:style-name="ce1">
            <text:p>Gabriela López Rojas</text:p>
          </table:table-cell>
          <table:table-cell office:value-type="date" office:date-value="2007-04-12T00:00:00" table:style-name="ce4">
            <text:p>2007-04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5996592</text:p>
          </table:table-cell>
          <table:table-cell office:value-type="string" table:style-name="ce1">
            <text:p>gabriela.lopez66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23T20:42:00" table:style-name="ce5">
            <text:p>2026-05-23 20:42</text:p>
          </table:table-cell>
          <table:table-cell office:value-type="date" office:date-value="2026-06-07T10:19:00" table:style-name="ce6">
            <text:p>2026-06-07 10:19</text:p>
          </table:table-cell>
          <table:table-cell table:number-columns-repeated="16369"/>
        </table:table-row>
        <table:table-row table:style-name="ro1">
          <table:table-cell office:value-type="float" office:value="667" table:style-name="ce3">
            <text:p>66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5211559</text:p>
          </table:table-cell>
          <table:table-cell office:value-type="string" table:style-name="ce1">
            <text:p>Ricardo Castro Torres</text:p>
          </table:table-cell>
          <table:table-cell office:value-type="date" office:date-value="2004-06-25T00:00:00" table:style-name="ce4">
            <text:p>2004-06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8919505</text:p>
          </table:table-cell>
          <table:table-cell office:value-type="string" table:style-name="ce1">
            <text:p>ricardo.castro667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6-16T10:27:00" table:style-name="ce5">
            <text:p>2026-06-16 10:27</text:p>
          </table:table-cell>
          <table:table-cell office:value-type="date" office:date-value="2026-06-16T18:30:00" table:style-name="ce6">
            <text:p>2026-06-16 18:30</text:p>
          </table:table-cell>
          <table:table-cell table:number-columns-repeated="16369"/>
        </table:table-row>
        <table:table-row table:style-name="ro1">
          <table:table-cell office:value-type="float" office:value="668" table:style-name="ce3">
            <text:p>66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9302873</text:p>
          </table:table-cell>
          <table:table-cell office:value-type="string" table:style-name="ce1">
            <text:p>Julián Vargas Hernández</text:p>
          </table:table-cell>
          <table:table-cell office:value-type="date" office:date-value="1977-02-22T00:00:00" table:style-name="ce4">
            <text:p>1977-02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7265212</text:p>
          </table:table-cell>
          <table:table-cell office:value-type="string" table:style-name="ce1">
            <text:p>julian.vargas66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20T17:10:00" table:style-name="ce5">
            <text:p>2026-05-20 17:10</text:p>
          </table:table-cell>
          <table:table-cell office:value-type="date" office:date-value="2026-05-25T11:33:00" table:style-name="ce6">
            <text:p>2026-05-25 11:33</text:p>
          </table:table-cell>
          <table:table-cell table:number-columns-repeated="16369"/>
        </table:table-row>
        <table:table-row table:style-name="ro1">
          <table:table-cell office:value-type="float" office:value="669" table:style-name="ce3">
            <text:p>66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00734573</text:p>
          </table:table-cell>
          <table:table-cell office:value-type="string" table:style-name="ce1">
            <text:p>Laura Díaz Valencia</text:p>
          </table:table-cell>
          <table:table-cell office:value-type="date" office:date-value="1998-01-21T00:00:00" table:style-name="ce4">
            <text:p>1998-01-2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5160239</text:p>
          </table:table-cell>
          <table:table-cell office:value-type="string" table:style-name="ce1">
            <text:p>laura.diaz66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3-31T18:12:00" table:style-name="ce5">
            <text:p>2026-03-31 18:12</text:p>
          </table:table-cell>
          <table:table-cell office:value-type="date" office:date-value="2026-04-20T03:54:00" table:style-name="ce6">
            <text:p>2026-04-20 03:54</text:p>
          </table:table-cell>
          <table:table-cell table:number-columns-repeated="16369"/>
        </table:table-row>
        <table:table-row table:style-name="ro1">
          <table:table-cell office:value-type="float" office:value="670" table:style-name="ce3">
            <text:p>67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64341374</text:p>
          </table:table-cell>
          <table:table-cell office:value-type="string" table:style-name="ce1">
            <text:p>Sofía Valencia García</text:p>
          </table:table-cell>
          <table:table-cell office:value-type="date" office:date-value="1993-09-02T00:00:00" table:style-name="ce4">
            <text:p>1993-09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4475172</text:p>
          </table:table-cell>
          <table:table-cell office:value-type="string" table:style-name="ce1">
            <text:p>sofia.valencia670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13T15:26:00" table:style-name="ce5">
            <text:p>2026-04-13 15:26</text:p>
          </table:table-cell>
          <table:table-cell office:value-type="date" office:date-value="2026-05-04T18:41:00" table:style-name="ce6">
            <text:p>2026-05-04 18:41</text:p>
          </table:table-cell>
          <table:table-cell table:number-columns-repeated="16369"/>
        </table:table-row>
        <table:table-row table:style-name="ro1">
          <table:table-cell office:value-type="float" office:value="671" table:style-name="ce3">
            <text:p>67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38255719</text:p>
          </table:table-cell>
          <table:table-cell office:value-type="string" table:style-name="ce1">
            <text:p>Juliana Ospina Rodríguez</text:p>
          </table:table-cell>
          <table:table-cell office:value-type="date" office:date-value="1953-10-24T00:00:00" table:style-name="ce4">
            <text:p>1953-10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8207258</text:p>
          </table:table-cell>
          <table:table-cell office:value-type="string" table:style-name="ce1">
            <text:p>juliana.ospina67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22T12:28:00" table:style-name="ce5">
            <text:p>2026-06-22 12:28</text:p>
          </table:table-cell>
          <table:table-cell office:value-type="date" office:date-value="2026-06-30T01:36:00" table:style-name="ce6">
            <text:p>2026-06-30 01:36</text:p>
          </table:table-cell>
          <table:table-cell table:number-columns-repeated="16369"/>
        </table:table-row>
        <table:table-row table:style-name="ro1">
          <table:table-cell office:value-type="float" office:value="672" table:style-name="ce3">
            <text:p>67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65191142</text:p>
          </table:table-cell>
          <table:table-cell office:value-type="string" table:style-name="ce1">
            <text:p>Andrea Silva Torres</text:p>
          </table:table-cell>
          <table:table-cell office:value-type="date" office:date-value="1967-07-19T00:00:00" table:style-name="ce4">
            <text:p>1967-07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6921804</text:p>
          </table:table-cell>
          <table:table-cell office:value-type="string" table:style-name="ce1">
            <text:p>andrea.silva672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6-19T09:25:00" table:style-name="ce5">
            <text:p>2026-06-19 09:25</text:p>
          </table:table-cell>
          <table:table-cell office:value-type="date" office:date-value="2026-07-01T14:18:00" table:style-name="ce6">
            <text:p>2026-07-01 14:18</text:p>
          </table:table-cell>
          <table:table-cell table:number-columns-repeated="16369"/>
        </table:table-row>
        <table:table-row table:style-name="ro1">
          <table:table-cell office:value-type="float" office:value="673" table:style-name="ce3">
            <text:p>67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8083887</text:p>
          </table:table-cell>
          <table:table-cell office:value-type="string" table:style-name="ce1">
            <text:p>Sara Rojas Torres</text:p>
          </table:table-cell>
          <table:table-cell office:value-type="date" office:date-value="1992-10-11T00:00:00" table:style-name="ce4">
            <text:p>1992-10-1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2791224</text:p>
          </table:table-cell>
          <table:table-cell office:value-type="string" table:style-name="ce1">
            <text:p>sara.rojas673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4-07T09:22:00" table:style-name="ce5">
            <text:p>2026-04-07 09:22</text:p>
          </table:table-cell>
          <table:table-cell office:value-type="date" office:date-value="2026-05-22T10:12:00" table:style-name="ce6">
            <text:p>2026-05-22 10:12</text:p>
          </table:table-cell>
          <table:table-cell table:number-columns-repeated="16369"/>
        </table:table-row>
        <table:table-row table:style-name="ro1">
          <table:table-cell office:value-type="float" office:value="674" table:style-name="ce3">
            <text:p>67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61279988</text:p>
          </table:table-cell>
          <table:table-cell office:value-type="string" table:style-name="ce1">
            <text:p>Nicolás Samuel Castro Torres</text:p>
          </table:table-cell>
          <table:table-cell office:value-type="date" office:date-value="1991-06-30T00:00:00" table:style-name="ce4">
            <text:p>1991-06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9743077</text:p>
          </table:table-cell>
          <table:table-cell office:value-type="string" table:style-name="ce1">
            <text:p>nicolas.castro67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4-05T06:11:00" table:style-name="ce5">
            <text:p>2026-04-05 06:11</text:p>
          </table:table-cell>
          <table:table-cell office:value-type="date" office:date-value="2026-06-02T12:36:00" table:style-name="ce6">
            <text:p>2026-06-02 12:36</text:p>
          </table:table-cell>
          <table:table-cell table:number-columns-repeated="16369"/>
        </table:table-row>
        <table:table-row table:style-name="ro1">
          <table:table-cell office:value-type="float" office:value="675" table:style-name="ce3">
            <text:p>67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16636812</text:p>
          </table:table-cell>
          <table:table-cell office:value-type="string" table:style-name="ce1">
            <text:p>Manuela Catalina Díaz Restrepo</text:p>
          </table:table-cell>
          <table:table-cell office:value-type="date" office:date-value="1976-09-01T00:00:00" table:style-name="ce4">
            <text:p>1976-09-0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8772622</text:p>
          </table:table-cell>
          <table:table-cell office:value-type="string" table:style-name="ce1">
            <text:p>manuela.diaz675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08T06:45:00" table:style-name="ce5">
            <text:p>2026-06-08 06:45</text:p>
          </table:table-cell>
          <table:table-cell office:value-type="date" office:date-value="2026-06-26T11:46:00" table:style-name="ce6">
            <text:p>2026-06-26 11:46</text:p>
          </table:table-cell>
          <table:table-cell table:number-columns-repeated="16369"/>
        </table:table-row>
        <table:table-row table:style-name="ro1">
          <table:table-cell office:value-type="float" office:value="676" table:style-name="ce3">
            <text:p>67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62516645</text:p>
          </table:table-cell>
          <table:table-cell office:value-type="string" table:style-name="ce1">
            <text:p>Daniela Giraldo Pérez</text:p>
          </table:table-cell>
          <table:table-cell office:value-type="date" office:date-value="1999-04-01T00:00:00" table:style-name="ce4">
            <text:p>1999-04-0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6174586</text:p>
          </table:table-cell>
          <table:table-cell office:value-type="string" table:style-name="ce1">
            <text:p>daniela.giraldo676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29T04:26:00" table:style-name="ce5">
            <text:p>2026-04-29 04:26</text:p>
          </table:table-cell>
          <table:table-cell office:value-type="date" office:date-value="2026-06-03T00:32:00" table:style-name="ce6">
            <text:p>2026-06-03 00:32</text:p>
          </table:table-cell>
          <table:table-cell table:number-columns-repeated="16369"/>
        </table:table-row>
        <table:table-row table:style-name="ro1">
          <table:table-cell office:value-type="float" office:value="677" table:style-name="ce3">
            <text:p>67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28628697</text:p>
          </table:table-cell>
          <table:table-cell office:value-type="string" table:style-name="ce1">
            <text:p>Laura Hernández Ruiz</text:p>
          </table:table-cell>
          <table:table-cell office:value-type="date" office:date-value="1968-02-25T00:00:00" table:style-name="ce4">
            <text:p>1968-02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3037859</text:p>
          </table:table-cell>
          <table:table-cell office:value-type="string" table:style-name="ce1">
            <text:p>laura.hernandez677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5-14T06:12:00" table:style-name="ce5">
            <text:p>2026-05-14 06:12</text:p>
          </table:table-cell>
          <table:table-cell office:value-type="date" office:date-value="2026-06-24T15:58:00" table:style-name="ce6">
            <text:p>2026-06-24 15:58</text:p>
          </table:table-cell>
          <table:table-cell table:number-columns-repeated="16369"/>
        </table:table-row>
        <table:table-row table:style-name="ro1">
          <table:table-cell office:value-type="float" office:value="678" table:style-name="ce3">
            <text:p>67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04368292</text:p>
          </table:table-cell>
          <table:table-cell office:value-type="string" table:style-name="ce1">
            <text:p>Catalina Cárdenas Quintero</text:p>
          </table:table-cell>
          <table:table-cell office:value-type="date" office:date-value="1942-11-12T00:00:00" table:style-name="ce4">
            <text:p>1942-11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6916624</text:p>
          </table:table-cell>
          <table:table-cell office:value-type="string" table:style-name="ce1">
            <text:p>catalina.cardenas678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23T07:29:00" table:style-name="ce5">
            <text:p>2026-04-23 07:29</text:p>
          </table:table-cell>
          <table:table-cell office:value-type="date" office:date-value="2026-06-17T12:22:00" table:style-name="ce6">
            <text:p>2026-06-17 12:22</text:p>
          </table:table-cell>
          <table:table-cell table:number-columns-repeated="16369"/>
        </table:table-row>
        <table:table-row table:style-name="ro1">
          <table:table-cell office:value-type="float" office:value="679" table:style-name="ce3">
            <text:p>67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9426408</text:p>
          </table:table-cell>
          <table:table-cell office:value-type="string" table:style-name="ce1">
            <text:p>Luisa Valencia Sánchez</text:p>
          </table:table-cell>
          <table:table-cell office:value-type="date" office:date-value="1982-05-08T00:00:00" table:style-name="ce4">
            <text:p>1982-05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8489977</text:p>
          </table:table-cell>
          <table:table-cell office:value-type="string" table:style-name="ce1">
            <text:p>luisa.valencia679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11T14:54:00" table:style-name="ce5">
            <text:p>2026-06-11 14:54</text:p>
          </table:table-cell>
          <table:table-cell office:value-type="date" office:date-value="2026-06-18T03:08:00" table:style-name="ce6">
            <text:p>2026-06-18 03:08</text:p>
          </table:table-cell>
          <table:table-cell table:number-columns-repeated="16369"/>
        </table:table-row>
        <table:table-row table:style-name="ro1">
          <table:table-cell office:value-type="float" office:value="680" table:style-name="ce3">
            <text:p>68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5873751</text:p>
          </table:table-cell>
          <table:table-cell office:value-type="string" table:style-name="ce1">
            <text:p>Daniel Cristian Castro Rodríguez</text:p>
          </table:table-cell>
          <table:table-cell office:value-type="date" office:date-value="1989-10-06T00:00:00" table:style-name="ce4">
            <text:p>1989-10-06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3218136281</text:p>
          </table:table-cell>
          <table:table-cell office:value-type="string" table:style-name="ce1">
            <text:p>daniel.castro680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09T14:09:00" table:style-name="ce5">
            <text:p>2026-05-09 14:09</text:p>
          </table:table-cell>
          <table:table-cell office:value-type="date" office:date-value="2026-06-07T18:52:00" table:style-name="ce6">
            <text:p>2026-06-07 18:52</text:p>
          </table:table-cell>
          <table:table-cell table:number-columns-repeated="16369"/>
        </table:table-row>
        <table:table-row table:style-name="ro1">
          <table:table-cell office:value-type="float" office:value="681" table:style-name="ce3">
            <text:p>68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09349103</text:p>
          </table:table-cell>
          <table:table-cell office:value-type="string" table:style-name="ce1">
            <text:p>Mateo Castaño Silva</text:p>
          </table:table-cell>
          <table:table-cell office:value-type="date" office:date-value="1972-12-20T00:00:00" table:style-name="ce4">
            <text:p>1972-12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2796648</text:p>
          </table:table-cell>
          <table:table-cell office:value-type="string" table:style-name="ce1">
            <text:p>mateo.castano681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7-03T21:09:00" table:style-name="ce5">
            <text:p>2026-07-03 21:09</text:p>
          </table:table-cell>
          <table:table-cell office:value-type="date" office:date-value="2026-07-04T15:49:00" table:style-name="ce6">
            <text:p>2026-07-04 15:49</text:p>
          </table:table-cell>
          <table:table-cell table:number-columns-repeated="16369"/>
        </table:table-row>
        <table:table-row table:style-name="ro1">
          <table:table-cell office:value-type="float" office:value="682" table:style-name="ce3">
            <text:p>68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10025996</text:p>
          </table:table-cell>
          <table:table-cell office:value-type="string" table:style-name="ce1">
            <text:p>José García Díaz</text:p>
          </table:table-cell>
          <table:table-cell office:value-type="date" office:date-value="1996-09-17T00:00:00" table:style-name="ce4">
            <text:p>1996-09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6645245</text:p>
          </table:table-cell>
          <table:table-cell office:value-type="string" table:style-name="ce1">
            <text:p>jose.garcia682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29T11:25:00" table:style-name="ce5">
            <text:p>2026-06-29 11:25</text:p>
          </table:table-cell>
          <table:table-cell office:value-type="date" office:date-value="2026-07-06T14:09:00" table:style-name="ce6">
            <text:p>2026-07-06 14:09</text:p>
          </table:table-cell>
          <table:table-cell table:number-columns-repeated="16369"/>
        </table:table-row>
        <table:table-row table:style-name="ro1">
          <table:table-cell office:value-type="float" office:value="683" table:style-name="ce3">
            <text:p>683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531157637</text:p>
          </table:table-cell>
          <table:table-cell office:value-type="string" table:style-name="ce1">
            <text:p>Jorge Díaz López</text:p>
          </table:table-cell>
          <table:table-cell office:value-type="date" office:date-value="2019-11-28T00:00:00" table:style-name="ce4">
            <text:p>2019-11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4269343</text:p>
          </table:table-cell>
          <table:table-cell office:value-type="string" table:style-name="ce1">
            <text:p>jorge.diaz683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6-10T05:57:00" table:style-name="ce5">
            <text:p>2026-06-10 05:57</text:p>
          </table:table-cell>
          <table:table-cell office:value-type="date" office:date-value="2026-06-11T23:46:00" table:style-name="ce6">
            <text:p>2026-06-11 23:46</text:p>
          </table:table-cell>
          <table:table-cell table:number-columns-repeated="16369"/>
        </table:table-row>
        <table:table-row table:style-name="ro1">
          <table:table-cell office:value-type="float" office:value="684" table:style-name="ce3">
            <text:p>68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736006079</text:p>
          </table:table-cell>
          <table:table-cell office:value-type="string" table:style-name="ce1">
            <text:p>Manuela Andrea Cárdenas Pérez</text:p>
          </table:table-cell>
          <table:table-cell office:value-type="date" office:date-value="2014-02-16T00:00:00" table:style-name="ce4">
            <text:p>2014-02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9277123</text:p>
          </table:table-cell>
          <table:table-cell office:value-type="string" table:style-name="ce1">
            <text:p>manuela.cardenas68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18T05:22:00" table:style-name="ce5">
            <text:p>2026-04-18 05:22</text:p>
          </table:table-cell>
          <table:table-cell office:value-type="date" office:date-value="2026-05-15T23:19:00" table:style-name="ce6">
            <text:p>2026-05-15 23:19</text:p>
          </table:table-cell>
          <table:table-cell table:number-columns-repeated="16369"/>
        </table:table-row>
        <table:table-row table:style-name="ro1">
          <table:table-cell office:value-type="float" office:value="685" table:style-name="ce3">
            <text:p>68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79793723</text:p>
          </table:table-cell>
          <table:table-cell office:value-type="string" table:style-name="ce1">
            <text:p>Alejandro Rodríguez Ortiz</text:p>
          </table:table-cell>
          <table:table-cell office:value-type="date" office:date-value="1968-10-17T00:00:00" table:style-name="ce4">
            <text:p>1968-10-17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3148752713</text:p>
          </table:table-cell>
          <table:table-cell office:value-type="string" table:style-name="ce1">
            <text:p>alejandro.rodriguez68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7-01T14:44:00" table:style-name="ce5">
            <text:p>2026-07-01 14:44</text:p>
          </table:table-cell>
          <table:table-cell office:value-type="date" office:date-value="2026-07-08T19:52:00" table:style-name="ce6">
            <text:p>2026-07-08 19:52</text:p>
          </table:table-cell>
          <table:table-cell table:number-columns-repeated="16369"/>
        </table:table-row>
        <table:table-row table:style-name="ro1">
          <table:table-cell office:value-type="float" office:value="686" table:style-name="ce3">
            <text:p>68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17483921</text:p>
          </table:table-cell>
          <table:table-cell office:value-type="string" table:style-name="ce1">
            <text:p>Juliana María Silva González</text:p>
          </table:table-cell>
          <table:table-cell office:value-type="date" office:date-value="1958-04-12T00:00:00" table:style-name="ce4">
            <text:p>1958-04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1105007</text:p>
          </table:table-cell>
          <table:table-cell office:value-type="string" table:style-name="ce1">
            <text:p>juliana.silva686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5-05T10:02:00" table:style-name="ce5">
            <text:p>2026-05-05 10:02</text:p>
          </table:table-cell>
          <table:table-cell office:value-type="date" office:date-value="2026-05-11T11:18:00" table:style-name="ce6">
            <text:p>2026-05-11 11:18</text:p>
          </table:table-cell>
          <table:table-cell table:number-columns-repeated="16369"/>
        </table:table-row>
        <table:table-row table:style-name="ro1">
          <table:table-cell office:value-type="float" office:value="687" table:style-name="ce3">
            <text:p>687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655579943</text:p>
          </table:table-cell>
          <table:table-cell office:value-type="string" table:style-name="ce1">
            <text:p>Gabriela Isabella Mendoza Valencia</text:p>
          </table:table-cell>
          <table:table-cell office:value-type="date" office:date-value="1976-03-28T00:00:00" table:style-name="ce4">
            <text:p>1976-03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5211664</text:p>
          </table:table-cell>
          <table:table-cell office:value-type="string" table:style-name="ce1">
            <text:p>gabriela.mendoza687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4-19T04:29:00" table:style-name="ce5">
            <text:p>2026-04-19 04:29</text:p>
          </table:table-cell>
          <table:table-cell office:value-type="date" office:date-value="2026-04-24T11:20:00" table:style-name="ce6">
            <text:p>2026-04-24 11:20</text:p>
          </table:table-cell>
          <table:table-cell table:number-columns-repeated="16369"/>
        </table:table-row>
        <table:table-row table:style-name="ro1">
          <table:table-cell office:value-type="float" office:value="688" table:style-name="ce3">
            <text:p>68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61761504</text:p>
          </table:table-cell>
          <table:table-cell office:value-type="string" table:style-name="ce1">
            <text:p>Jorge Vargas Cárdenas</text:p>
          </table:table-cell>
          <table:table-cell office:value-type="date" office:date-value="1997-10-09T00:00:00" table:style-name="ce4">
            <text:p>1997-10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2897448</text:p>
          </table:table-cell>
          <table:table-cell office:value-type="string" table:style-name="ce1">
            <text:p>jorge.vargas688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08T00:29:00" table:style-name="ce5">
            <text:p>2026-05-08 00:29</text:p>
          </table:table-cell>
          <table:table-cell office:value-type="date" office:date-value="2026-06-30T05:44:00" table:style-name="ce6">
            <text:p>2026-06-30 05:44</text:p>
          </table:table-cell>
          <table:table-cell table:number-columns-repeated="16369"/>
        </table:table-row>
        <table:table-row table:style-name="ro1">
          <table:table-cell office:value-type="float" office:value="689" table:style-name="ce3">
            <text:p>68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95549955</text:p>
          </table:table-cell>
          <table:table-cell office:value-type="string" table:style-name="ce1">
            <text:p>Gabriela Torres García</text:p>
          </table:table-cell>
          <table:table-cell office:value-type="date" office:date-value="1994-12-24T00:00:00" table:style-name="ce4">
            <text:p>1994-12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2029581</text:p>
          </table:table-cell>
          <table:table-cell office:value-type="string" table:style-name="ce1">
            <text:p>gabriela.torres68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18T06:32:00" table:style-name="ce5">
            <text:p>2026-06-18 06:32</text:p>
          </table:table-cell>
          <table:table-cell office:value-type="date" office:date-value="2026-06-25T13:10:00" table:style-name="ce6">
            <text:p>2026-06-25 13:10</text:p>
          </table:table-cell>
          <table:table-cell table:number-columns-repeated="16369"/>
        </table:table-row>
        <table:table-row table:style-name="ro1">
          <table:table-cell office:value-type="float" office:value="690" table:style-name="ce3">
            <text:p>69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0677114</text:p>
          </table:table-cell>
          <table:table-cell office:value-type="string" table:style-name="ce1">
            <text:p>Santiago Romero Castro</text:p>
          </table:table-cell>
          <table:table-cell office:value-type="date" office:date-value="2007-12-29T00:00:00" table:style-name="ce4">
            <text:p>2007-12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4849269</text:p>
          </table:table-cell>
          <table:table-cell office:value-type="string" table:style-name="ce1">
            <text:p>santiago.romero690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15T00:28:00" table:style-name="ce5">
            <text:p>2026-04-15 00:28</text:p>
          </table:table-cell>
          <table:table-cell office:value-type="date" office:date-value="2026-06-14T23:51:00" table:style-name="ce6">
            <text:p>2026-06-14 23:51</text:p>
          </table:table-cell>
          <table:table-cell table:number-columns-repeated="16369"/>
        </table:table-row>
        <table:table-row table:style-name="ro1">
          <table:table-cell office:value-type="float" office:value="691" table:style-name="ce3">
            <text:p>691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1265051</text:p>
          </table:table-cell>
          <table:table-cell office:value-type="string" table:style-name="ce1">
            <text:p>Santiago García Moreno</text:p>
          </table:table-cell>
          <table:table-cell office:value-type="date" office:date-value="2014-01-08T00:00:00" table:style-name="ce4">
            <text:p>2014-01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5748697</text:p>
          </table:table-cell>
          <table:table-cell office:value-type="string" table:style-name="ce1">
            <text:p>santiago.garcia691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3-21T00:19:00" table:style-name="ce5">
            <text:p>2026-03-21 00:19</text:p>
          </table:table-cell>
          <table:table-cell office:value-type="date" office:date-value="2026-05-05T09:54:00" table:style-name="ce6">
            <text:p>2026-05-05 09:54</text:p>
          </table:table-cell>
          <table:table-cell table:number-columns-repeated="16369"/>
        </table:table-row>
        <table:table-row table:style-name="ro1">
          <table:table-cell office:value-type="float" office:value="692" table:style-name="ce3">
            <text:p>69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85585981</text:p>
          </table:table-cell>
          <table:table-cell office:value-type="string" table:style-name="ce1">
            <text:p>Juan Restrepo Martínez</text:p>
          </table:table-cell>
          <table:table-cell office:value-type="date" office:date-value="2021-12-21T00:00:00" table:style-name="ce4">
            <text:p>2021-12-2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6436082</text:p>
          </table:table-cell>
          <table:table-cell office:value-type="string" table:style-name="ce1">
            <text:p>juan.restrepo692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3-12T14:07:00" table:style-name="ce5">
            <text:p>2026-03-12 14:07</text:p>
          </table:table-cell>
          <table:table-cell office:value-type="date" office:date-value="2026-04-03T14:57:00" table:style-name="ce6">
            <text:p>2026-04-03 14:57</text:p>
          </table:table-cell>
          <table:table-cell table:number-columns-repeated="16369"/>
        </table:table-row>
        <table:table-row table:style-name="ro1">
          <table:table-cell office:value-type="float" office:value="693" table:style-name="ce3">
            <text:p>693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114017748</text:p>
          </table:table-cell>
          <table:table-cell office:value-type="string" table:style-name="ce1">
            <text:p>Daniel García Jiménez</text:p>
          </table:table-cell>
          <table:table-cell office:value-type="date" office:date-value="2019-06-01T00:00:00" table:style-name="ce4">
            <text:p>2019-06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6844642</text:p>
          </table:table-cell>
          <table:table-cell office:value-type="string" table:style-name="ce1">
            <text:p>daniel.garcia69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16T13:54:00" table:style-name="ce5">
            <text:p>2026-06-16 13:54</text:p>
          </table:table-cell>
          <table:table-cell office:value-type="date" office:date-value="2026-07-02T22:54:00" table:style-name="ce6">
            <text:p>2026-07-02 22:54</text:p>
          </table:table-cell>
          <table:table-cell table:number-columns-repeated="16369"/>
        </table:table-row>
        <table:table-row table:style-name="ro1">
          <table:table-cell office:value-type="float" office:value="694" table:style-name="ce3">
            <text:p>69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94154548</text:p>
          </table:table-cell>
          <table:table-cell office:value-type="string" table:style-name="ce1">
            <text:p>Catalina Daniela Moreno Ruiz</text:p>
          </table:table-cell>
          <table:table-cell office:value-type="date" office:date-value="1972-02-20T00:00:00" table:style-name="ce4">
            <text:p>1972-02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9328782</text:p>
          </table:table-cell>
          <table:table-cell office:value-type="string" table:style-name="ce1">
            <text:p>catalina.moreno694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03T12:52:00" table:style-name="ce5">
            <text:p>2026-05-03 12:52</text:p>
          </table:table-cell>
          <table:table-cell office:value-type="date" office:date-value="2026-05-23T02:36:00" table:style-name="ce6">
            <text:p>2026-05-23 02:36</text:p>
          </table:table-cell>
          <table:table-cell table:number-columns-repeated="16369"/>
        </table:table-row>
        <table:table-row table:style-name="ro1">
          <table:table-cell office:value-type="float" office:value="695" table:style-name="ce3">
            <text:p>69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0672307</text:p>
          </table:table-cell>
          <table:table-cell office:value-type="string" table:style-name="ce1">
            <text:p>Camila Restrepo Torres</text:p>
          </table:table-cell>
          <table:table-cell office:value-type="date" office:date-value="1986-11-24T00:00:00" table:style-name="ce4">
            <text:p>1986-11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1790603</text:p>
          </table:table-cell>
          <table:table-cell office:value-type="string" table:style-name="ce1">
            <text:p>camila.restrepo695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12T00:15:00" table:style-name="ce5">
            <text:p>2026-06-12 00:15</text:p>
          </table:table-cell>
          <table:table-cell office:value-type="date" office:date-value="2026-06-21T00:26:00" table:style-name="ce6">
            <text:p>2026-06-21 00:26</text:p>
          </table:table-cell>
          <table:table-cell table:number-columns-repeated="16369"/>
        </table:table-row>
        <table:table-row table:style-name="ro1">
          <table:table-cell office:value-type="float" office:value="696" table:style-name="ce3">
            <text:p>69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52328615</text:p>
          </table:table-cell>
          <table:table-cell office:value-type="string" table:style-name="ce1">
            <text:p>Juan Romero Vargas</text:p>
          </table:table-cell>
          <table:table-cell office:value-type="date" office:date-value="1978-02-15T00:00:00" table:style-name="ce4">
            <text:p>1978-02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7125983</text:p>
          </table:table-cell>
          <table:table-cell office:value-type="string" table:style-name="ce1">
            <text:p>juan.romero696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17T07:29:00" table:style-name="ce5">
            <text:p>2026-05-17 07:29</text:p>
          </table:table-cell>
          <table:table-cell office:value-type="date" office:date-value="2026-06-17T22:45:00" table:style-name="ce6">
            <text:p>2026-06-17 22:45</text:p>
          </table:table-cell>
          <table:table-cell table:number-columns-repeated="16369"/>
        </table:table-row>
        <table:table-row table:style-name="ro1">
          <table:table-cell office:value-type="float" office:value="697" table:style-name="ce3">
            <text:p>697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1178077963</text:p>
          </table:table-cell>
          <table:table-cell office:value-type="string" table:style-name="ce1">
            <text:p>Alejandro Giraldo Romero</text:p>
          </table:table-cell>
          <table:table-cell office:value-type="date" office:date-value="1966-03-08T00:00:00" table:style-name="ce4">
            <text:p>1966-03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6833889</text:p>
          </table:table-cell>
          <table:table-cell office:value-type="string" table:style-name="ce1">
            <text:p>alejandro.giraldo69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02T17:02:00" table:style-name="ce5">
            <text:p>2026-06-02 17:02</text:p>
          </table:table-cell>
          <table:table-cell office:value-type="date" office:date-value="2026-06-27T20:50:00" table:style-name="ce6">
            <text:p>2026-06-27 20:50</text:p>
          </table:table-cell>
          <table:table-cell table:number-columns-repeated="16369"/>
        </table:table-row>
        <table:table-row table:style-name="ro1">
          <table:table-cell office:value-type="float" office:value="698" table:style-name="ce3">
            <text:p>698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1333682</text:p>
          </table:table-cell>
          <table:table-cell office:value-type="string" table:style-name="ce1">
            <text:p>Andrés Rojas Giraldo</text:p>
          </table:table-cell>
          <table:table-cell office:value-type="date" office:date-value="2009-02-20T00:00:00" table:style-name="ce4">
            <text:p>2009-02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7328626</text:p>
          </table:table-cell>
          <table:table-cell office:value-type="string" table:style-name="ce1">
            <text:p>andres.rojas698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5-28T14:05:00" table:style-name="ce5">
            <text:p>2026-05-28 14:05</text:p>
          </table:table-cell>
          <table:table-cell office:value-type="date" office:date-value="2026-06-07T10:11:00" table:style-name="ce6">
            <text:p>2026-06-07 10:11</text:p>
          </table:table-cell>
          <table:table-cell table:number-columns-repeated="16369"/>
        </table:table-row>
        <table:table-row table:style-name="ro1">
          <table:table-cell office:value-type="float" office:value="699" table:style-name="ce3">
            <text:p>69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8590815</text:p>
          </table:table-cell>
          <table:table-cell office:value-type="string" table:style-name="ce1">
            <text:p>Juliana Gabriela Romero Álvarez</text:p>
          </table:table-cell>
          <table:table-cell office:value-type="date" office:date-value="1991-03-31T00:00:00" table:style-name="ce4">
            <text:p>1991-03-3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1778901</text:p>
          </table:table-cell>
          <table:table-cell office:value-type="string" table:style-name="ce1">
            <text:p>juliana.romero699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25T19:39:00" table:style-name="ce5">
            <text:p>2026-03-25 19:39</text:p>
          </table:table-cell>
          <table:table-cell office:value-type="date" office:date-value="2026-05-10T13:55:00" table:style-name="ce6">
            <text:p>2026-05-10 13:55</text:p>
          </table:table-cell>
          <table:table-cell table:number-columns-repeated="16369"/>
        </table:table-row>
        <table:table-row table:style-name="ro1">
          <table:table-cell office:value-type="float" office:value="700" table:style-name="ce3">
            <text:p>70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13395410</text:p>
          </table:table-cell>
          <table:table-cell office:value-type="string" table:style-name="ce1">
            <text:p>Manuela Rojas Ortiz</text:p>
          </table:table-cell>
          <table:table-cell office:value-type="date" office:date-value="2005-04-04T00:00:00" table:style-name="ce4">
            <text:p>2005-04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1212950</text:p>
          </table:table-cell>
          <table:table-cell office:value-type="string" table:style-name="ce1">
            <text:p>manuela.rojas700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30T12:28:00" table:style-name="ce5">
            <text:p>2026-05-30 12:28</text:p>
          </table:table-cell>
          <table:table-cell office:value-type="date" office:date-value="2026-06-23T16:58:00" table:style-name="ce6">
            <text:p>2026-06-23 16:58</text:p>
          </table:table-cell>
          <table:table-cell table:number-columns-repeated="16369"/>
        </table:table-row>
        <table:table-row table:style-name="ro1">
          <table:table-cell office:value-type="float" office:value="701" table:style-name="ce3">
            <text:p>70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97671342</text:p>
          </table:table-cell>
          <table:table-cell office:value-type="string" table:style-name="ce1">
            <text:p>Cristian Moreno Hernández</text:p>
          </table:table-cell>
          <table:table-cell office:value-type="date" office:date-value="1992-10-20T00:00:00" table:style-name="ce4">
            <text:p>1992-10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9335502</text:p>
          </table:table-cell>
          <table:table-cell office:value-type="string" table:style-name="ce1">
            <text:p>cristian.moreno701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07T10:15:00" table:style-name="ce5">
            <text:p>2026-06-07 10:15</text:p>
          </table:table-cell>
          <table:table-cell office:value-type="date" office:date-value="2026-06-24T09:20:00" table:style-name="ce6">
            <text:p>2026-06-24 09:20</text:p>
          </table:table-cell>
          <table:table-cell table:number-columns-repeated="16369"/>
        </table:table-row>
        <table:table-row table:style-name="ro1">
          <table:table-cell office:value-type="float" office:value="702" table:style-name="ce3">
            <text:p>70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78573417</text:p>
          </table:table-cell>
          <table:table-cell office:value-type="string" table:style-name="ce1">
            <text:p>Manuela Giraldo Díaz</text:p>
          </table:table-cell>
          <table:table-cell office:value-type="date" office:date-value="2005-05-04T00:00:00" table:style-name="ce4">
            <text:p>2005-05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1223261</text:p>
          </table:table-cell>
          <table:table-cell office:value-type="string" table:style-name="ce1">
            <text:p>manuela.giraldo70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27T10:19:00" table:style-name="ce5">
            <text:p>2026-06-27 10:19</text:p>
          </table:table-cell>
          <table:table-cell office:value-type="date" office:date-value="2026-06-30T17:41:00" table:style-name="ce6">
            <text:p>2026-06-30 17:41</text:p>
          </table:table-cell>
          <table:table-cell table:number-columns-repeated="16369"/>
        </table:table-row>
        <table:table-row table:style-name="ro1">
          <table:table-cell office:value-type="float" office:value="703" table:style-name="ce3">
            <text:p>70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46958107</text:p>
          </table:table-cell>
          <table:table-cell office:value-type="string" table:style-name="ce1">
            <text:p>Jorge Rojas Torres</text:p>
          </table:table-cell>
          <table:table-cell office:value-type="date" office:date-value="1978-06-08T00:00:00" table:style-name="ce4">
            <text:p>1978-06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7244763</text:p>
          </table:table-cell>
          <table:table-cell office:value-type="string" table:style-name="ce1">
            <text:p>jorge.rojas70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7-03T05:04:00" table:style-name="ce5">
            <text:p>2026-07-03 05:04</text:p>
          </table:table-cell>
          <table:table-cell office:value-type="date" office:date-value="2026-07-04T09:17:00" table:style-name="ce6">
            <text:p>2026-07-04 09:17</text:p>
          </table:table-cell>
          <table:table-cell table:number-columns-repeated="16369"/>
        </table:table-row>
        <table:table-row table:style-name="ro1">
          <table:table-cell office:value-type="float" office:value="704" table:style-name="ce3">
            <text:p>70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55758511</text:p>
          </table:table-cell>
          <table:table-cell office:value-type="string" table:style-name="ce1">
            <text:p>Nicolás Pérez Álvarez</text:p>
          </table:table-cell>
          <table:table-cell office:value-type="date" office:date-value="1967-02-24T00:00:00" table:style-name="ce4">
            <text:p>1967-02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6307099</text:p>
          </table:table-cell>
          <table:table-cell office:value-type="string" table:style-name="ce1">
            <text:p>nicolas.perez704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6-08T15:25:00" table:style-name="ce5">
            <text:p>2026-06-08 15:25</text:p>
          </table:table-cell>
          <table:table-cell office:value-type="date" office:date-value="2026-06-10T16:35:00" table:style-name="ce6">
            <text:p>2026-06-10 16:35</text:p>
          </table:table-cell>
          <table:table-cell table:number-columns-repeated="16369"/>
        </table:table-row>
        <table:table-row table:style-name="ro1">
          <table:table-cell office:value-type="float" office:value="705" table:style-name="ce3">
            <text:p>70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62411762</text:p>
          </table:table-cell>
          <table:table-cell office:value-type="string" table:style-name="ce1">
            <text:p>Laura Muñoz Silva</text:p>
          </table:table-cell>
          <table:table-cell office:value-type="date" office:date-value="1987-11-04T00:00:00" table:style-name="ce4">
            <text:p>1987-11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6882038</text:p>
          </table:table-cell>
          <table:table-cell office:value-type="string" table:style-name="ce1">
            <text:p>laura.munoz705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12T13:03:00" table:style-name="ce5">
            <text:p>2026-04-12 13:03</text:p>
          </table:table-cell>
          <table:table-cell office:value-type="date" office:date-value="2026-06-03T07:02:00" table:style-name="ce6">
            <text:p>2026-06-03 07:02</text:p>
          </table:table-cell>
          <table:table-cell table:number-columns-repeated="16369"/>
        </table:table-row>
        <table:table-row table:style-name="ro1">
          <table:table-cell office:value-type="float" office:value="706" table:style-name="ce3">
            <text:p>70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57407077</text:p>
          </table:table-cell>
          <table:table-cell office:value-type="string" table:style-name="ce1">
            <text:p>Sebastián Carlos Torres Restrepo</text:p>
          </table:table-cell>
          <table:table-cell office:value-type="date" office:date-value="1977-10-18T00:00:00" table:style-name="ce4">
            <text:p>1977-10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9571634</text:p>
          </table:table-cell>
          <table:table-cell office:value-type="string" table:style-name="ce1">
            <text:p>sebastian.torres706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02T23:28:00" table:style-name="ce5">
            <text:p>2026-04-02 23:28</text:p>
          </table:table-cell>
          <table:table-cell office:value-type="date" office:date-value="2026-05-30T04:32:00" table:style-name="ce6">
            <text:p>2026-05-30 04:32</text:p>
          </table:table-cell>
          <table:table-cell table:number-columns-repeated="16369"/>
        </table:table-row>
        <table:table-row table:style-name="ro1">
          <table:table-cell office:value-type="float" office:value="707" table:style-name="ce3">
            <text:p>70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1600263</text:p>
          </table:table-cell>
          <table:table-cell office:value-type="string" table:style-name="ce1">
            <text:p>Carlos Ospina Díaz</text:p>
          </table:table-cell>
          <table:table-cell office:value-type="date" office:date-value="1975-07-13T00:00:00" table:style-name="ce4">
            <text:p>1975-07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6245570</text:p>
          </table:table-cell>
          <table:table-cell office:value-type="string" table:style-name="ce1">
            <text:p>carlos.ospina707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18T21:02:00" table:style-name="ce5">
            <text:p>2026-04-18 21:02</text:p>
          </table:table-cell>
          <table:table-cell office:value-type="date" office:date-value="2026-05-03T01:15:00" table:style-name="ce6">
            <text:p>2026-05-03 01:15</text:p>
          </table:table-cell>
          <table:table-cell table:number-columns-repeated="16369"/>
        </table:table-row>
        <table:table-row table:style-name="ro1">
          <table:table-cell office:value-type="float" office:value="708" table:style-name="ce3">
            <text:p>70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0083983</text:p>
          </table:table-cell>
          <table:table-cell office:value-type="string" table:style-name="ce1">
            <text:p>Natalia Ospina Vargas</text:p>
          </table:table-cell>
          <table:table-cell office:value-type="date" office:date-value="1971-10-09T00:00:00" table:style-name="ce4">
            <text:p>1971-10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8099825</text:p>
          </table:table-cell>
          <table:table-cell office:value-type="string" table:style-name="ce1">
            <text:p>natalia.ospina708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22T16:49:00" table:style-name="ce5">
            <text:p>2026-05-22 16:49</text:p>
          </table:table-cell>
          <table:table-cell office:value-type="date" office:date-value="2026-06-10T14:14:00" table:style-name="ce6">
            <text:p>2026-06-10 14:14</text:p>
          </table:table-cell>
          <table:table-cell table:number-columns-repeated="16369"/>
        </table:table-row>
        <table:table-row table:style-name="ro1">
          <table:table-cell office:value-type="float" office:value="709" table:style-name="ce3">
            <text:p>70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71193534</text:p>
          </table:table-cell>
          <table:table-cell office:value-type="string" table:style-name="ce1">
            <text:p>Tomás Díaz Silva</text:p>
          </table:table-cell>
          <table:table-cell office:value-type="date" office:date-value="1985-06-25T00:00:00" table:style-name="ce4">
            <text:p>1985-06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3364458</text:p>
          </table:table-cell>
          <table:table-cell office:value-type="string" table:style-name="ce1">
            <text:p>tomas.diaz70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3-15T23:18:00" table:style-name="ce5">
            <text:p>2026-03-15 23:18</text:p>
          </table:table-cell>
          <table:table-cell office:value-type="date" office:date-value="2026-05-31T11:41:00" table:style-name="ce6">
            <text:p>2026-05-31 11:41</text:p>
          </table:table-cell>
          <table:table-cell table:number-columns-repeated="16369"/>
        </table:table-row>
        <table:table-row table:style-name="ro1">
          <table:table-cell office:value-type="float" office:value="710" table:style-name="ce3">
            <text:p>71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55827689</text:p>
          </table:table-cell>
          <table:table-cell office:value-type="string" table:style-name="ce1">
            <text:p>Miguel Carlos Valencia Vargas</text:p>
          </table:table-cell>
          <table:table-cell office:value-type="date" office:date-value="1970-04-27T00:00:00" table:style-name="ce4">
            <text:p>1970-04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9747680</text:p>
          </table:table-cell>
          <table:table-cell office:value-type="string" table:style-name="ce1">
            <text:p>miguel.valencia710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3-11T20:42:00" table:style-name="ce5">
            <text:p>2026-03-11 20:42</text:p>
          </table:table-cell>
          <table:table-cell office:value-type="date" office:date-value="2026-03-22T16:37:00" table:style-name="ce6">
            <text:p>2026-03-22 16:37</text:p>
          </table:table-cell>
          <table:table-cell table:number-columns-repeated="16369"/>
        </table:table-row>
        <table:table-row table:style-name="ro1">
          <table:table-cell office:value-type="float" office:value="711" table:style-name="ce3">
            <text:p>711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314901013</text:p>
          </table:table-cell>
          <table:table-cell office:value-type="string" table:style-name="ce1">
            <text:p>Ricardo Castaño Muñoz</text:p>
          </table:table-cell>
          <table:table-cell office:value-type="date" office:date-value="1947-11-19T00:00:00" table:style-name="ce4">
            <text:p>1947-11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1816759</text:p>
          </table:table-cell>
          <table:table-cell office:value-type="string" table:style-name="ce1">
            <text:p>ricardo.castano71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3-16T09:53:00" table:style-name="ce5">
            <text:p>2026-03-16 09:53</text:p>
          </table:table-cell>
          <table:table-cell office:value-type="date" office:date-value="2026-03-16T10:42:00" table:style-name="ce6">
            <text:p>2026-03-16 10:42</text:p>
          </table:table-cell>
          <table:table-cell table:number-columns-repeated="16369"/>
        </table:table-row>
        <table:table-row table:style-name="ro1">
          <table:table-cell office:value-type="float" office:value="712" table:style-name="ce3">
            <text:p>71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35144093</text:p>
          </table:table-cell>
          <table:table-cell office:value-type="string" table:style-name="ce1">
            <text:p>Alejandra Quintero Cárdenas</text:p>
          </table:table-cell>
          <table:table-cell office:value-type="date" office:date-value="1955-06-22T00:00:00" table:style-name="ce4">
            <text:p>1955-06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5595216</text:p>
          </table:table-cell>
          <table:table-cell office:value-type="string" table:style-name="ce1">
            <text:p>alejandra.quintero712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3-19T15:28:00" table:style-name="ce5">
            <text:p>2026-03-19 15:28</text:p>
          </table:table-cell>
          <table:table-cell office:value-type="date" office:date-value="2026-03-25T10:06:00" table:style-name="ce6">
            <text:p>2026-03-25 10:06</text:p>
          </table:table-cell>
          <table:table-cell table:number-columns-repeated="16369"/>
        </table:table-row>
        <table:table-row table:style-name="ro1">
          <table:table-cell office:value-type="float" office:value="713" table:style-name="ce3">
            <text:p>713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925249843</text:p>
          </table:table-cell>
          <table:table-cell office:value-type="string" table:style-name="ce1">
            <text:p>Samuel Ramírez Quintero</text:p>
          </table:table-cell>
          <table:table-cell office:value-type="date" office:date-value="2010-01-28T00:00:00" table:style-name="ce4">
            <text:p>2010-01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2586137</text:p>
          </table:table-cell>
          <table:table-cell office:value-type="string" table:style-name="ce1">
            <text:p>samuel.ramirez71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19T20:38:00" table:style-name="ce5">
            <text:p>2026-06-19 20:38</text:p>
          </table:table-cell>
          <table:table-cell office:value-type="date" office:date-value="2026-07-09T15:48:00" table:style-name="ce6">
            <text:p>2026-07-09 15:48</text:p>
          </table:table-cell>
          <table:table-cell table:number-columns-repeated="16369"/>
        </table:table-row>
        <table:table-row table:style-name="ro1">
          <table:table-cell office:value-type="float" office:value="714" table:style-name="ce3">
            <text:p>71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17400836</text:p>
          </table:table-cell>
          <table:table-cell office:value-type="string" table:style-name="ce1">
            <text:p>Santiago Julián Ortiz Vargas</text:p>
          </table:table-cell>
          <table:table-cell office:value-type="date" office:date-value="1996-08-20T00:00:00" table:style-name="ce4">
            <text:p>1996-08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4829359</text:p>
          </table:table-cell>
          <table:table-cell office:value-type="string" table:style-name="ce1">
            <text:p>santiago.ortiz714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3-27T04:56:00" table:style-name="ce5">
            <text:p>2026-03-27 04:56</text:p>
          </table:table-cell>
          <table:table-cell office:value-type="date" office:date-value="2026-06-18T01:53:00" table:style-name="ce6">
            <text:p>2026-06-18 01:53</text:p>
          </table:table-cell>
          <table:table-cell table:number-columns-repeated="16369"/>
        </table:table-row>
        <table:table-row table:style-name="ro1">
          <table:table-cell office:value-type="float" office:value="715" table:style-name="ce3">
            <text:p>71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69188019</text:p>
          </table:table-cell>
          <table:table-cell office:value-type="string" table:style-name="ce1">
            <text:p>Paula Mendoza Ruiz</text:p>
          </table:table-cell>
          <table:table-cell office:value-type="date" office:date-value="1995-06-03T00:00:00" table:style-name="ce4">
            <text:p>1995-06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2792770</text:p>
          </table:table-cell>
          <table:table-cell office:value-type="string" table:style-name="ce1">
            <text:p>paula.mendoza71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12T09:46:00" table:style-name="ce5">
            <text:p>2026-06-12 09:46</text:p>
          </table:table-cell>
          <table:table-cell office:value-type="date" office:date-value="2026-06-18T11:40:00" table:style-name="ce6">
            <text:p>2026-06-18 11:40</text:p>
          </table:table-cell>
          <table:table-cell table:number-columns-repeated="16369"/>
        </table:table-row>
        <table:table-row table:style-name="ro1">
          <table:table-cell office:value-type="float" office:value="716" table:style-name="ce3">
            <text:p>71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99355621</text:p>
          </table:table-cell>
          <table:table-cell office:value-type="string" table:style-name="ce1">
            <text:p>Julián López Jiménez</text:p>
          </table:table-cell>
          <table:table-cell office:value-type="date" office:date-value="1965-01-16T00:00:00" table:style-name="ce4">
            <text:p>1965-01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2673356</text:p>
          </table:table-cell>
          <table:table-cell office:value-type="string" table:style-name="ce1">
            <text:p>julian.lopez716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06T14:24:00" table:style-name="ce5">
            <text:p>2026-05-06 14:24</text:p>
          </table:table-cell>
          <table:table-cell office:value-type="date" office:date-value="2026-05-08T18:23:00" table:style-name="ce6">
            <text:p>2026-05-08 18:23</text:p>
          </table:table-cell>
          <table:table-cell table:number-columns-repeated="16369"/>
        </table:table-row>
        <table:table-row table:style-name="ro1">
          <table:table-cell office:value-type="float" office:value="717" table:style-name="ce3">
            <text:p>717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1168477465</text:p>
          </table:table-cell>
          <table:table-cell office:value-type="string" table:style-name="ce1">
            <text:p>Alejandro Nicolás Cárdenas González</text:p>
          </table:table-cell>
          <table:table-cell office:value-type="date" office:date-value="2003-05-16T00:00:00" table:style-name="ce4">
            <text:p>2003-05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5967050</text:p>
          </table:table-cell>
          <table:table-cell office:value-type="string" table:style-name="ce1">
            <text:p>alejandro.cardenas717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15T10:46:00" table:style-name="ce5">
            <text:p>2026-05-15 10:46</text:p>
          </table:table-cell>
          <table:table-cell office:value-type="date" office:date-value="2026-06-29T09:05:00" table:style-name="ce6">
            <text:p>2026-06-29 09:05</text:p>
          </table:table-cell>
          <table:table-cell table:number-columns-repeated="16369"/>
        </table:table-row>
        <table:table-row table:style-name="ro1">
          <table:table-cell office:value-type="float" office:value="718" table:style-name="ce3">
            <text:p>71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0961043</text:p>
          </table:table-cell>
          <table:table-cell office:value-type="string" table:style-name="ce1">
            <text:p>Luisa Ramírez García</text:p>
          </table:table-cell>
          <table:table-cell office:value-type="date" office:date-value="1993-08-23T00:00:00" table:style-name="ce4">
            <text:p>1993-08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4522387</text:p>
          </table:table-cell>
          <table:table-cell office:value-type="string" table:style-name="ce1">
            <text:p>luisa.ramirez718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3-26T10:19:00" table:style-name="ce5">
            <text:p>2026-03-26 10:19</text:p>
          </table:table-cell>
          <table:table-cell office:value-type="date" office:date-value="2026-05-13T13:04:00" table:style-name="ce6">
            <text:p>2026-05-13 13:04</text:p>
          </table:table-cell>
          <table:table-cell table:number-columns-repeated="16369"/>
        </table:table-row>
        <table:table-row table:style-name="ro1">
          <table:table-cell office:value-type="float" office:value="719" table:style-name="ce3">
            <text:p>71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93123320</text:p>
          </table:table-cell>
          <table:table-cell office:value-type="string" table:style-name="ce1">
            <text:p>Juan Daniel Giraldo Rodríguez</text:p>
          </table:table-cell>
          <table:table-cell office:value-type="date" office:date-value="1993-04-09T00:00:00" table:style-name="ce4">
            <text:p>1993-04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8009753</text:p>
          </table:table-cell>
          <table:table-cell office:value-type="string" table:style-name="ce1">
            <text:p>juan.giraldo719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20T02:03:00" table:style-name="ce5">
            <text:p>2026-06-20 02:03</text:p>
          </table:table-cell>
          <table:table-cell office:value-type="date" office:date-value="2026-06-20T14:59:00" table:style-name="ce6">
            <text:p>2026-06-20 14:59</text:p>
          </table:table-cell>
          <table:table-cell table:number-columns-repeated="16369"/>
        </table:table-row>
        <table:table-row table:style-name="ro1">
          <table:table-cell office:value-type="float" office:value="720" table:style-name="ce3">
            <text:p>72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8544691</text:p>
          </table:table-cell>
          <table:table-cell office:value-type="string" table:style-name="ce1">
            <text:p>Luisa Ramírez Castro</text:p>
          </table:table-cell>
          <table:table-cell office:value-type="date" office:date-value="1947-08-05T00:00:00" table:style-name="ce4">
            <text:p>1947-08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6699831</text:p>
          </table:table-cell>
          <table:table-cell office:value-type="string" table:style-name="ce1">
            <text:p>luisa.ramirez72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26T00:57:00" table:style-name="ce5">
            <text:p>2026-04-26 00:57</text:p>
          </table:table-cell>
          <table:table-cell office:value-type="date" office:date-value="2026-06-21T22:28:00" table:style-name="ce6">
            <text:p>2026-06-21 22:28</text:p>
          </table:table-cell>
          <table:table-cell table:number-columns-repeated="16369"/>
        </table:table-row>
        <table:table-row table:style-name="ro1">
          <table:table-cell office:value-type="float" office:value="721" table:style-name="ce3">
            <text:p>72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2107571</text:p>
          </table:table-cell>
          <table:table-cell office:value-type="string" table:style-name="ce1">
            <text:p>David Ospina Ruiz</text:p>
          </table:table-cell>
          <table:table-cell office:value-type="date" office:date-value="1957-06-28T00:00:00" table:style-name="ce4">
            <text:p>1957-06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7358012</text:p>
          </table:table-cell>
          <table:table-cell office:value-type="string" table:style-name="ce1">
            <text:p>david.ospina72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11T19:31:00" table:style-name="ce5">
            <text:p>2026-05-11 19:31</text:p>
          </table:table-cell>
          <table:table-cell office:value-type="date" office:date-value="2026-06-27T13:58:00" table:style-name="ce6">
            <text:p>2026-06-27 13:58</text:p>
          </table:table-cell>
          <table:table-cell table:number-columns-repeated="16369"/>
        </table:table-row>
        <table:table-row table:style-name="ro1">
          <table:table-cell office:value-type="float" office:value="722" table:style-name="ce3">
            <text:p>72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86510352</text:p>
          </table:table-cell>
          <table:table-cell office:value-type="string" table:style-name="ce1">
            <text:p>Valentina García Ospina</text:p>
          </table:table-cell>
          <table:table-cell office:value-type="date" office:date-value="1980-08-22T00:00:00" table:style-name="ce4">
            <text:p>1980-08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9227473</text:p>
          </table:table-cell>
          <table:table-cell office:value-type="string" table:style-name="ce1">
            <text:p>valentina.garcia72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3-12T23:37:00" table:style-name="ce5">
            <text:p>2026-03-12 23:37</text:p>
          </table:table-cell>
          <table:table-cell office:value-type="date" office:date-value="2026-04-06T12:53:00" table:style-name="ce6">
            <text:p>2026-04-06 12:53</text:p>
          </table:table-cell>
          <table:table-cell table:number-columns-repeated="16369"/>
        </table:table-row>
        <table:table-row table:style-name="ro1">
          <table:table-cell office:value-type="float" office:value="723" table:style-name="ce3">
            <text:p>72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3992566</text:p>
          </table:table-cell>
          <table:table-cell office:value-type="string" table:style-name="ce1">
            <text:p>José Díaz Torres</text:p>
          </table:table-cell>
          <table:table-cell office:value-type="date" office:date-value="1992-04-26T00:00:00" table:style-name="ce4">
            <text:p>1992-04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7785610</text:p>
          </table:table-cell>
          <table:table-cell office:value-type="string" table:style-name="ce1">
            <text:p>jose.diaz72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22T23:33:00" table:style-name="ce5">
            <text:p>2026-05-22 23:33</text:p>
          </table:table-cell>
          <table:table-cell office:value-type="date" office:date-value="2026-05-25T05:02:00" table:style-name="ce6">
            <text:p>2026-05-25 05:02</text:p>
          </table:table-cell>
          <table:table-cell table:number-columns-repeated="16369"/>
        </table:table-row>
        <table:table-row table:style-name="ro1">
          <table:table-cell office:value-type="float" office:value="724" table:style-name="ce3">
            <text:p>72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90975337</text:p>
          </table:table-cell>
          <table:table-cell office:value-type="string" table:style-name="ce1">
            <text:p>Ana López Quintero</text:p>
          </table:table-cell>
          <table:table-cell office:value-type="date" office:date-value="2006-03-07T00:00:00" table:style-name="ce4">
            <text:p>2006-03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9655773</text:p>
          </table:table-cell>
          <table:table-cell office:value-type="string" table:style-name="ce1">
            <text:p>ana.lopez72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26T20:28:00" table:style-name="ce5">
            <text:p>2026-03-26 20:28</text:p>
          </table:table-cell>
          <table:table-cell office:value-type="date" office:date-value="2026-04-23T02:41:00" table:style-name="ce6">
            <text:p>2026-04-23 02:41</text:p>
          </table:table-cell>
          <table:table-cell table:number-columns-repeated="16369"/>
        </table:table-row>
        <table:table-row table:style-name="ro1">
          <table:table-cell office:value-type="float" office:value="725" table:style-name="ce3">
            <text:p>72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62368029</text:p>
          </table:table-cell>
          <table:table-cell office:value-type="string" table:style-name="ce1">
            <text:p>Samuel Andrés Ortiz Muñoz</text:p>
          </table:table-cell>
          <table:table-cell office:value-type="date" office:date-value="1969-10-26T00:00:00" table:style-name="ce4">
            <text:p>1969-10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6619195</text:p>
          </table:table-cell>
          <table:table-cell office:value-type="string" table:style-name="ce1">
            <text:p>samuel.ortiz72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3-17T13:00:00" table:style-name="ce5">
            <text:p>2026-03-17 13:00</text:p>
          </table:table-cell>
          <table:table-cell office:value-type="date" office:date-value="2026-04-03T01:29:00" table:style-name="ce6">
            <text:p>2026-04-03 01:29</text:p>
          </table:table-cell>
          <table:table-cell table:number-columns-repeated="16369"/>
        </table:table-row>
        <table:table-row table:style-name="ro1">
          <table:table-cell office:value-type="float" office:value="726" table:style-name="ce3">
            <text:p>72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0464419</text:p>
          </table:table-cell>
          <table:table-cell office:value-type="string" table:style-name="ce1">
            <text:p>Carolina García Torres</text:p>
          </table:table-cell>
          <table:table-cell office:value-type="date" office:date-value="1984-07-20T00:00:00" table:style-name="ce4">
            <text:p>1984-07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5430216</text:p>
          </table:table-cell>
          <table:table-cell office:value-type="string" table:style-name="ce1">
            <text:p>carolina.garcia726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01T22:46:00" table:style-name="ce5">
            <text:p>2026-06-01 22:46</text:p>
          </table:table-cell>
          <table:table-cell office:value-type="date" office:date-value="2026-07-07T15:45:00" table:style-name="ce6">
            <text:p>2026-07-07 15:45</text:p>
          </table:table-cell>
          <table:table-cell table:number-columns-repeated="16369"/>
        </table:table-row>
        <table:table-row table:style-name="ro1">
          <table:table-cell office:value-type="float" office:value="727" table:style-name="ce3">
            <text:p>72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75811606</text:p>
          </table:table-cell>
          <table:table-cell office:value-type="string" table:style-name="ce1">
            <text:p>Andrés Castro Rojas</text:p>
          </table:table-cell>
          <table:table-cell office:value-type="date" office:date-value="1952-09-08T00:00:00" table:style-name="ce4">
            <text:p>1952-09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8154109</text:p>
          </table:table-cell>
          <table:table-cell office:value-type="string" table:style-name="ce1">
            <text:p>andres.castro72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21T06:27:00" table:style-name="ce5">
            <text:p>2026-05-21 06:27</text:p>
          </table:table-cell>
          <table:table-cell office:value-type="date" office:date-value="2026-06-09T19:59:00" table:style-name="ce6">
            <text:p>2026-06-09 19:59</text:p>
          </table:table-cell>
          <table:table-cell table:number-columns-repeated="16369"/>
        </table:table-row>
        <table:table-row table:style-name="ro1">
          <table:table-cell office:value-type="float" office:value="728" table:style-name="ce3">
            <text:p>72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94338159</text:p>
          </table:table-cell>
          <table:table-cell office:value-type="string" table:style-name="ce1">
            <text:p>Manuela Hernández Muñoz</text:p>
          </table:table-cell>
          <table:table-cell office:value-type="date" office:date-value="1976-06-29T00:00:00" table:style-name="ce4">
            <text:p>1976-06-2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4401030</text:p>
          </table:table-cell>
          <table:table-cell office:value-type="string" table:style-name="ce1">
            <text:p>manuela.hernandez728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6-22T07:14:00" table:style-name="ce5">
            <text:p>2026-06-22 07:14</text:p>
          </table:table-cell>
          <table:table-cell office:value-type="date" office:date-value="2026-06-30T09:08:00" table:style-name="ce6">
            <text:p>2026-06-30 09:08</text:p>
          </table:table-cell>
          <table:table-cell table:number-columns-repeated="16369"/>
        </table:table-row>
        <table:table-row table:style-name="ro1">
          <table:table-cell office:value-type="float" office:value="729" table:style-name="ce3">
            <text:p>72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06771188</text:p>
          </table:table-cell>
          <table:table-cell office:value-type="string" table:style-name="ce1">
            <text:p>Alejandra Ortiz Mendoza</text:p>
          </table:table-cell>
          <table:table-cell office:value-type="date" office:date-value="1989-04-11T00:00:00" table:style-name="ce4">
            <text:p>1989-04-1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9378412</text:p>
          </table:table-cell>
          <table:table-cell office:value-type="string" table:style-name="ce1">
            <text:p>alejandra.ortiz72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20T02:38:00" table:style-name="ce5">
            <text:p>2026-04-20 02:38</text:p>
          </table:table-cell>
          <table:table-cell office:value-type="date" office:date-value="2026-05-23T14:30:00" table:style-name="ce6">
            <text:p>2026-05-23 14:30</text:p>
          </table:table-cell>
          <table:table-cell table:number-columns-repeated="16369"/>
        </table:table-row>
        <table:table-row table:style-name="ro1">
          <table:table-cell office:value-type="float" office:value="730" table:style-name="ce3">
            <text:p>73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03788717</text:p>
          </table:table-cell>
          <table:table-cell office:value-type="string" table:style-name="ce1">
            <text:p>Miguel Sánchez Ramírez</text:p>
          </table:table-cell>
          <table:table-cell office:value-type="date" office:date-value="1961-06-14T00:00:00" table:style-name="ce4">
            <text:p>1961-06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2302674</text:p>
          </table:table-cell>
          <table:table-cell office:value-type="string" table:style-name="ce1">
            <text:p>miguel.sanchez73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3-23T03:41:00" table:style-name="ce5">
            <text:p>2026-03-23 03:41</text:p>
          </table:table-cell>
          <table:table-cell office:value-type="date" office:date-value="2026-04-14T02:16:00" table:style-name="ce6">
            <text:p>2026-04-14 02:16</text:p>
          </table:table-cell>
          <table:table-cell table:number-columns-repeated="16369"/>
        </table:table-row>
        <table:table-row table:style-name="ro1">
          <table:table-cell office:value-type="float" office:value="731" table:style-name="ce3">
            <text:p>73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80528296</text:p>
          </table:table-cell>
          <table:table-cell office:value-type="string" table:style-name="ce1">
            <text:p>Laura Andrea Castro Vargas</text:p>
          </table:table-cell>
          <table:table-cell office:value-type="date" office:date-value="1987-09-06T00:00:00" table:style-name="ce4">
            <text:p>1987-09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8370569</text:p>
          </table:table-cell>
          <table:table-cell office:value-type="string" table:style-name="ce1">
            <text:p>laura.castro731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3-22T03:52:00" table:style-name="ce5">
            <text:p>2026-03-22 03:52</text:p>
          </table:table-cell>
          <table:table-cell office:value-type="date" office:date-value="2026-04-15T07:09:00" table:style-name="ce6">
            <text:p>2026-04-15 07:09</text:p>
          </table:table-cell>
          <table:table-cell table:number-columns-repeated="16369"/>
        </table:table-row>
        <table:table-row table:style-name="ro1">
          <table:table-cell office:value-type="float" office:value="732" table:style-name="ce3">
            <text:p>73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5060167</text:p>
          </table:table-cell>
          <table:table-cell office:value-type="string" table:style-name="ce1">
            <text:p>José Restrepo Quintero</text:p>
          </table:table-cell>
          <table:table-cell office:value-type="date" office:date-value="1968-03-17T00:00:00" table:style-name="ce4">
            <text:p>1968-03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9865646</text:p>
          </table:table-cell>
          <table:table-cell office:value-type="string" table:style-name="ce1">
            <text:p>jose.restrepo732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01T03:26:00" table:style-name="ce5">
            <text:p>2026-05-01 03:26</text:p>
          </table:table-cell>
          <table:table-cell office:value-type="date" office:date-value="2026-06-28T05:29:00" table:style-name="ce6">
            <text:p>2026-06-28 05:29</text:p>
          </table:table-cell>
          <table:table-cell table:number-columns-repeated="16369"/>
        </table:table-row>
        <table:table-row table:style-name="ro1">
          <table:table-cell office:value-type="float" office:value="733" table:style-name="ce3">
            <text:p>73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883087</text:p>
          </table:table-cell>
          <table:table-cell office:value-type="string" table:style-name="ce1">
            <text:p>Natalia González Jiménez</text:p>
          </table:table-cell>
          <table:table-cell office:value-type="date" office:date-value="1971-08-25T00:00:00" table:style-name="ce4">
            <text:p>1971-08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5745055</text:p>
          </table:table-cell>
          <table:table-cell office:value-type="string" table:style-name="ce1">
            <text:p>natalia.gonzalez733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30T18:14:00" table:style-name="ce5">
            <text:p>2026-04-30 18:14</text:p>
          </table:table-cell>
          <table:table-cell office:value-type="date" office:date-value="2026-06-05T11:43:00" table:style-name="ce6">
            <text:p>2026-06-05 11:43</text:p>
          </table:table-cell>
          <table:table-cell table:number-columns-repeated="16369"/>
        </table:table-row>
        <table:table-row table:style-name="ro1">
          <table:table-cell office:value-type="float" office:value="734" table:style-name="ce3">
            <text:p>73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43582293</text:p>
          </table:table-cell>
          <table:table-cell office:value-type="string" table:style-name="ce1">
            <text:p>Andrés García Hernández</text:p>
          </table:table-cell>
          <table:table-cell office:value-type="date" office:date-value="1956-07-25T00:00:00" table:style-name="ce4">
            <text:p>1956-07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9962544</text:p>
          </table:table-cell>
          <table:table-cell office:value-type="string" table:style-name="ce1">
            <text:p>andres.garcia73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08T20:47:00" table:style-name="ce5">
            <text:p>2026-06-08 20:47</text:p>
          </table:table-cell>
          <table:table-cell office:value-type="date" office:date-value="2026-07-02T21:10:00" table:style-name="ce6">
            <text:p>2026-07-02 21:10</text:p>
          </table:table-cell>
          <table:table-cell table:number-columns-repeated="16369"/>
        </table:table-row>
        <table:table-row table:style-name="ro1">
          <table:table-cell office:value-type="float" office:value="735" table:style-name="ce3">
            <text:p>73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5998214</text:p>
          </table:table-cell>
          <table:table-cell office:value-type="string" table:style-name="ce1">
            <text:p>Alejandro Díaz Mendoza</text:p>
          </table:table-cell>
          <table:table-cell office:value-type="date" office:date-value="1984-04-26T00:00:00" table:style-name="ce4">
            <text:p>1984-04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7688167</text:p>
          </table:table-cell>
          <table:table-cell office:value-type="string" table:style-name="ce1">
            <text:p>alejandro.diaz735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10T18:24:00" table:style-name="ce5">
            <text:p>2026-06-10 18:24</text:p>
          </table:table-cell>
          <table:table-cell office:value-type="date" office:date-value="2026-06-19T02:04:00" table:style-name="ce6">
            <text:p>2026-06-19 02:04</text:p>
          </table:table-cell>
          <table:table-cell table:number-columns-repeated="16369"/>
        </table:table-row>
        <table:table-row table:style-name="ro1">
          <table:table-cell office:value-type="float" office:value="736" table:style-name="ce3">
            <text:p>73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68141129</text:p>
          </table:table-cell>
          <table:table-cell office:value-type="string" table:style-name="ce1">
            <text:p>Camila Martínez Hernández</text:p>
          </table:table-cell>
          <table:table-cell office:value-type="date" office:date-value="1976-12-24T00:00:00" table:style-name="ce4">
            <text:p>1976-12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6268173</text:p>
          </table:table-cell>
          <table:table-cell office:value-type="string" table:style-name="ce1">
            <text:p>camila.martinez73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4-14T11:39:00" table:style-name="ce5">
            <text:p>2026-04-14 11:39</text:p>
          </table:table-cell>
          <table:table-cell office:value-type="date" office:date-value="2026-04-30T10:14:00" table:style-name="ce6">
            <text:p>2026-04-30 10:14</text:p>
          </table:table-cell>
          <table:table-cell table:number-columns-repeated="16369"/>
        </table:table-row>
        <table:table-row table:style-name="ro1">
          <table:table-cell office:value-type="float" office:value="737" table:style-name="ce3">
            <text:p>73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76113656</text:p>
          </table:table-cell>
          <table:table-cell office:value-type="string" table:style-name="ce1">
            <text:p>Ana Carolina Jiménez Silva</text:p>
          </table:table-cell>
          <table:table-cell office:value-type="date" office:date-value="1967-05-17T00:00:00" table:style-name="ce4">
            <text:p>1967-05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4160879</text:p>
          </table:table-cell>
          <table:table-cell office:value-type="string" table:style-name="ce1">
            <text:p>ana.jimenez737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16T03:17:00" table:style-name="ce5">
            <text:p>2026-04-16 03:17</text:p>
          </table:table-cell>
          <table:table-cell office:value-type="date" office:date-value="2026-07-07T02:42:00" table:style-name="ce6">
            <text:p>2026-07-07 02:42</text:p>
          </table:table-cell>
          <table:table-cell table:number-columns-repeated="16369"/>
        </table:table-row>
        <table:table-row table:style-name="ro1">
          <table:table-cell office:value-type="float" office:value="738" table:style-name="ce3">
            <text:p>73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59323159</text:p>
          </table:table-cell>
          <table:table-cell office:value-type="string" table:style-name="ce1">
            <text:p>Santiago Díaz Álvarez</text:p>
          </table:table-cell>
          <table:table-cell office:value-type="date" office:date-value="1989-05-26T00:00:00" table:style-name="ce4">
            <text:p>1989-05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2399189</text:p>
          </table:table-cell>
          <table:table-cell office:value-type="string" table:style-name="ce1">
            <text:p>santiago.diaz738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27T03:52:00" table:style-name="ce5">
            <text:p>2026-03-27 03:52</text:p>
          </table:table-cell>
          <table:table-cell office:value-type="date" office:date-value="2026-04-04T07:33:00" table:style-name="ce6">
            <text:p>2026-04-04 07:33</text:p>
          </table:table-cell>
          <table:table-cell table:number-columns-repeated="16369"/>
        </table:table-row>
        <table:table-row table:style-name="ro1">
          <table:table-cell office:value-type="float" office:value="739" table:style-name="ce3">
            <text:p>73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17376772</text:p>
          </table:table-cell>
          <table:table-cell office:value-type="string" table:style-name="ce1">
            <text:p>Jorge Cárdenas García</text:p>
          </table:table-cell>
          <table:table-cell office:value-type="date" office:date-value="1987-11-26T00:00:00" table:style-name="ce4">
            <text:p>1987-11-26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027074595</text:p>
          </table:table-cell>
          <table:table-cell office:value-type="string" table:style-name="ce1">
            <text:p>jorge.cardenas739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6-12T13:07:00" table:style-name="ce5">
            <text:p>2026-06-12 13:07</text:p>
          </table:table-cell>
          <table:table-cell office:value-type="date" office:date-value="2026-06-19T06:34:00" table:style-name="ce6">
            <text:p>2026-06-19 06:34</text:p>
          </table:table-cell>
          <table:table-cell table:number-columns-repeated="16369"/>
        </table:table-row>
        <table:table-row table:style-name="ro1">
          <table:table-cell office:value-type="float" office:value="740" table:style-name="ce3">
            <text:p>74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91826244</text:p>
          </table:table-cell>
          <table:table-cell office:value-type="string" table:style-name="ce1">
            <text:p>Tomás Valencia López</text:p>
          </table:table-cell>
          <table:table-cell office:value-type="date" office:date-value="1994-07-31T00:00:00" table:style-name="ce4">
            <text:p>1994-07-3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1130261</text:p>
          </table:table-cell>
          <table:table-cell office:value-type="string" table:style-name="ce1">
            <text:p>tomas.valencia740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02T00:33:00" table:style-name="ce5">
            <text:p>2026-05-02 00:33</text:p>
          </table:table-cell>
          <table:table-cell office:value-type="date" office:date-value="2026-05-29T11:53:00" table:style-name="ce6">
            <text:p>2026-05-29 11:53</text:p>
          </table:table-cell>
          <table:table-cell table:number-columns-repeated="16369"/>
        </table:table-row>
        <table:table-row table:style-name="ro1">
          <table:table-cell office:value-type="float" office:value="741" table:style-name="ce3">
            <text:p>74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1749784</text:p>
          </table:table-cell>
          <table:table-cell office:value-type="string" table:style-name="ce1">
            <text:p>Sebastián Pérez Romero</text:p>
          </table:table-cell>
          <table:table-cell office:value-type="date" office:date-value="1986-11-23T00:00:00" table:style-name="ce4">
            <text:p>1986-11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5083856</text:p>
          </table:table-cell>
          <table:table-cell office:value-type="string" table:style-name="ce1">
            <text:p>sebastian.perez741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28T06:02:00" table:style-name="ce5">
            <text:p>2026-03-28 06:02</text:p>
          </table:table-cell>
          <table:table-cell office:value-type="date" office:date-value="2026-05-08T11:08:00" table:style-name="ce6">
            <text:p>2026-05-08 11:08</text:p>
          </table:table-cell>
          <table:table-cell table:number-columns-repeated="16369"/>
        </table:table-row>
        <table:table-row table:style-name="ro1">
          <table:table-cell office:value-type="float" office:value="742" table:style-name="ce3">
            <text:p>74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08871955</text:p>
          </table:table-cell>
          <table:table-cell office:value-type="string" table:style-name="ce1">
            <text:p>Esteban Silva Jiménez</text:p>
          </table:table-cell>
          <table:table-cell office:value-type="date" office:date-value="1982-05-19T00:00:00" table:style-name="ce4">
            <text:p>1982-05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7702671</text:p>
          </table:table-cell>
          <table:table-cell office:value-type="string" table:style-name="ce1">
            <text:p>esteban.silva742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3-30T11:56:00" table:style-name="ce5">
            <text:p>2026-03-30 11:56</text:p>
          </table:table-cell>
          <table:table-cell office:value-type="date" office:date-value="2026-06-23T16:23:00" table:style-name="ce6">
            <text:p>2026-06-23 16:23</text:p>
          </table:table-cell>
          <table:table-cell table:number-columns-repeated="16369"/>
        </table:table-row>
        <table:table-row table:style-name="ro1">
          <table:table-cell office:value-type="float" office:value="743" table:style-name="ce3">
            <text:p>74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56354385</text:p>
          </table:table-cell>
          <table:table-cell office:value-type="string" table:style-name="ce1">
            <text:p>Andrés Cárdenas González</text:p>
          </table:table-cell>
          <table:table-cell office:value-type="date" office:date-value="1971-04-26T00:00:00" table:style-name="ce4">
            <text:p>1971-04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4421520</text:p>
          </table:table-cell>
          <table:table-cell office:value-type="string" table:style-name="ce1">
            <text:p>andres.cardenas74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18T22:40:00" table:style-name="ce5">
            <text:p>2026-06-18 22:40</text:p>
          </table:table-cell>
          <table:table-cell office:value-type="date" office:date-value="2026-06-22T00:12:00" table:style-name="ce6">
            <text:p>2026-06-22 00:12</text:p>
          </table:table-cell>
          <table:table-cell table:number-columns-repeated="16369"/>
        </table:table-row>
        <table:table-row table:style-name="ro1">
          <table:table-cell office:value-type="float" office:value="744" table:style-name="ce3">
            <text:p>74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39473295</text:p>
          </table:table-cell>
          <table:table-cell office:value-type="string" table:style-name="ce1">
            <text:p>Tomás González Martínez</text:p>
          </table:table-cell>
          <table:table-cell office:value-type="date" office:date-value="2003-04-16T00:00:00" table:style-name="ce4">
            <text:p>2003-04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4658222</text:p>
          </table:table-cell>
          <table:table-cell office:value-type="string" table:style-name="ce1">
            <text:p>tomas.gonzalez744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4-27T12:28:00" table:style-name="ce5">
            <text:p>2026-04-27 12:28</text:p>
          </table:table-cell>
          <table:table-cell office:value-type="date" office:date-value="2026-06-24T04:38:00" table:style-name="ce6">
            <text:p>2026-06-24 04:38</text:p>
          </table:table-cell>
          <table:table-cell table:number-columns-repeated="16369"/>
        </table:table-row>
        <table:table-row table:style-name="ro1">
          <table:table-cell office:value-type="float" office:value="745" table:style-name="ce3">
            <text:p>74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67813053</text:p>
          </table:table-cell>
          <table:table-cell office:value-type="string" table:style-name="ce1">
            <text:p>Isabella Alejandra Jiménez Valencia</text:p>
          </table:table-cell>
          <table:table-cell office:value-type="date" office:date-value="2005-05-25T00:00:00" table:style-name="ce4">
            <text:p>2005-05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8801491</text:p>
          </table:table-cell>
          <table:table-cell office:value-type="string" table:style-name="ce1">
            <text:p>isabella.jimenez745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16T10:52:00" table:style-name="ce5">
            <text:p>2026-05-16 10:52</text:p>
          </table:table-cell>
          <table:table-cell office:value-type="date" office:date-value="2026-06-27T10:04:00" table:style-name="ce6">
            <text:p>2026-06-27 10:04</text:p>
          </table:table-cell>
          <table:table-cell table:number-columns-repeated="16369"/>
        </table:table-row>
        <table:table-row table:style-name="ro1">
          <table:table-cell office:value-type="float" office:value="746" table:style-name="ce3">
            <text:p>74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02965</text:p>
          </table:table-cell>
          <table:table-cell office:value-type="string" table:style-name="ce1">
            <text:p>Diana Ortiz Ospina</text:p>
          </table:table-cell>
          <table:table-cell office:value-type="date" office:date-value="2005-09-25T00:00:00" table:style-name="ce4">
            <text:p>2005-09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2251055</text:p>
          </table:table-cell>
          <table:table-cell office:value-type="string" table:style-name="ce1">
            <text:p>diana.ortiz74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6-19T12:06:00" table:style-name="ce5">
            <text:p>2026-06-19 12:06</text:p>
          </table:table-cell>
          <table:table-cell office:value-type="date" office:date-value="2026-07-08T02:27:00" table:style-name="ce6">
            <text:p>2026-07-08 02:27</text:p>
          </table:table-cell>
          <table:table-cell table:number-columns-repeated="16369"/>
        </table:table-row>
        <table:table-row table:style-name="ro1">
          <table:table-cell office:value-type="float" office:value="747" table:style-name="ce3">
            <text:p>74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89766626</text:p>
          </table:table-cell>
          <table:table-cell office:value-type="string" table:style-name="ce1">
            <text:p>Miguel Álvarez Romero</text:p>
          </table:table-cell>
          <table:table-cell office:value-type="date" office:date-value="1986-04-15T00:00:00" table:style-name="ce4">
            <text:p>1986-04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7156464</text:p>
          </table:table-cell>
          <table:table-cell office:value-type="string" table:style-name="ce1">
            <text:p>miguel.alvarez747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07T10:43:00" table:style-name="ce5">
            <text:p>2026-04-07 10:43</text:p>
          </table:table-cell>
          <table:table-cell office:value-type="date" office:date-value="2026-05-09T19:16:00" table:style-name="ce6">
            <text:p>2026-05-09 19:16</text:p>
          </table:table-cell>
          <table:table-cell table:number-columns-repeated="16369"/>
        </table:table-row>
        <table:table-row table:style-name="ro1">
          <table:table-cell office:value-type="float" office:value="748" table:style-name="ce3">
            <text:p>74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42847127</text:p>
          </table:table-cell>
          <table:table-cell office:value-type="string" table:style-name="ce1">
            <text:p>Isabella Cárdenas Silva</text:p>
          </table:table-cell>
          <table:table-cell office:value-type="date" office:date-value="1987-02-27T00:00:00" table:style-name="ce4">
            <text:p>1987-02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9267920</text:p>
          </table:table-cell>
          <table:table-cell office:value-type="string" table:style-name="ce1">
            <text:p>isabella.cardenas748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6-25T22:26:00" table:style-name="ce5">
            <text:p>2026-06-25 22:26</text:p>
          </table:table-cell>
          <table:table-cell office:value-type="date" office:date-value="2026-07-06T21:24:00" table:style-name="ce6">
            <text:p>2026-07-06 21:24</text:p>
          </table:table-cell>
          <table:table-cell table:number-columns-repeated="16369"/>
        </table:table-row>
        <table:table-row table:style-name="ro1">
          <table:table-cell office:value-type="float" office:value="749" table:style-name="ce3">
            <text:p>74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0131908</text:p>
          </table:table-cell>
          <table:table-cell office:value-type="string" table:style-name="ce1">
            <text:p>José Torres Muñoz</text:p>
          </table:table-cell>
          <table:table-cell office:value-type="date" office:date-value="1974-03-17T00:00:00" table:style-name="ce4">
            <text:p>1974-03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3967674</text:p>
          </table:table-cell>
          <table:table-cell office:value-type="string" table:style-name="ce1">
            <text:p>jose.torres749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5-24T12:18:00" table:style-name="ce5">
            <text:p>2026-05-24 12:18</text:p>
          </table:table-cell>
          <table:table-cell office:value-type="date" office:date-value="2026-06-02T13:19:00" table:style-name="ce6">
            <text:p>2026-06-02 13:19</text:p>
          </table:table-cell>
          <table:table-cell table:number-columns-repeated="16369"/>
        </table:table-row>
        <table:table-row table:style-name="ro1">
          <table:table-cell office:value-type="float" office:value="750" table:style-name="ce3">
            <text:p>75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6026554</text:p>
          </table:table-cell>
          <table:table-cell office:value-type="string" table:style-name="ce1">
            <text:p>Sara Carolina Cárdenas Moreno</text:p>
          </table:table-cell>
          <table:table-cell office:value-type="date" office:date-value="1965-12-15T00:00:00" table:style-name="ce4">
            <text:p>1965-12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6847580</text:p>
          </table:table-cell>
          <table:table-cell office:value-type="string" table:style-name="ce1">
            <text:p>sara.cardenas75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14T00:33:00" table:style-name="ce5">
            <text:p>2026-03-14 00:33</text:p>
          </table:table-cell>
          <table:table-cell office:value-type="date" office:date-value="2026-03-20T01:31:00" table:style-name="ce6">
            <text:p>2026-03-20 01:31</text:p>
          </table:table-cell>
          <table:table-cell table:number-columns-repeated="16369"/>
        </table:table-row>
        <table:table-row table:style-name="ro1">
          <table:table-cell office:value-type="float" office:value="751" table:style-name="ce3">
            <text:p>751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121290928</text:p>
          </table:table-cell>
          <table:table-cell office:value-type="string" table:style-name="ce1">
            <text:p>Manuela Ruiz Díaz</text:p>
          </table:table-cell>
          <table:table-cell office:value-type="date" office:date-value="2017-02-09T00:00:00" table:style-name="ce4">
            <text:p>2017-02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1875845</text:p>
          </table:table-cell>
          <table:table-cell office:value-type="string" table:style-name="ce1">
            <text:p>manuela.ruiz75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4-02T11:51:00" table:style-name="ce5">
            <text:p>2026-04-02 11:51</text:p>
          </table:table-cell>
          <table:table-cell office:value-type="date" office:date-value="2026-06-29T19:51:00" table:style-name="ce6">
            <text:p>2026-06-29 19:51</text:p>
          </table:table-cell>
          <table:table-cell table:number-columns-repeated="16369"/>
        </table:table-row>
        <table:table-row table:style-name="ro1">
          <table:table-cell office:value-type="float" office:value="752" table:style-name="ce3">
            <text:p>75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63340127</text:p>
          </table:table-cell>
          <table:table-cell office:value-type="string" table:style-name="ce1">
            <text:p>Juliana Cárdenas Ospina</text:p>
          </table:table-cell>
          <table:table-cell office:value-type="date" office:date-value="2006-04-27T00:00:00" table:style-name="ce4">
            <text:p>2006-04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7204696</text:p>
          </table:table-cell>
          <table:table-cell office:value-type="string" table:style-name="ce1">
            <text:p>juliana.cardenas75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6-10T00:54:00" table:style-name="ce5">
            <text:p>2026-06-10 00:54</text:p>
          </table:table-cell>
          <table:table-cell office:value-type="date" office:date-value="2026-06-29T08:22:00" table:style-name="ce6">
            <text:p>2026-06-29 08:22</text:p>
          </table:table-cell>
          <table:table-cell table:number-columns-repeated="16369"/>
        </table:table-row>
        <table:table-row table:style-name="ro1">
          <table:table-cell office:value-type="float" office:value="753" table:style-name="ce3">
            <text:p>75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8461839</text:p>
          </table:table-cell>
          <table:table-cell office:value-type="string" table:style-name="ce1">
            <text:p>Gabriela Carolina Silva López</text:p>
          </table:table-cell>
          <table:table-cell office:value-type="date" office:date-value="1946-04-23T00:00:00" table:style-name="ce4">
            <text:p>1946-04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5603704</text:p>
          </table:table-cell>
          <table:table-cell office:value-type="string" table:style-name="ce1">
            <text:p>gabriela.silva75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20T09:15:00" table:style-name="ce5">
            <text:p>2026-06-20 09:15</text:p>
          </table:table-cell>
          <table:table-cell office:value-type="date" office:date-value="2026-07-06T03:20:00" table:style-name="ce6">
            <text:p>2026-07-06 03:20</text:p>
          </table:table-cell>
          <table:table-cell table:number-columns-repeated="16369"/>
        </table:table-row>
        <table:table-row table:style-name="ro1">
          <table:table-cell office:value-type="float" office:value="754" table:style-name="ce3">
            <text:p>75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1663695</text:p>
          </table:table-cell>
          <table:table-cell office:value-type="string" table:style-name="ce1">
            <text:p>Isabella Hernández Rojas</text:p>
          </table:table-cell>
          <table:table-cell office:value-type="date" office:date-value="1987-04-02T00:00:00" table:style-name="ce4">
            <text:p>1987-04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3902328</text:p>
          </table:table-cell>
          <table:table-cell office:value-type="string" table:style-name="ce1">
            <text:p>isabella.hernandez75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3-17T07:32:00" table:style-name="ce5">
            <text:p>2026-03-17 07:32</text:p>
          </table:table-cell>
          <table:table-cell office:value-type="date" office:date-value="2026-06-17T20:16:00" table:style-name="ce6">
            <text:p>2026-06-17 20:16</text:p>
          </table:table-cell>
          <table:table-cell table:number-columns-repeated="16369"/>
        </table:table-row>
        <table:table-row table:style-name="ro1">
          <table:table-cell office:value-type="float" office:value="755" table:style-name="ce3">
            <text:p>75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0077281</text:p>
          </table:table-cell>
          <table:table-cell office:value-type="string" table:style-name="ce1">
            <text:p>Julián Ospina Cárdenas</text:p>
          </table:table-cell>
          <table:table-cell office:value-type="date" office:date-value="1955-11-09T00:00:00" table:style-name="ce4">
            <text:p>1955-11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1514649</text:p>
          </table:table-cell>
          <table:table-cell office:value-type="string" table:style-name="ce1">
            <text:p>julian.ospina755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28T22:41:00" table:style-name="ce5">
            <text:p>2026-03-28 22:41</text:p>
          </table:table-cell>
          <table:table-cell office:value-type="date" office:date-value="2026-06-20T20:21:00" table:style-name="ce6">
            <text:p>2026-06-20 20:21</text:p>
          </table:table-cell>
          <table:table-cell table:number-columns-repeated="16369"/>
        </table:table-row>
        <table:table-row table:style-name="ro1">
          <table:table-cell office:value-type="float" office:value="756" table:style-name="ce3">
            <text:p>75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3686581</text:p>
          </table:table-cell>
          <table:table-cell office:value-type="string" table:style-name="ce1">
            <text:p>Jorge Vargas Torres</text:p>
          </table:table-cell>
          <table:table-cell office:value-type="date" office:date-value="1990-06-04T00:00:00" table:style-name="ce4">
            <text:p>1990-06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3833871</text:p>
          </table:table-cell>
          <table:table-cell office:value-type="string" table:style-name="ce1">
            <text:p>jorge.vargas75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10T09:41:00" table:style-name="ce5">
            <text:p>2026-06-10 09:41</text:p>
          </table:table-cell>
          <table:table-cell office:value-type="date" office:date-value="2026-06-25T02:31:00" table:style-name="ce6">
            <text:p>2026-06-25 02:31</text:p>
          </table:table-cell>
          <table:table-cell table:number-columns-repeated="16369"/>
        </table:table-row>
        <table:table-row table:style-name="ro1">
          <table:table-cell office:value-type="float" office:value="757" table:style-name="ce3">
            <text:p>75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71855380</text:p>
          </table:table-cell>
          <table:table-cell office:value-type="string" table:style-name="ce1">
            <text:p>Andrés Ramírez Rodríguez</text:p>
          </table:table-cell>
          <table:table-cell office:value-type="date" office:date-value="1996-01-03T00:00:00" table:style-name="ce4">
            <text:p>1996-01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9485845</text:p>
          </table:table-cell>
          <table:table-cell office:value-type="string" table:style-name="ce1">
            <text:p>andres.ramirez75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11T03:03:00" table:style-name="ce5">
            <text:p>2026-06-11 03:03</text:p>
          </table:table-cell>
          <table:table-cell office:value-type="date" office:date-value="2026-07-02T21:55:00" table:style-name="ce6">
            <text:p>2026-07-02 21:55</text:p>
          </table:table-cell>
          <table:table-cell table:number-columns-repeated="16369"/>
        </table:table-row>
        <table:table-row table:style-name="ro1">
          <table:table-cell office:value-type="float" office:value="758" table:style-name="ce3">
            <text:p>75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20615903</text:p>
          </table:table-cell>
          <table:table-cell office:value-type="string" table:style-name="ce1">
            <text:p>Samuel Sánchez Jiménez</text:p>
          </table:table-cell>
          <table:table-cell office:value-type="date" office:date-value="1956-07-10T00:00:00" table:style-name="ce4">
            <text:p>1956-07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1727015</text:p>
          </table:table-cell>
          <table:table-cell office:value-type="string" table:style-name="ce1">
            <text:p>samuel.sanchez75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16T04:32:00" table:style-name="ce5">
            <text:p>2026-05-16 04:32</text:p>
          </table:table-cell>
          <table:table-cell office:value-type="date" office:date-value="2026-05-18T12:17:00" table:style-name="ce6">
            <text:p>2026-05-18 12:17</text:p>
          </table:table-cell>
          <table:table-cell table:number-columns-repeated="16369"/>
        </table:table-row>
        <table:table-row table:style-name="ro1">
          <table:table-cell office:value-type="float" office:value="759" table:style-name="ce3">
            <text:p>75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559011</text:p>
          </table:table-cell>
          <table:table-cell office:value-type="string" table:style-name="ce1">
            <text:p>Julián Mendoza Giraldo</text:p>
          </table:table-cell>
          <table:table-cell office:value-type="date" office:date-value="1951-10-30T00:00:00" table:style-name="ce4">
            <text:p>1951-10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1437184</text:p>
          </table:table-cell>
          <table:table-cell office:value-type="string" table:style-name="ce1">
            <text:p>julian.mendoza759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7-07T01:49:00" table:style-name="ce5">
            <text:p>2026-07-07 01:49</text:p>
          </table:table-cell>
          <table:table-cell office:value-type="date" office:date-value="2026-07-07T14:18:00" table:style-name="ce6">
            <text:p>2026-07-07 14:18</text:p>
          </table:table-cell>
          <table:table-cell table:number-columns-repeated="16369"/>
        </table:table-row>
        <table:table-row table:style-name="ro1">
          <table:table-cell office:value-type="float" office:value="760" table:style-name="ce3">
            <text:p>76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95108372</text:p>
          </table:table-cell>
          <table:table-cell office:value-type="string" table:style-name="ce1">
            <text:p>Esteban Giraldo Hernández</text:p>
          </table:table-cell>
          <table:table-cell office:value-type="date" office:date-value="1981-11-19T00:00:00" table:style-name="ce4">
            <text:p>1981-11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2249295</text:p>
          </table:table-cell>
          <table:table-cell office:value-type="string" table:style-name="ce1">
            <text:p>esteban.giraldo760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3-20T07:54:00" table:style-name="ce5">
            <text:p>2026-03-20 07:54</text:p>
          </table:table-cell>
          <table:table-cell office:value-type="date" office:date-value="2026-03-30T21:05:00" table:style-name="ce6">
            <text:p>2026-03-30 21:05</text:p>
          </table:table-cell>
          <table:table-cell table:number-columns-repeated="16369"/>
        </table:table-row>
        <table:table-row table:style-name="ro1">
          <table:table-cell office:value-type="float" office:value="761" table:style-name="ce3">
            <text:p>761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775074064</text:p>
          </table:table-cell>
          <table:table-cell office:value-type="string" table:style-name="ce1">
            <text:p>Camila Muñoz Hernández</text:p>
          </table:table-cell>
          <table:table-cell office:value-type="date" office:date-value="2009-01-21T00:00:00" table:style-name="ce4">
            <text:p>2009-01-2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9799008</text:p>
          </table:table-cell>
          <table:table-cell office:value-type="string" table:style-name="ce1">
            <text:p>camila.munoz761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31T19:11:00" table:style-name="ce5">
            <text:p>2026-05-31 19:11</text:p>
          </table:table-cell>
          <table:table-cell office:value-type="date" office:date-value="2026-06-19T11:26:00" table:style-name="ce6">
            <text:p>2026-06-19 11:26</text:p>
          </table:table-cell>
          <table:table-cell table:number-columns-repeated="16369"/>
        </table:table-row>
        <table:table-row table:style-name="ro1">
          <table:table-cell office:value-type="float" office:value="762" table:style-name="ce3">
            <text:p>76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441260463</text:p>
          </table:table-cell>
          <table:table-cell office:value-type="string" table:style-name="ce1">
            <text:p>Andrés Cárdenas Rodríguez</text:p>
          </table:table-cell>
          <table:table-cell office:value-type="date" office:date-value="2024-01-19T00:00:00" table:style-name="ce4">
            <text:p>2024-01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9527521</text:p>
          </table:table-cell>
          <table:table-cell office:value-type="string" table:style-name="ce1">
            <text:p>andres.cardenas76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7-09T12:31:00" table:style-name="ce5">
            <text:p>2026-07-09 12:31</text:p>
          </table:table-cell>
          <table:table-cell office:value-type="date" office:date-value="2026-07-10T00:27:00" table:style-name="ce6">
            <text:p>2026-07-10 00:27</text:p>
          </table:table-cell>
          <table:table-cell table:number-columns-repeated="16369"/>
        </table:table-row>
        <table:table-row table:style-name="ro1">
          <table:table-cell office:value-type="float" office:value="763" table:style-name="ce3">
            <text:p>76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79146378</text:p>
          </table:table-cell>
          <table:table-cell office:value-type="string" table:style-name="ce1">
            <text:p>Ricardo Valencia Torres</text:p>
          </table:table-cell>
          <table:table-cell office:value-type="date" office:date-value="2000-01-14T00:00:00" table:style-name="ce4">
            <text:p>2000-01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4062321</text:p>
          </table:table-cell>
          <table:table-cell office:value-type="string" table:style-name="ce1">
            <text:p>ricardo.valencia763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28T14:01:00" table:style-name="ce5">
            <text:p>2026-03-28 14:01</text:p>
          </table:table-cell>
          <table:table-cell office:value-type="date" office:date-value="2026-07-04T19:04:00" table:style-name="ce6">
            <text:p>2026-07-04 19:04</text:p>
          </table:table-cell>
          <table:table-cell table:number-columns-repeated="16369"/>
        </table:table-row>
        <table:table-row table:style-name="ro1">
          <table:table-cell office:value-type="float" office:value="764" table:style-name="ce3">
            <text:p>764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884346435</text:p>
          </table:table-cell>
          <table:table-cell office:value-type="string" table:style-name="ce1">
            <text:p>Valentina Vargas Ortiz</text:p>
          </table:table-cell>
          <table:table-cell office:value-type="date" office:date-value="1960-06-09T00:00:00" table:style-name="ce4">
            <text:p>1960-06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8941561</text:p>
          </table:table-cell>
          <table:table-cell office:value-type="string" table:style-name="ce1">
            <text:p>valentina.vargas76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21T05:42:00" table:style-name="ce5">
            <text:p>2026-05-21 05:42</text:p>
          </table:table-cell>
          <table:table-cell office:value-type="date" office:date-value="2026-06-08T23:16:00" table:style-name="ce6">
            <text:p>2026-06-08 23:16</text:p>
          </table:table-cell>
          <table:table-cell table:number-columns-repeated="16369"/>
        </table:table-row>
        <table:table-row table:style-name="ro1">
          <table:table-cell office:value-type="float" office:value="765" table:style-name="ce3">
            <text:p>76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2808247</text:p>
          </table:table-cell>
          <table:table-cell office:value-type="string" table:style-name="ce1">
            <text:p>Mateo Samuel Hernández Mendoza</text:p>
          </table:table-cell>
          <table:table-cell office:value-type="date" office:date-value="1979-09-20T00:00:00" table:style-name="ce4">
            <text:p>1979-09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5192452</text:p>
          </table:table-cell>
          <table:table-cell office:value-type="string" table:style-name="ce1">
            <text:p>mateo.hernandez765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11T16:48:00" table:style-name="ce5">
            <text:p>2026-03-11 16:48</text:p>
          </table:table-cell>
          <table:table-cell office:value-type="date" office:date-value="2026-05-14T08:43:00" table:style-name="ce6">
            <text:p>2026-05-14 08:43</text:p>
          </table:table-cell>
          <table:table-cell table:number-columns-repeated="16369"/>
        </table:table-row>
        <table:table-row table:style-name="ro1">
          <table:table-cell office:value-type="float" office:value="766" table:style-name="ce3">
            <text:p>76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60872492</text:p>
          </table:table-cell>
          <table:table-cell office:value-type="string" table:style-name="ce1">
            <text:p>Daniela Camila Giraldo Ramírez</text:p>
          </table:table-cell>
          <table:table-cell office:value-type="date" office:date-value="1990-02-22T00:00:00" table:style-name="ce4">
            <text:p>1990-02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5682397</text:p>
          </table:table-cell>
          <table:table-cell office:value-type="string" table:style-name="ce1">
            <text:p>daniela.giraldo76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01T15:49:00" table:style-name="ce5">
            <text:p>2026-05-01 15:49</text:p>
          </table:table-cell>
          <table:table-cell office:value-type="date" office:date-value="2026-05-07T05:00:00" table:style-name="ce6">
            <text:p>2026-05-07 05:00</text:p>
          </table:table-cell>
          <table:table-cell table:number-columns-repeated="16369"/>
        </table:table-row>
        <table:table-row table:style-name="ro1">
          <table:table-cell office:value-type="float" office:value="767" table:style-name="ce3">
            <text:p>76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452688</text:p>
          </table:table-cell>
          <table:table-cell office:value-type="string" table:style-name="ce1">
            <text:p>Julián Romero Martínez</text:p>
          </table:table-cell>
          <table:table-cell office:value-type="date" office:date-value="1988-07-09T00:00:00" table:style-name="ce4">
            <text:p>1988-07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1385040</text:p>
          </table:table-cell>
          <table:table-cell office:value-type="string" table:style-name="ce1">
            <text:p>julian.romero767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3-21T02:16:00" table:style-name="ce5">
            <text:p>2026-03-21 02:16</text:p>
          </table:table-cell>
          <table:table-cell office:value-type="date" office:date-value="2026-05-06T04:06:00" table:style-name="ce6">
            <text:p>2026-05-06 04:06</text:p>
          </table:table-cell>
          <table:table-cell table:number-columns-repeated="16369"/>
        </table:table-row>
        <table:table-row table:style-name="ro1">
          <table:table-cell office:value-type="float" office:value="768" table:style-name="ce3">
            <text:p>76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4704775</text:p>
          </table:table-cell>
          <table:table-cell office:value-type="string" table:style-name="ce1">
            <text:p>Sebastián Nicolás Romero Cárdenas</text:p>
          </table:table-cell>
          <table:table-cell office:value-type="date" office:date-value="1967-06-26T00:00:00" table:style-name="ce4">
            <text:p>1967-06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1174950</text:p>
          </table:table-cell>
          <table:table-cell office:value-type="string" table:style-name="ce1">
            <text:p>sebastian.romero768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14T00:51:00" table:style-name="ce5">
            <text:p>2026-05-14 00:51</text:p>
          </table:table-cell>
          <table:table-cell office:value-type="date" office:date-value="2026-06-09T10:56:00" table:style-name="ce6">
            <text:p>2026-06-09 10:56</text:p>
          </table:table-cell>
          <table:table-cell table:number-columns-repeated="16369"/>
        </table:table-row>
        <table:table-row table:style-name="ro1">
          <table:table-cell office:value-type="float" office:value="769" table:style-name="ce3">
            <text:p>76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024657</text:p>
          </table:table-cell>
          <table:table-cell office:value-type="string" table:style-name="ce1">
            <text:p>Tomás Pérez Silva</text:p>
          </table:table-cell>
          <table:table-cell office:value-type="date" office:date-value="1963-08-30T00:00:00" table:style-name="ce4">
            <text:p>1963-08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9967985</text:p>
          </table:table-cell>
          <table:table-cell office:value-type="string" table:style-name="ce1">
            <text:p>tomas.perez769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4-17T21:59:00" table:style-name="ce5">
            <text:p>2026-04-17 21:59</text:p>
          </table:table-cell>
          <table:table-cell office:value-type="date" office:date-value="2026-06-27T07:28:00" table:style-name="ce6">
            <text:p>2026-06-27 07:28</text:p>
          </table:table-cell>
          <table:table-cell table:number-columns-repeated="16369"/>
        </table:table-row>
        <table:table-row table:style-name="ro1">
          <table:table-cell office:value-type="float" office:value="770" table:style-name="ce3">
            <text:p>77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31052203</text:p>
          </table:table-cell>
          <table:table-cell office:value-type="string" table:style-name="ce1">
            <text:p>Sara Cárdenas Vargas</text:p>
          </table:table-cell>
          <table:table-cell office:value-type="date" office:date-value="1984-05-04T00:00:00" table:style-name="ce4">
            <text:p>1984-05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8259538</text:p>
          </table:table-cell>
          <table:table-cell office:value-type="string" table:style-name="ce1">
            <text:p>sara.cardenas770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05T21:05:00" table:style-name="ce5">
            <text:p>2026-06-05 21:05</text:p>
          </table:table-cell>
          <table:table-cell office:value-type="date" office:date-value="2026-06-06T19:12:00" table:style-name="ce6">
            <text:p>2026-06-06 19:12</text:p>
          </table:table-cell>
          <table:table-cell table:number-columns-repeated="16369"/>
        </table:table-row>
        <table:table-row table:style-name="ro1">
          <table:table-cell office:value-type="float" office:value="771" table:style-name="ce3">
            <text:p>77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5911955</text:p>
          </table:table-cell>
          <table:table-cell office:value-type="string" table:style-name="ce1">
            <text:p>Andrea Hernández Ramírez</text:p>
          </table:table-cell>
          <table:table-cell office:value-type="date" office:date-value="1983-10-31T00:00:00" table:style-name="ce4">
            <text:p>1983-10-3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9904018</text:p>
          </table:table-cell>
          <table:table-cell office:value-type="string" table:style-name="ce1">
            <text:p>andrea.hernandez771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05T00:48:00" table:style-name="ce5">
            <text:p>2026-04-05 00:48</text:p>
          </table:table-cell>
          <table:table-cell office:value-type="date" office:date-value="2026-04-13T19:55:00" table:style-name="ce6">
            <text:p>2026-04-13 19:55</text:p>
          </table:table-cell>
          <table:table-cell table:number-columns-repeated="16369"/>
        </table:table-row>
        <table:table-row table:style-name="ro1">
          <table:table-cell office:value-type="float" office:value="772" table:style-name="ce3">
            <text:p>77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86111946</text:p>
          </table:table-cell>
          <table:table-cell office:value-type="string" table:style-name="ce1">
            <text:p>Cristian Felipe Rodríguez Ospina</text:p>
          </table:table-cell>
          <table:table-cell office:value-type="date" office:date-value="1946-02-26T00:00:00" table:style-name="ce4">
            <text:p>1946-02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1094877</text:p>
          </table:table-cell>
          <table:table-cell office:value-type="string" table:style-name="ce1">
            <text:p>cristian.rodriguez77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27T15:03:00" table:style-name="ce5">
            <text:p>2026-06-27 15:03</text:p>
          </table:table-cell>
          <table:table-cell office:value-type="date" office:date-value="2026-07-06T22:07:00" table:style-name="ce6">
            <text:p>2026-07-06 22:07</text:p>
          </table:table-cell>
          <table:table-cell table:number-columns-repeated="16369"/>
        </table:table-row>
        <table:table-row table:style-name="ro1">
          <table:table-cell office:value-type="float" office:value="773" table:style-name="ce3">
            <text:p>77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259129</text:p>
          </table:table-cell>
          <table:table-cell office:value-type="string" table:style-name="ce1">
            <text:p>Esteban Muñoz Ortiz</text:p>
          </table:table-cell>
          <table:table-cell office:value-type="date" office:date-value="2007-12-17T00:00:00" table:style-name="ce4">
            <text:p>2007-12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3365082</text:p>
          </table:table-cell>
          <table:table-cell office:value-type="string" table:style-name="ce1">
            <text:p>esteban.munoz77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14T11:07:00" table:style-name="ce5">
            <text:p>2026-05-14 11:07</text:p>
          </table:table-cell>
          <table:table-cell office:value-type="date" office:date-value="2026-06-23T10:51:00" table:style-name="ce6">
            <text:p>2026-06-23 10:51</text:p>
          </table:table-cell>
          <table:table-cell table:number-columns-repeated="16369"/>
        </table:table-row>
        <table:table-row table:style-name="ro1">
          <table:table-cell office:value-type="float" office:value="774" table:style-name="ce3">
            <text:p>77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03238774</text:p>
          </table:table-cell>
          <table:table-cell office:value-type="string" table:style-name="ce1">
            <text:p>Paula Sara Ospina Torres</text:p>
          </table:table-cell>
          <table:table-cell office:value-type="date" office:date-value="1998-10-06T00:00:00" table:style-name="ce4">
            <text:p>1998-10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3621511</text:p>
          </table:table-cell>
          <table:table-cell office:value-type="string" table:style-name="ce1">
            <text:p>paula.ospina774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3-28T10:15:00" table:style-name="ce5">
            <text:p>2026-03-28 10:15</text:p>
          </table:table-cell>
          <table:table-cell office:value-type="date" office:date-value="2026-06-12T22:22:00" table:style-name="ce6">
            <text:p>2026-06-12 22:22</text:p>
          </table:table-cell>
          <table:table-cell table:number-columns-repeated="16369"/>
        </table:table-row>
        <table:table-row table:style-name="ro1">
          <table:table-cell office:value-type="float" office:value="775" table:style-name="ce3">
            <text:p>775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219539215</text:p>
          </table:table-cell>
          <table:table-cell office:value-type="string" table:style-name="ce1">
            <text:p>Ricardo Rojas Álvarez</text:p>
          </table:table-cell>
          <table:table-cell office:value-type="date" office:date-value="2018-07-08T00:00:00" table:style-name="ce4">
            <text:p>2018-07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3568355</text:p>
          </table:table-cell>
          <table:table-cell office:value-type="string" table:style-name="ce1">
            <text:p>ricardo.rojas775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11T10:04:00" table:style-name="ce5">
            <text:p>2026-04-11 10:04</text:p>
          </table:table-cell>
          <table:table-cell office:value-type="date" office:date-value="2026-04-18T10:36:00" table:style-name="ce6">
            <text:p>2026-04-18 10:36</text:p>
          </table:table-cell>
          <table:table-cell table:number-columns-repeated="16369"/>
        </table:table-row>
        <table:table-row table:style-name="ro1">
          <table:table-cell office:value-type="float" office:value="776" table:style-name="ce3">
            <text:p>77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78326187</text:p>
          </table:table-cell>
          <table:table-cell office:value-type="string" table:style-name="ce1">
            <text:p>Luisa Valencia Castaño</text:p>
          </table:table-cell>
          <table:table-cell office:value-type="date" office:date-value="1973-11-05T00:00:00" table:style-name="ce4">
            <text:p>1973-11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7719609</text:p>
          </table:table-cell>
          <table:table-cell office:value-type="string" table:style-name="ce1">
            <text:p>luisa.valencia776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7-02T23:54:00" table:style-name="ce5">
            <text:p>2026-07-02 23:54</text:p>
          </table:table-cell>
          <table:table-cell office:value-type="date" office:date-value="2026-07-04T18:46:00" table:style-name="ce6">
            <text:p>2026-07-04 18:46</text:p>
          </table:table-cell>
          <table:table-cell table:number-columns-repeated="16369"/>
        </table:table-row>
        <table:table-row table:style-name="ro1">
          <table:table-cell office:value-type="float" office:value="777" table:style-name="ce3">
            <text:p>777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607802714</text:p>
          </table:table-cell>
          <table:table-cell office:value-type="string" table:style-name="ce1">
            <text:p>Gabriela María Torres Ramírez</text:p>
          </table:table-cell>
          <table:table-cell office:value-type="date" office:date-value="1990-05-28T00:00:00" table:style-name="ce4">
            <text:p>1990-05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1334571</text:p>
          </table:table-cell>
          <table:table-cell office:value-type="string" table:style-name="ce1">
            <text:p>gabriela.torres77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14T23:51:00" table:style-name="ce5">
            <text:p>2026-04-14 23:51</text:p>
          </table:table-cell>
          <table:table-cell office:value-type="date" office:date-value="2026-04-29T04:19:00" table:style-name="ce6">
            <text:p>2026-04-29 04:19</text:p>
          </table:table-cell>
          <table:table-cell table:number-columns-repeated="16369"/>
        </table:table-row>
        <table:table-row table:style-name="ro1">
          <table:table-cell office:value-type="float" office:value="778" table:style-name="ce3">
            <text:p>77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57769373</text:p>
          </table:table-cell>
          <table:table-cell office:value-type="string" table:style-name="ce1">
            <text:p>Esteban Cárdenas Castaño</text:p>
          </table:table-cell>
          <table:table-cell office:value-type="date" office:date-value="2005-09-01T00:00:00" table:style-name="ce4">
            <text:p>2005-09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6960917</text:p>
          </table:table-cell>
          <table:table-cell office:value-type="string" table:style-name="ce1">
            <text:p>esteban.cardenas77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4-30T22:55:00" table:style-name="ce5">
            <text:p>2026-04-30 22:55</text:p>
          </table:table-cell>
          <table:table-cell office:value-type="date" office:date-value="2026-05-21T17:48:00" table:style-name="ce6">
            <text:p>2026-05-21 17:48</text:p>
          </table:table-cell>
          <table:table-cell table:number-columns-repeated="16369"/>
        </table:table-row>
        <table:table-row table:style-name="ro1">
          <table:table-cell office:value-type="float" office:value="779" table:style-name="ce3">
            <text:p>77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26875282</text:p>
          </table:table-cell>
          <table:table-cell office:value-type="string" table:style-name="ce1">
            <text:p>Samuel Restrepo Torres</text:p>
          </table:table-cell>
          <table:table-cell office:value-type="date" office:date-value="1964-10-12T00:00:00" table:style-name="ce4">
            <text:p>1964-10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4899785</text:p>
          </table:table-cell>
          <table:table-cell office:value-type="string" table:style-name="ce1">
            <text:p>samuel.restrepo779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6-14T19:05:00" table:style-name="ce5">
            <text:p>2026-06-14 19:05</text:p>
          </table:table-cell>
          <table:table-cell office:value-type="date" office:date-value="2026-07-09T23:32:00" table:style-name="ce6">
            <text:p>2026-07-09 23:32</text:p>
          </table:table-cell>
          <table:table-cell table:number-columns-repeated="16369"/>
        </table:table-row>
        <table:table-row table:style-name="ro1">
          <table:table-cell office:value-type="float" office:value="780" table:style-name="ce3">
            <text:p>78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1320370</text:p>
          </table:table-cell>
          <table:table-cell office:value-type="string" table:style-name="ce1">
            <text:p>Tomás Muñoz Restrepo</text:p>
          </table:table-cell>
          <table:table-cell office:value-type="date" office:date-value="1969-08-23T00:00:00" table:style-name="ce4">
            <text:p>1969-08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9457151</text:p>
          </table:table-cell>
          <table:table-cell office:value-type="string" table:style-name="ce1">
            <text:p>tomas.munoz78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29T02:51:00" table:style-name="ce5">
            <text:p>2026-06-29 02:51</text:p>
          </table:table-cell>
          <table:table-cell office:value-type="date" office:date-value="2026-07-08T04:51:00" table:style-name="ce6">
            <text:p>2026-07-08 04:51</text:p>
          </table:table-cell>
          <table:table-cell table:number-columns-repeated="16369"/>
        </table:table-row>
        <table:table-row table:style-name="ro1">
          <table:table-cell office:value-type="float" office:value="781" table:style-name="ce3">
            <text:p>78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5661182</text:p>
          </table:table-cell>
          <table:table-cell office:value-type="string" table:style-name="ce1">
            <text:p>Valentina Valencia Díaz</text:p>
          </table:table-cell>
          <table:table-cell office:value-type="date" office:date-value="1971-07-12T00:00:00" table:style-name="ce4">
            <text:p>1971-07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4249901</text:p>
          </table:table-cell>
          <table:table-cell office:value-type="string" table:style-name="ce1">
            <text:p>valentina.valencia781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09T05:16:00" table:style-name="ce5">
            <text:p>2026-05-09 05:16</text:p>
          </table:table-cell>
          <table:table-cell office:value-type="date" office:date-value="2026-06-10T21:17:00" table:style-name="ce6">
            <text:p>2026-06-10 21:17</text:p>
          </table:table-cell>
          <table:table-cell table:number-columns-repeated="16369"/>
        </table:table-row>
        <table:table-row table:style-name="ro1">
          <table:table-cell office:value-type="float" office:value="782" table:style-name="ce3">
            <text:p>782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830560762</text:p>
          </table:table-cell>
          <table:table-cell office:value-type="string" table:style-name="ce1">
            <text:p>Isabella Hernández García</text:p>
          </table:table-cell>
          <table:table-cell office:value-type="date" office:date-value="1990-01-26T00:00:00" table:style-name="ce4">
            <text:p>1990-01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2389629</text:p>
          </table:table-cell>
          <table:table-cell office:value-type="string" table:style-name="ce1">
            <text:p>isabella.hernandez78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28T10:44:00" table:style-name="ce5">
            <text:p>2026-05-28 10:44</text:p>
          </table:table-cell>
          <table:table-cell office:value-type="date" office:date-value="2026-05-30T06:41:00" table:style-name="ce6">
            <text:p>2026-05-30 06:41</text:p>
          </table:table-cell>
          <table:table-cell table:number-columns-repeated="16369"/>
        </table:table-row>
        <table:table-row table:style-name="ro1">
          <table:table-cell office:value-type="float" office:value="783" table:style-name="ce3">
            <text:p>78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54600666</text:p>
          </table:table-cell>
          <table:table-cell office:value-type="string" table:style-name="ce1">
            <text:p>María Castaño Cárdenas</text:p>
          </table:table-cell>
          <table:table-cell office:value-type="date" office:date-value="1949-11-10T00:00:00" table:style-name="ce4">
            <text:p>1949-11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4078668</text:p>
          </table:table-cell>
          <table:table-cell office:value-type="string" table:style-name="ce1">
            <text:p>maria.castano783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07T20:54:00" table:style-name="ce5">
            <text:p>2026-05-07 20:54</text:p>
          </table:table-cell>
          <table:table-cell office:value-type="date" office:date-value="2026-06-18T14:37:00" table:style-name="ce6">
            <text:p>2026-06-18 14:37</text:p>
          </table:table-cell>
          <table:table-cell table:number-columns-repeated="16369"/>
        </table:table-row>
        <table:table-row table:style-name="ro1">
          <table:table-cell office:value-type="float" office:value="784" table:style-name="ce3">
            <text:p>784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503667369</text:p>
          </table:table-cell>
          <table:table-cell office:value-type="string" table:style-name="ce1">
            <text:p>Alejandro Castro Romero</text:p>
          </table:table-cell>
          <table:table-cell office:value-type="date" office:date-value="2001-05-18T00:00:00" table:style-name="ce4">
            <text:p>2001-05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5979610</text:p>
          </table:table-cell>
          <table:table-cell office:value-type="string" table:style-name="ce1">
            <text:p>alejandro.castro784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15T20:01:00" table:style-name="ce5">
            <text:p>2026-05-15 20:01</text:p>
          </table:table-cell>
          <table:table-cell office:value-type="date" office:date-value="2026-06-13T17:28:00" table:style-name="ce6">
            <text:p>2026-06-13 17:28</text:p>
          </table:table-cell>
          <table:table-cell table:number-columns-repeated="16369"/>
        </table:table-row>
        <table:table-row table:style-name="ro1">
          <table:table-cell office:value-type="float" office:value="785" table:style-name="ce3">
            <text:p>78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83834825</text:p>
          </table:table-cell>
          <table:table-cell office:value-type="string" table:style-name="ce1">
            <text:p>Valentina Paula Ospina López</text:p>
          </table:table-cell>
          <table:table-cell office:value-type="date" office:date-value="1988-02-17T00:00:00" table:style-name="ce4">
            <text:p>1988-02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7155648</text:p>
          </table:table-cell>
          <table:table-cell office:value-type="string" table:style-name="ce1">
            <text:p>valentina.ospina785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29T17:38:00" table:style-name="ce5">
            <text:p>2026-03-29 17:38</text:p>
          </table:table-cell>
          <table:table-cell office:value-type="date" office:date-value="2026-04-03T14:46:00" table:style-name="ce6">
            <text:p>2026-04-03 14:46</text:p>
          </table:table-cell>
          <table:table-cell table:number-columns-repeated="16369"/>
        </table:table-row>
        <table:table-row table:style-name="ro1">
          <table:table-cell office:value-type="float" office:value="786" table:style-name="ce3">
            <text:p>78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41182743</text:p>
          </table:table-cell>
          <table:table-cell office:value-type="string" table:style-name="ce1">
            <text:p>Sofía Valentina Giraldo Álvarez</text:p>
          </table:table-cell>
          <table:table-cell office:value-type="date" office:date-value="1964-03-23T00:00:00" table:style-name="ce4">
            <text:p>1964-03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7489095</text:p>
          </table:table-cell>
          <table:table-cell office:value-type="string" table:style-name="ce1">
            <text:p>sofia.giraldo786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13T21:46:00" table:style-name="ce5">
            <text:p>2026-05-13 21:46</text:p>
          </table:table-cell>
          <table:table-cell office:value-type="date" office:date-value="2026-06-09T00:18:00" table:style-name="ce6">
            <text:p>2026-06-09 00:18</text:p>
          </table:table-cell>
          <table:table-cell table:number-columns-repeated="16369"/>
        </table:table-row>
        <table:table-row table:style-name="ro1">
          <table:table-cell office:value-type="float" office:value="787" table:style-name="ce3">
            <text:p>787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210571250</text:p>
          </table:table-cell>
          <table:table-cell office:value-type="string" table:style-name="ce1">
            <text:p>Juliana Paula López Moreno</text:p>
          </table:table-cell>
          <table:table-cell office:value-type="date" office:date-value="2010-03-09T00:00:00" table:style-name="ce4">
            <text:p>2010-03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5738792</text:p>
          </table:table-cell>
          <table:table-cell office:value-type="string" table:style-name="ce1">
            <text:p>juliana.lopez787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03T01:04:00" table:style-name="ce5">
            <text:p>2026-04-03 01:04</text:p>
          </table:table-cell>
          <table:table-cell office:value-type="date" office:date-value="2026-06-20T00:55:00" table:style-name="ce6">
            <text:p>2026-06-20 00:55</text:p>
          </table:table-cell>
          <table:table-cell table:number-columns-repeated="16369"/>
        </table:table-row>
        <table:table-row table:style-name="ro1">
          <table:table-cell office:value-type="float" office:value="788" table:style-name="ce3">
            <text:p>78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056184</text:p>
          </table:table-cell>
          <table:table-cell office:value-type="string" table:style-name="ce1">
            <text:p>Camila Diana Díaz Pérez</text:p>
          </table:table-cell>
          <table:table-cell office:value-type="date" office:date-value="1950-10-07T00:00:00" table:style-name="ce4">
            <text:p>1950-10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5359492</text:p>
          </table:table-cell>
          <table:table-cell office:value-type="string" table:style-name="ce1">
            <text:p>camila.diaz788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07T13:54:00" table:style-name="ce5">
            <text:p>2026-05-07 13:54</text:p>
          </table:table-cell>
          <table:table-cell office:value-type="date" office:date-value="2026-05-08T05:36:00" table:style-name="ce6">
            <text:p>2026-05-08 05:36</text:p>
          </table:table-cell>
          <table:table-cell table:number-columns-repeated="16369"/>
        </table:table-row>
        <table:table-row table:style-name="ro1">
          <table:table-cell office:value-type="float" office:value="789" table:style-name="ce3">
            <text:p>78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87679929</text:p>
          </table:table-cell>
          <table:table-cell office:value-type="string" table:style-name="ce1">
            <text:p>Juliana Restrepo García</text:p>
          </table:table-cell>
          <table:table-cell office:value-type="date" office:date-value="1986-09-27T00:00:00" table:style-name="ce4">
            <text:p>1986-09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3668788</text:p>
          </table:table-cell>
          <table:table-cell office:value-type="string" table:style-name="ce1">
            <text:p>juliana.restrepo789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12T07:13:00" table:style-name="ce5">
            <text:p>2026-04-12 07:13</text:p>
          </table:table-cell>
          <table:table-cell office:value-type="date" office:date-value="2026-04-29T12:04:00" table:style-name="ce6">
            <text:p>2026-04-29 12:04</text:p>
          </table:table-cell>
          <table:table-cell table:number-columns-repeated="16369"/>
        </table:table-row>
        <table:table-row table:style-name="ro1">
          <table:table-cell office:value-type="float" office:value="790" table:style-name="ce3">
            <text:p>79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572762</text:p>
          </table:table-cell>
          <table:table-cell office:value-type="string" table:style-name="ce1">
            <text:p>Samuel Cárdenas Mendoza</text:p>
          </table:table-cell>
          <table:table-cell office:value-type="date" office:date-value="1943-06-19T00:00:00" table:style-name="ce4">
            <text:p>1943-06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2235480</text:p>
          </table:table-cell>
          <table:table-cell office:value-type="string" table:style-name="ce1">
            <text:p>samuel.cardenas790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23T07:49:00" table:style-name="ce5">
            <text:p>2026-04-23 07:49</text:p>
          </table:table-cell>
          <table:table-cell office:value-type="date" office:date-value="2026-06-21T16:49:00" table:style-name="ce6">
            <text:p>2026-06-21 16:49</text:p>
          </table:table-cell>
          <table:table-cell table:number-columns-repeated="16369"/>
        </table:table-row>
        <table:table-row table:style-name="ro1">
          <table:table-cell office:value-type="float" office:value="791" table:style-name="ce3">
            <text:p>79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77963296</text:p>
          </table:table-cell>
          <table:table-cell office:value-type="string" table:style-name="ce1">
            <text:p>Andrés Ospina Díaz</text:p>
          </table:table-cell>
          <table:table-cell office:value-type="date" office:date-value="1982-11-24T00:00:00" table:style-name="ce4">
            <text:p>1982-11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2934901</text:p>
          </table:table-cell>
          <table:table-cell office:value-type="string" table:style-name="ce1">
            <text:p>andres.ospina791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6-06T07:25:00" table:style-name="ce5">
            <text:p>2026-06-06 07:25</text:p>
          </table:table-cell>
          <table:table-cell office:value-type="date" office:date-value="2026-06-14T19:02:00" table:style-name="ce6">
            <text:p>2026-06-14 19:02</text:p>
          </table:table-cell>
          <table:table-cell table:number-columns-repeated="16369"/>
        </table:table-row>
        <table:table-row table:style-name="ro1">
          <table:table-cell office:value-type="float" office:value="792" table:style-name="ce3">
            <text:p>79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82856924</text:p>
          </table:table-cell>
          <table:table-cell office:value-type="string" table:style-name="ce1">
            <text:p>José Mendoza Castaño</text:p>
          </table:table-cell>
          <table:table-cell office:value-type="date" office:date-value="1950-12-07T00:00:00" table:style-name="ce4">
            <text:p>1950-12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2533156</text:p>
          </table:table-cell>
          <table:table-cell office:value-type="string" table:style-name="ce1">
            <text:p>jose.mendoza79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31T22:20:00" table:style-name="ce5">
            <text:p>2026-05-31 22:20</text:p>
          </table:table-cell>
          <table:table-cell office:value-type="date" office:date-value="2026-07-08T19:09:00" table:style-name="ce6">
            <text:p>2026-07-08 19:09</text:p>
          </table:table-cell>
          <table:table-cell table:number-columns-repeated="16369"/>
        </table:table-row>
        <table:table-row table:style-name="ro1">
          <table:table-cell office:value-type="float" office:value="793" table:style-name="ce3">
            <text:p>79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08957576</text:p>
          </table:table-cell>
          <table:table-cell office:value-type="string" table:style-name="ce1">
            <text:p>Daniel Sánchez García</text:p>
          </table:table-cell>
          <table:table-cell office:value-type="date" office:date-value="1948-01-30T00:00:00" table:style-name="ce4">
            <text:p>1948-01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2024996</text:p>
          </table:table-cell>
          <table:table-cell office:value-type="string" table:style-name="ce1">
            <text:p>daniel.sanchez79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10T18:17:00" table:style-name="ce5">
            <text:p>2026-06-10 18:17</text:p>
          </table:table-cell>
          <table:table-cell office:value-type="date" office:date-value="2026-07-04T00:22:00" table:style-name="ce6">
            <text:p>2026-07-04 00:22</text:p>
          </table:table-cell>
          <table:table-cell table:number-columns-repeated="16369"/>
        </table:table-row>
        <table:table-row table:style-name="ro1">
          <table:table-cell office:value-type="float" office:value="794" table:style-name="ce3">
            <text:p>79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23940436</text:p>
          </table:table-cell>
          <table:table-cell office:value-type="string" table:style-name="ce1">
            <text:p>Alejandra Castaño Castro</text:p>
          </table:table-cell>
          <table:table-cell office:value-type="date" office:date-value="2013-06-29T00:00:00" table:style-name="ce4">
            <text:p>2013-06-2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6412124</text:p>
          </table:table-cell>
          <table:table-cell office:value-type="string" table:style-name="ce1">
            <text:p>alejandra.castano79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26T05:13:00" table:style-name="ce5">
            <text:p>2026-05-26 05:13</text:p>
          </table:table-cell>
          <table:table-cell office:value-type="date" office:date-value="2026-06-13T03:08:00" table:style-name="ce6">
            <text:p>2026-06-13 03:08</text:p>
          </table:table-cell>
          <table:table-cell table:number-columns-repeated="16369"/>
        </table:table-row>
        <table:table-row table:style-name="ro1">
          <table:table-cell office:value-type="float" office:value="795" table:style-name="ce3">
            <text:p>79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1177632</text:p>
          </table:table-cell>
          <table:table-cell office:value-type="string" table:style-name="ce1">
            <text:p>Cristian Ortiz Castro</text:p>
          </table:table-cell>
          <table:table-cell office:value-type="date" office:date-value="1980-06-23T00:00:00" table:style-name="ce4">
            <text:p>1980-06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3754250</text:p>
          </table:table-cell>
          <table:table-cell office:value-type="string" table:style-name="ce1">
            <text:p>cristian.ortiz79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3-29T03:00:00" table:style-name="ce5">
            <text:p>2026-03-29 03:00</text:p>
          </table:table-cell>
          <table:table-cell office:value-type="date" office:date-value="2026-05-05T04:10:00" table:style-name="ce6">
            <text:p>2026-05-05 04:10</text:p>
          </table:table-cell>
          <table:table-cell table:number-columns-repeated="16369"/>
        </table:table-row>
        <table:table-row table:style-name="ro1">
          <table:table-cell office:value-type="float" office:value="796" table:style-name="ce3">
            <text:p>79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7163650</text:p>
          </table:table-cell>
          <table:table-cell office:value-type="string" table:style-name="ce1">
            <text:p>Isabella Sánchez González</text:p>
          </table:table-cell>
          <table:table-cell office:value-type="date" office:date-value="1993-04-09T00:00:00" table:style-name="ce4">
            <text:p>1993-04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5203566</text:p>
          </table:table-cell>
          <table:table-cell office:value-type="string" table:style-name="ce1">
            <text:p>isabella.sanchez79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3-24T19:30:00" table:style-name="ce5">
            <text:p>2026-03-24 19:30</text:p>
          </table:table-cell>
          <table:table-cell office:value-type="date" office:date-value="2026-05-28T12:29:00" table:style-name="ce6">
            <text:p>2026-05-28 12:29</text:p>
          </table:table-cell>
          <table:table-cell table:number-columns-repeated="16369"/>
        </table:table-row>
        <table:table-row table:style-name="ro1">
          <table:table-cell office:value-type="float" office:value="797" table:style-name="ce3">
            <text:p>79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59606086</text:p>
          </table:table-cell>
          <table:table-cell office:value-type="string" table:style-name="ce1">
            <text:p>Esteban Ruiz Rodríguez</text:p>
          </table:table-cell>
          <table:table-cell office:value-type="date" office:date-value="1999-12-27T00:00:00" table:style-name="ce4">
            <text:p>1999-12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6662957</text:p>
          </table:table-cell>
          <table:table-cell office:value-type="string" table:style-name="ce1">
            <text:p>esteban.ruiz797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5-17T00:51:00" table:style-name="ce5">
            <text:p>2026-05-17 00:51</text:p>
          </table:table-cell>
          <table:table-cell office:value-type="date" office:date-value="2026-05-19T09:25:00" table:style-name="ce6">
            <text:p>2026-05-19 09:25</text:p>
          </table:table-cell>
          <table:table-cell table:number-columns-repeated="16369"/>
        </table:table-row>
        <table:table-row table:style-name="ro1">
          <table:table-cell office:value-type="float" office:value="798" table:style-name="ce3">
            <text:p>79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1727743</text:p>
          </table:table-cell>
          <table:table-cell office:value-type="string" table:style-name="ce1">
            <text:p>Valentina Álvarez Martínez</text:p>
          </table:table-cell>
          <table:table-cell office:value-type="date" office:date-value="1991-01-28T00:00:00" table:style-name="ce4">
            <text:p>1991-01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3158686</text:p>
          </table:table-cell>
          <table:table-cell office:value-type="string" table:style-name="ce1">
            <text:p>valentina.alvarez798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01T07:52:00" table:style-name="ce5">
            <text:p>2026-06-01 07:52</text:p>
          </table:table-cell>
          <table:table-cell office:value-type="date" office:date-value="2026-06-10T21:17:00" table:style-name="ce6">
            <text:p>2026-06-10 21:17</text:p>
          </table:table-cell>
          <table:table-cell table:number-columns-repeated="16369"/>
        </table:table-row>
        <table:table-row table:style-name="ro1">
          <table:table-cell office:value-type="float" office:value="799" table:style-name="ce3">
            <text:p>79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14763073</text:p>
          </table:table-cell>
          <table:table-cell office:value-type="string" table:style-name="ce1">
            <text:p>Ana Giraldo Pérez</text:p>
          </table:table-cell>
          <table:table-cell office:value-type="date" office:date-value="1991-02-25T00:00:00" table:style-name="ce4">
            <text:p>1991-02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7433911</text:p>
          </table:table-cell>
          <table:table-cell office:value-type="string" table:style-name="ce1">
            <text:p>ana.giraldo79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08T02:33:00" table:style-name="ce5">
            <text:p>2026-04-08 02:33</text:p>
          </table:table-cell>
          <table:table-cell office:value-type="date" office:date-value="2026-05-14T20:26:00" table:style-name="ce6">
            <text:p>2026-05-14 20:26</text:p>
          </table:table-cell>
          <table:table-cell table:number-columns-repeated="16369"/>
        </table:table-row>
        <table:table-row table:style-name="ro1">
          <table:table-cell office:value-type="float" office:value="800" table:style-name="ce3">
            <text:p>80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6923909</text:p>
          </table:table-cell>
          <table:table-cell office:value-type="string" table:style-name="ce1">
            <text:p>David García Pérez</text:p>
          </table:table-cell>
          <table:table-cell office:value-type="date" office:date-value="2000-03-29T00:00:00" table:style-name="ce4">
            <text:p>2000-03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1889285</text:p>
          </table:table-cell>
          <table:table-cell office:value-type="string" table:style-name="ce1">
            <text:p>david.garcia800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7-06T19:48:00" table:style-name="ce5">
            <text:p>2026-07-06 19:48</text:p>
          </table:table-cell>
          <table:table-cell office:value-type="date" office:date-value="2026-07-08T19:36:00" table:style-name="ce6">
            <text:p>2026-07-08 19:36</text:p>
          </table:table-cell>
          <table:table-cell table:number-columns-repeated="16369"/>
        </table:table-row>
        <table:table-row table:style-name="ro1">
          <table:table-cell office:value-type="float" office:value="801" table:style-name="ce3">
            <text:p>80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15140173</text:p>
          </table:table-cell>
          <table:table-cell office:value-type="string" table:style-name="ce1">
            <text:p>Valentina Rodríguez Mendoza</text:p>
          </table:table-cell>
          <table:table-cell office:value-type="date" office:date-value="1993-09-03T00:00:00" table:style-name="ce4">
            <text:p>1993-09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1243118</text:p>
          </table:table-cell>
          <table:table-cell office:value-type="string" table:style-name="ce1">
            <text:p>valentina.rodriguez80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18T10:27:00" table:style-name="ce5">
            <text:p>2026-06-18 10:27</text:p>
          </table:table-cell>
          <table:table-cell office:value-type="date" office:date-value="2026-06-19T20:43:00" table:style-name="ce6">
            <text:p>2026-06-19 20:43</text:p>
          </table:table-cell>
          <table:table-cell table:number-columns-repeated="16369"/>
        </table:table-row>
        <table:table-row table:style-name="ro1">
          <table:table-cell office:value-type="float" office:value="802" table:style-name="ce3">
            <text:p>80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792511551</text:p>
          </table:table-cell>
          <table:table-cell office:value-type="string" table:style-name="ce1">
            <text:p>Isabella Natalia Castro Valencia</text:p>
          </table:table-cell>
          <table:table-cell office:value-type="date" office:date-value="2013-08-12T00:00:00" table:style-name="ce4">
            <text:p>2013-08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1577757</text:p>
          </table:table-cell>
          <table:table-cell office:value-type="string" table:style-name="ce1">
            <text:p>isabella.castro802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12T23:12:00" table:style-name="ce5">
            <text:p>2026-06-12 23:12</text:p>
          </table:table-cell>
          <table:table-cell office:value-type="date" office:date-value="2026-07-05T18:39:00" table:style-name="ce6">
            <text:p>2026-07-05 18:39</text:p>
          </table:table-cell>
          <table:table-cell table:number-columns-repeated="16369"/>
        </table:table-row>
        <table:table-row table:style-name="ro1">
          <table:table-cell office:value-type="float" office:value="803" table:style-name="ce3">
            <text:p>80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10601007</text:p>
          </table:table-cell>
          <table:table-cell office:value-type="string" table:style-name="ce1">
            <text:p>Juan López Ospina</text:p>
          </table:table-cell>
          <table:table-cell office:value-type="date" office:date-value="1975-04-28T00:00:00" table:style-name="ce4">
            <text:p>1975-04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8212381</text:p>
          </table:table-cell>
          <table:table-cell office:value-type="string" table:style-name="ce1">
            <text:p>juan.lopez803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09T09:30:00" table:style-name="ce5">
            <text:p>2026-05-09 09:30</text:p>
          </table:table-cell>
          <table:table-cell office:value-type="date" office:date-value="2026-06-22T19:45:00" table:style-name="ce6">
            <text:p>2026-06-22 19:45</text:p>
          </table:table-cell>
          <table:table-cell table:number-columns-repeated="16369"/>
        </table:table-row>
        <table:table-row table:style-name="ro1">
          <table:table-cell office:value-type="float" office:value="804" table:style-name="ce3">
            <text:p>80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088111822</text:p>
          </table:table-cell>
          <table:table-cell office:value-type="string" table:style-name="ce1">
            <text:p>Miguel Nicolás Torres Cárdenas</text:p>
          </table:table-cell>
          <table:table-cell office:value-type="date" office:date-value="2017-03-08T00:00:00" table:style-name="ce4">
            <text:p>2017-03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7332089</text:p>
          </table:table-cell>
          <table:table-cell office:value-type="string" table:style-name="ce1">
            <text:p>miguel.torres80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7-04T13:30:00" table:style-name="ce5">
            <text:p>2026-07-04 13:30</text:p>
          </table:table-cell>
          <table:table-cell office:value-type="date" office:date-value="2026-07-08T02:34:00" table:style-name="ce6">
            <text:p>2026-07-08 02:34</text:p>
          </table:table-cell>
          <table:table-cell table:number-columns-repeated="16369"/>
        </table:table-row>
        <table:table-row table:style-name="ro1">
          <table:table-cell office:value-type="float" office:value="805" table:style-name="ce3">
            <text:p>805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518129830</text:p>
          </table:table-cell>
          <table:table-cell office:value-type="string" table:style-name="ce1">
            <text:p>David Mendoza Castaño</text:p>
          </table:table-cell>
          <table:table-cell office:value-type="date" office:date-value="2009-10-09T00:00:00" table:style-name="ce4">
            <text:p>2009-10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9412440</text:p>
          </table:table-cell>
          <table:table-cell office:value-type="string" table:style-name="ce1">
            <text:p>david.mendoza80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29T07:37:00" table:style-name="ce5">
            <text:p>2026-05-29 07:37</text:p>
          </table:table-cell>
          <table:table-cell office:value-type="date" office:date-value="2026-06-28T00:57:00" table:style-name="ce6">
            <text:p>2026-06-28 00:57</text:p>
          </table:table-cell>
          <table:table-cell table:number-columns-repeated="16369"/>
        </table:table-row>
        <table:table-row table:style-name="ro1">
          <table:table-cell office:value-type="float" office:value="806" table:style-name="ce3">
            <text:p>80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4732369</text:p>
          </table:table-cell>
          <table:table-cell office:value-type="string" table:style-name="ce1">
            <text:p>Jorge Rodríguez Romero</text:p>
          </table:table-cell>
          <table:table-cell office:value-type="date" office:date-value="1996-11-04T00:00:00" table:style-name="ce4">
            <text:p>1996-11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3335554</text:p>
          </table:table-cell>
          <table:table-cell office:value-type="string" table:style-name="ce1">
            <text:p>jorge.rodriguez80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4-14T15:19:00" table:style-name="ce5">
            <text:p>2026-04-14 15:19</text:p>
          </table:table-cell>
          <table:table-cell office:value-type="date" office:date-value="2026-04-21T08:29:00" table:style-name="ce6">
            <text:p>2026-04-21 08:29</text:p>
          </table:table-cell>
          <table:table-cell table:number-columns-repeated="16369"/>
        </table:table-row>
        <table:table-row table:style-name="ro1">
          <table:table-cell office:value-type="float" office:value="807" table:style-name="ce3">
            <text:p>80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27445633</text:p>
          </table:table-cell>
          <table:table-cell office:value-type="string" table:style-name="ce1">
            <text:p>Sebastián Ospina Restrepo</text:p>
          </table:table-cell>
          <table:table-cell office:value-type="date" office:date-value="1995-09-22T00:00:00" table:style-name="ce4">
            <text:p>1995-09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6424074</text:p>
          </table:table-cell>
          <table:table-cell office:value-type="string" table:style-name="ce1">
            <text:p>sebastian.ospina80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26T21:33:00" table:style-name="ce5">
            <text:p>2026-05-26 21:33</text:p>
          </table:table-cell>
          <table:table-cell office:value-type="date" office:date-value="2026-07-05T19:36:00" table:style-name="ce6">
            <text:p>2026-07-05 19:36</text:p>
          </table:table-cell>
          <table:table-cell table:number-columns-repeated="16369"/>
        </table:table-row>
        <table:table-row table:style-name="ro1">
          <table:table-cell office:value-type="float" office:value="808" table:style-name="ce3">
            <text:p>80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6166450</text:p>
          </table:table-cell>
          <table:table-cell office:value-type="string" table:style-name="ce1">
            <text:p>Valentina Martínez Cárdenas</text:p>
          </table:table-cell>
          <table:table-cell office:value-type="date" office:date-value="1983-12-16T00:00:00" table:style-name="ce4">
            <text:p>1983-12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7940828</text:p>
          </table:table-cell>
          <table:table-cell office:value-type="string" table:style-name="ce1">
            <text:p>valentina.martinez808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4-09T10:33:00" table:style-name="ce5">
            <text:p>2026-04-09 10:33</text:p>
          </table:table-cell>
          <table:table-cell office:value-type="date" office:date-value="2026-05-28T06:02:00" table:style-name="ce6">
            <text:p>2026-05-28 06:02</text:p>
          </table:table-cell>
          <table:table-cell table:number-columns-repeated="16369"/>
        </table:table-row>
        <table:table-row table:style-name="ro1">
          <table:table-cell office:value-type="float" office:value="809" table:style-name="ce3">
            <text:p>809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752120115</text:p>
          </table:table-cell>
          <table:table-cell office:value-type="string" table:style-name="ce1">
            <text:p>Sara Moreno Ortiz</text:p>
          </table:table-cell>
          <table:table-cell office:value-type="date" office:date-value="1977-04-07T00:00:00" table:style-name="ce4">
            <text:p>1977-04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7513399</text:p>
          </table:table-cell>
          <table:table-cell office:value-type="string" table:style-name="ce1">
            <text:p>sara.moreno80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22T12:51:00" table:style-name="ce5">
            <text:p>2026-04-22 12:51</text:p>
          </table:table-cell>
          <table:table-cell office:value-type="date" office:date-value="2026-05-16T04:16:00" table:style-name="ce6">
            <text:p>2026-05-16 04:16</text:p>
          </table:table-cell>
          <table:table-cell table:number-columns-repeated="16369"/>
        </table:table-row>
        <table:table-row table:style-name="ro1">
          <table:table-cell office:value-type="float" office:value="810" table:style-name="ce3">
            <text:p>81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6707383</text:p>
          </table:table-cell>
          <table:table-cell office:value-type="string" table:style-name="ce1">
            <text:p>Ana Mendoza Ortiz</text:p>
          </table:table-cell>
          <table:table-cell office:value-type="date" office:date-value="1962-06-05T00:00:00" table:style-name="ce4">
            <text:p>1962-06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2290544</text:p>
          </table:table-cell>
          <table:table-cell office:value-type="string" table:style-name="ce1">
            <text:p>ana.mendoza810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29T02:27:00" table:style-name="ce5">
            <text:p>2026-03-29 02:27</text:p>
          </table:table-cell>
          <table:table-cell office:value-type="date" office:date-value="2026-04-06T23:03:00" table:style-name="ce6">
            <text:p>2026-04-06 23:03</text:p>
          </table:table-cell>
          <table:table-cell table:number-columns-repeated="16369"/>
        </table:table-row>
        <table:table-row table:style-name="ro1">
          <table:table-cell office:value-type="float" office:value="811" table:style-name="ce3">
            <text:p>81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71038714</text:p>
          </table:table-cell>
          <table:table-cell office:value-type="string" table:style-name="ce1">
            <text:p>Isabella Hernández Mendoza</text:p>
          </table:table-cell>
          <table:table-cell office:value-type="date" office:date-value="2008-03-31T00:00:00" table:style-name="ce4">
            <text:p>2008-03-3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3819596</text:p>
          </table:table-cell>
          <table:table-cell office:value-type="string" table:style-name="ce1">
            <text:p>isabella.hernandez811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7-09T07:28:00" table:style-name="ce5">
            <text:p>2026-07-09 07:28</text:p>
          </table:table-cell>
          <table:table-cell office:value-type="date" office:date-value="2026-07-10T01:28:00" table:style-name="ce6">
            <text:p>2026-07-10 01:28</text:p>
          </table:table-cell>
          <table:table-cell table:number-columns-repeated="16369"/>
        </table:table-row>
        <table:table-row table:style-name="ro1">
          <table:table-cell office:value-type="float" office:value="812" table:style-name="ce3">
            <text:p>81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96776409</text:p>
          </table:table-cell>
          <table:table-cell office:value-type="string" table:style-name="ce1">
            <text:p>José González Restrepo</text:p>
          </table:table-cell>
          <table:table-cell office:value-type="date" office:date-value="1996-04-01T00:00:00" table:style-name="ce4">
            <text:p>1996-04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7400722</text:p>
          </table:table-cell>
          <table:table-cell office:value-type="string" table:style-name="ce1">
            <text:p>jose.gonzalez81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6-02T22:55:00" table:style-name="ce5">
            <text:p>2026-06-02 22:55</text:p>
          </table:table-cell>
          <table:table-cell office:value-type="date" office:date-value="2026-07-04T07:16:00" table:style-name="ce6">
            <text:p>2026-07-04 07:16</text:p>
          </table:table-cell>
          <table:table-cell table:number-columns-repeated="16369"/>
        </table:table-row>
        <table:table-row table:style-name="ro1">
          <table:table-cell office:value-type="float" office:value="813" table:style-name="ce3">
            <text:p>81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50699610</text:p>
          </table:table-cell>
          <table:table-cell office:value-type="string" table:style-name="ce1">
            <text:p>Mateo Esteban Quintero López</text:p>
          </table:table-cell>
          <table:table-cell office:value-type="date" office:date-value="1986-07-06T00:00:00" table:style-name="ce4">
            <text:p>1986-07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4267731</text:p>
          </table:table-cell>
          <table:table-cell office:value-type="string" table:style-name="ce1">
            <text:p>mateo.quintero81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06T03:32:00" table:style-name="ce5">
            <text:p>2026-04-06 03:32</text:p>
          </table:table-cell>
          <table:table-cell office:value-type="date" office:date-value="2026-07-09T12:56:00" table:style-name="ce6">
            <text:p>2026-07-09 12:56</text:p>
          </table:table-cell>
          <table:table-cell table:number-columns-repeated="16369"/>
        </table:table-row>
        <table:table-row table:style-name="ro1">
          <table:table-cell office:value-type="float" office:value="814" table:style-name="ce3">
            <text:p>814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37447951</text:p>
          </table:table-cell>
          <table:table-cell office:value-type="string" table:style-name="ce1">
            <text:p>Tomás Castro Torres</text:p>
          </table:table-cell>
          <table:table-cell office:value-type="date" office:date-value="2000-09-25T00:00:00" table:style-name="ce4">
            <text:p>2000-09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8396551</text:p>
          </table:table-cell>
          <table:table-cell office:value-type="string" table:style-name="ce1">
            <text:p>tomas.castro81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5-18T22:54:00" table:style-name="ce5">
            <text:p>2026-05-18 22:54</text:p>
          </table:table-cell>
          <table:table-cell office:value-type="date" office:date-value="2026-06-11T22:25:00" table:style-name="ce6">
            <text:p>2026-06-11 22:25</text:p>
          </table:table-cell>
          <table:table-cell table:number-columns-repeated="16369"/>
        </table:table-row>
        <table:table-row table:style-name="ro1">
          <table:table-cell office:value-type="float" office:value="815" table:style-name="ce3">
            <text:p>81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8457842</text:p>
          </table:table-cell>
          <table:table-cell office:value-type="string" table:style-name="ce1">
            <text:p>Tomás Samuel Torres Mendoza</text:p>
          </table:table-cell>
          <table:table-cell office:value-type="date" office:date-value="1993-05-07T00:00:00" table:style-name="ce4">
            <text:p>1993-05-07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009410175</text:p>
          </table:table-cell>
          <table:table-cell office:value-type="string" table:style-name="ce1">
            <text:p>tomas.torres815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6-20T19:09:00" table:style-name="ce5">
            <text:p>2026-06-20 19:09</text:p>
          </table:table-cell>
          <table:table-cell office:value-type="date" office:date-value="2026-07-08T06:00:00" table:style-name="ce6">
            <text:p>2026-07-08 06:00</text:p>
          </table:table-cell>
          <table:table-cell table:number-columns-repeated="16369"/>
        </table:table-row>
        <table:table-row table:style-name="ro1">
          <table:table-cell office:value-type="float" office:value="816" table:style-name="ce3">
            <text:p>81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6303038</text:p>
          </table:table-cell>
          <table:table-cell office:value-type="string" table:style-name="ce1">
            <text:p>Juliana García Martínez</text:p>
          </table:table-cell>
          <table:table-cell office:value-type="date" office:date-value="1968-07-24T00:00:00" table:style-name="ce4">
            <text:p>1968-07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8131972</text:p>
          </table:table-cell>
          <table:table-cell office:value-type="string" table:style-name="ce1">
            <text:p>juliana.garcia816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5-16T06:25:00" table:style-name="ce5">
            <text:p>2026-05-16 06:25</text:p>
          </table:table-cell>
          <table:table-cell office:value-type="date" office:date-value="2026-05-23T19:16:00" table:style-name="ce6">
            <text:p>2026-05-23 19:16</text:p>
          </table:table-cell>
          <table:table-cell table:number-columns-repeated="16369"/>
        </table:table-row>
        <table:table-row table:style-name="ro1">
          <table:table-cell office:value-type="float" office:value="817" table:style-name="ce3">
            <text:p>81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48748129</text:p>
          </table:table-cell>
          <table:table-cell office:value-type="string" table:style-name="ce1">
            <text:p>Julián Carlos Álvarez Valencia</text:p>
          </table:table-cell>
          <table:table-cell office:value-type="date" office:date-value="1963-08-10T00:00:00" table:style-name="ce4">
            <text:p>1963-08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8266271</text:p>
          </table:table-cell>
          <table:table-cell office:value-type="string" table:style-name="ce1">
            <text:p>julian.alvarez817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12T11:54:00" table:style-name="ce5">
            <text:p>2026-04-12 11:54</text:p>
          </table:table-cell>
          <table:table-cell office:value-type="date" office:date-value="2026-05-08T08:21:00" table:style-name="ce6">
            <text:p>2026-05-08 08:21</text:p>
          </table:table-cell>
          <table:table-cell table:number-columns-repeated="16369"/>
        </table:table-row>
        <table:table-row table:style-name="ro1">
          <table:table-cell office:value-type="float" office:value="818" table:style-name="ce3">
            <text:p>818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647980876</text:p>
          </table:table-cell>
          <table:table-cell office:value-type="string" table:style-name="ce1">
            <text:p>Daniel Quintero Castro</text:p>
          </table:table-cell>
          <table:table-cell office:value-type="date" office:date-value="2003-04-27T00:00:00" table:style-name="ce4">
            <text:p>2003-04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8294325</text:p>
          </table:table-cell>
          <table:table-cell office:value-type="string" table:style-name="ce1">
            <text:p>daniel.quintero818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22T17:24:00" table:style-name="ce5">
            <text:p>2026-06-22 17:24</text:p>
          </table:table-cell>
          <table:table-cell office:value-type="date" office:date-value="2026-07-07T13:33:00" table:style-name="ce6">
            <text:p>2026-07-07 13:33</text:p>
          </table:table-cell>
          <table:table-cell table:number-columns-repeated="16369"/>
        </table:table-row>
        <table:table-row table:style-name="ro1">
          <table:table-cell office:value-type="float" office:value="819" table:style-name="ce3">
            <text:p>81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7832517</text:p>
          </table:table-cell>
          <table:table-cell office:value-type="string" table:style-name="ce1">
            <text:p>Carolina González Sánchez</text:p>
          </table:table-cell>
          <table:table-cell office:value-type="date" office:date-value="1977-04-30T00:00:00" table:style-name="ce4">
            <text:p>1977-04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7046616</text:p>
          </table:table-cell>
          <table:table-cell office:value-type="string" table:style-name="ce1">
            <text:p>carolina.gonzalez81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5-13T03:28:00" table:style-name="ce5">
            <text:p>2026-05-13 03:28</text:p>
          </table:table-cell>
          <table:table-cell office:value-type="date" office:date-value="2026-06-21T17:12:00" table:style-name="ce6">
            <text:p>2026-06-21 17:12</text:p>
          </table:table-cell>
          <table:table-cell table:number-columns-repeated="16369"/>
        </table:table-row>
        <table:table-row table:style-name="ro1">
          <table:table-cell office:value-type="float" office:value="820" table:style-name="ce3">
            <text:p>82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292349672</text:p>
          </table:table-cell>
          <table:table-cell office:value-type="string" table:style-name="ce1">
            <text:p>Mateo Sánchez Restrepo</text:p>
          </table:table-cell>
          <table:table-cell office:value-type="date" office:date-value="2016-12-02T00:00:00" table:style-name="ce4">
            <text:p>2016-12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4848179</text:p>
          </table:table-cell>
          <table:table-cell office:value-type="string" table:style-name="ce1">
            <text:p>mateo.sanchez820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10T03:17:00" table:style-name="ce5">
            <text:p>2026-04-10 03:17</text:p>
          </table:table-cell>
          <table:table-cell office:value-type="date" office:date-value="2026-05-26T06:43:00" table:style-name="ce6">
            <text:p>2026-05-26 06:43</text:p>
          </table:table-cell>
          <table:table-cell table:number-columns-repeated="16369"/>
        </table:table-row>
        <table:table-row table:style-name="ro1">
          <table:table-cell office:value-type="float" office:value="821" table:style-name="ce3">
            <text:p>82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9461875</text:p>
          </table:table-cell>
          <table:table-cell office:value-type="string" table:style-name="ce1">
            <text:p>Nicolás Sánchez Ruiz</text:p>
          </table:table-cell>
          <table:table-cell office:value-type="date" office:date-value="1949-08-13T00:00:00" table:style-name="ce4">
            <text:p>1949-08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2130815</text:p>
          </table:table-cell>
          <table:table-cell office:value-type="string" table:style-name="ce1">
            <text:p>nicolas.sanchez821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12T03:18:00" table:style-name="ce5">
            <text:p>2026-05-12 03:18</text:p>
          </table:table-cell>
          <table:table-cell office:value-type="date" office:date-value="2026-06-26T00:12:00" table:style-name="ce6">
            <text:p>2026-06-26 00:12</text:p>
          </table:table-cell>
          <table:table-cell table:number-columns-repeated="16369"/>
        </table:table-row>
        <table:table-row table:style-name="ro1">
          <table:table-cell office:value-type="float" office:value="822" table:style-name="ce3">
            <text:p>82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78917309</text:p>
          </table:table-cell>
          <table:table-cell office:value-type="string" table:style-name="ce1">
            <text:p>Daniel Díaz García</text:p>
          </table:table-cell>
          <table:table-cell office:value-type="date" office:date-value="1980-05-28T00:00:00" table:style-name="ce4">
            <text:p>1980-05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8765134</text:p>
          </table:table-cell>
          <table:table-cell office:value-type="string" table:style-name="ce1">
            <text:p>daniel.diaz822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7-06T05:21:00" table:style-name="ce5">
            <text:p>2026-07-06 05:21</text:p>
          </table:table-cell>
          <table:table-cell office:value-type="date" office:date-value="2026-07-09T01:04:00" table:style-name="ce6">
            <text:p>2026-07-09 01:04</text:p>
          </table:table-cell>
          <table:table-cell table:number-columns-repeated="16369"/>
        </table:table-row>
        <table:table-row table:style-name="ro1">
          <table:table-cell office:value-type="float" office:value="823" table:style-name="ce3">
            <text:p>82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76171277</text:p>
          </table:table-cell>
          <table:table-cell office:value-type="string" table:style-name="ce1">
            <text:p>Nicolás Carlos Quintero González</text:p>
          </table:table-cell>
          <table:table-cell office:value-type="date" office:date-value="1994-09-25T00:00:00" table:style-name="ce4">
            <text:p>1994-09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7772425</text:p>
          </table:table-cell>
          <table:table-cell office:value-type="string" table:style-name="ce1">
            <text:p>nicolas.quintero823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29T04:10:00" table:style-name="ce5">
            <text:p>2026-05-29 04:10</text:p>
          </table:table-cell>
          <table:table-cell office:value-type="date" office:date-value="2026-06-23T02:04:00" table:style-name="ce6">
            <text:p>2026-06-23 02:04</text:p>
          </table:table-cell>
          <table:table-cell table:number-columns-repeated="16369"/>
        </table:table-row>
        <table:table-row table:style-name="ro1">
          <table:table-cell office:value-type="float" office:value="824" table:style-name="ce3">
            <text:p>824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413991154</text:p>
          </table:table-cell>
          <table:table-cell office:value-type="string" table:style-name="ce1">
            <text:p>Luisa Cárdenas Moreno</text:p>
          </table:table-cell>
          <table:table-cell office:value-type="date" office:date-value="1981-12-08T00:00:00" table:style-name="ce4">
            <text:p>1981-12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5910378</text:p>
          </table:table-cell>
          <table:table-cell office:value-type="string" table:style-name="ce1">
            <text:p>luisa.cardenas824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7-03T21:27:00" table:style-name="ce5">
            <text:p>2026-07-03 21:27</text:p>
          </table:table-cell>
          <table:table-cell office:value-type="date" office:date-value="2026-07-05T15:15:00" table:style-name="ce6">
            <text:p>2026-07-05 15:15</text:p>
          </table:table-cell>
          <table:table-cell table:number-columns-repeated="16369"/>
        </table:table-row>
        <table:table-row table:style-name="ro1">
          <table:table-cell office:value-type="float" office:value="825" table:style-name="ce3">
            <text:p>82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00081076</text:p>
          </table:table-cell>
          <table:table-cell office:value-type="string" table:style-name="ce1">
            <text:p>Juan Quintero González</text:p>
          </table:table-cell>
          <table:table-cell office:value-type="date" office:date-value="1975-09-06T00:00:00" table:style-name="ce4">
            <text:p>1975-09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3364990</text:p>
          </table:table-cell>
          <table:table-cell office:value-type="string" table:style-name="ce1">
            <text:p>juan.quintero825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26T18:57:00" table:style-name="ce5">
            <text:p>2026-03-26 18:57</text:p>
          </table:table-cell>
          <table:table-cell office:value-type="date" office:date-value="2026-04-25T13:21:00" table:style-name="ce6">
            <text:p>2026-04-25 13:21</text:p>
          </table:table-cell>
          <table:table-cell table:number-columns-repeated="16369"/>
        </table:table-row>
        <table:table-row table:style-name="ro1">
          <table:table-cell office:value-type="float" office:value="826" table:style-name="ce3">
            <text:p>82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82451748</text:p>
          </table:table-cell>
          <table:table-cell office:value-type="string" table:style-name="ce1">
            <text:p>Esteban Ruiz Díaz</text:p>
          </table:table-cell>
          <table:table-cell office:value-type="date" office:date-value="1979-04-20T00:00:00" table:style-name="ce4">
            <text:p>1979-04-20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197039670</text:p>
          </table:table-cell>
          <table:table-cell office:value-type="string" table:style-name="ce1">
            <text:p>esteban.ruiz826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21T11:03:00" table:style-name="ce5">
            <text:p>2026-04-21 11:03</text:p>
          </table:table-cell>
          <table:table-cell office:value-type="date" office:date-value="2026-06-14T20:44:00" table:style-name="ce6">
            <text:p>2026-06-14 20:44</text:p>
          </table:table-cell>
          <table:table-cell table:number-columns-repeated="16369"/>
        </table:table-row>
        <table:table-row table:style-name="ro1">
          <table:table-cell office:value-type="float" office:value="827" table:style-name="ce3">
            <text:p>82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4661709</text:p>
          </table:table-cell>
          <table:table-cell office:value-type="string" table:style-name="ce1">
            <text:p>Sara Camila Moreno López</text:p>
          </table:table-cell>
          <table:table-cell office:value-type="date" office:date-value="1980-09-18T00:00:00" table:style-name="ce4">
            <text:p>1980-09-1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4214595</text:p>
          </table:table-cell>
          <table:table-cell office:value-type="string" table:style-name="ce1">
            <text:p>sara.moreno827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7-09T09:49:00" table:style-name="ce5">
            <text:p>2026-07-09 09:49</text:p>
          </table:table-cell>
          <table:table-cell office:value-type="date" office:date-value="2026-07-10T09:04:00" table:style-name="ce6">
            <text:p>2026-07-10 09:04</text:p>
          </table:table-cell>
          <table:table-cell table:number-columns-repeated="16369"/>
        </table:table-row>
        <table:table-row table:style-name="ro1">
          <table:table-cell office:value-type="float" office:value="828" table:style-name="ce3">
            <text:p>82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218341</text:p>
          </table:table-cell>
          <table:table-cell office:value-type="string" table:style-name="ce1">
            <text:p>Tomás Julián Restrepo Hernández</text:p>
          </table:table-cell>
          <table:table-cell office:value-type="date" office:date-value="1966-02-22T00:00:00" table:style-name="ce4">
            <text:p>1966-02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2592071</text:p>
          </table:table-cell>
          <table:table-cell office:value-type="string" table:style-name="ce1">
            <text:p>tomas.restrepo82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14T13:38:00" table:style-name="ce5">
            <text:p>2026-04-14 13:38</text:p>
          </table:table-cell>
          <table:table-cell office:value-type="date" office:date-value="2026-04-18T05:09:00" table:style-name="ce6">
            <text:p>2026-04-18 05:09</text:p>
          </table:table-cell>
          <table:table-cell table:number-columns-repeated="16369"/>
        </table:table-row>
        <table:table-row table:style-name="ro1">
          <table:table-cell office:value-type="float" office:value="829" table:style-name="ce3">
            <text:p>82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1914588</text:p>
          </table:table-cell>
          <table:table-cell office:value-type="string" table:style-name="ce1">
            <text:p>Nicolás Rodríguez Valencia</text:p>
          </table:table-cell>
          <table:table-cell office:value-type="date" office:date-value="1988-05-01T00:00:00" table:style-name="ce4">
            <text:p>1988-05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7922199</text:p>
          </table:table-cell>
          <table:table-cell office:value-type="string" table:style-name="ce1">
            <text:p>nicolas.rodriguez829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10T23:19:00" table:style-name="ce5">
            <text:p>2026-06-10 23:19</text:p>
          </table:table-cell>
          <table:table-cell office:value-type="date" office:date-value="2026-07-07T12:32:00" table:style-name="ce6">
            <text:p>2026-07-07 12:32</text:p>
          </table:table-cell>
          <table:table-cell table:number-columns-repeated="16369"/>
        </table:table-row>
        <table:table-row table:style-name="ro1">
          <table:table-cell office:value-type="float" office:value="830" table:style-name="ce3">
            <text:p>83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657496607</text:p>
          </table:table-cell>
          <table:table-cell office:value-type="string" table:style-name="ce1">
            <text:p>Daniela Catalina Rojas Díaz</text:p>
          </table:table-cell>
          <table:table-cell office:value-type="date" office:date-value="2015-03-24T00:00:00" table:style-name="ce4">
            <text:p>2015-03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2773286</text:p>
          </table:table-cell>
          <table:table-cell office:value-type="string" table:style-name="ce1">
            <text:p>daniela.rojas830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5-26T00:48:00" table:style-name="ce5">
            <text:p>2026-05-26 00:48</text:p>
          </table:table-cell>
          <table:table-cell office:value-type="date" office:date-value="2026-07-03T00:23:00" table:style-name="ce6">
            <text:p>2026-07-03 00:23</text:p>
          </table:table-cell>
          <table:table-cell table:number-columns-repeated="16369"/>
        </table:table-row>
        <table:table-row table:style-name="ro1">
          <table:table-cell office:value-type="float" office:value="831" table:style-name="ce3">
            <text:p>83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72733757</text:p>
          </table:table-cell>
          <table:table-cell office:value-type="string" table:style-name="ce1">
            <text:p>Camila Muñoz González</text:p>
          </table:table-cell>
          <table:table-cell office:value-type="date" office:date-value="1998-03-30T00:00:00" table:style-name="ce4">
            <text:p>1998-03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1178097</text:p>
          </table:table-cell>
          <table:table-cell office:value-type="string" table:style-name="ce1">
            <text:p>camila.munoz83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5-31T08:01:00" table:style-name="ce5">
            <text:p>2026-05-31 08:01</text:p>
          </table:table-cell>
          <table:table-cell office:value-type="date" office:date-value="2026-06-28T16:25:00" table:style-name="ce6">
            <text:p>2026-06-28 16:25</text:p>
          </table:table-cell>
          <table:table-cell table:number-columns-repeated="16369"/>
        </table:table-row>
        <table:table-row table:style-name="ro1">
          <table:table-cell office:value-type="float" office:value="832" table:style-name="ce3">
            <text:p>83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2247312</text:p>
          </table:table-cell>
          <table:table-cell office:value-type="string" table:style-name="ce1">
            <text:p>Luisa Quintero Silva</text:p>
          </table:table-cell>
          <table:table-cell office:value-type="date" office:date-value="1962-01-08T00:00:00" table:style-name="ce4">
            <text:p>1962-01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7725774</text:p>
          </table:table-cell>
          <table:table-cell office:value-type="string" table:style-name="ce1">
            <text:p>luisa.quintero83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5-07T14:12:00" table:style-name="ce5">
            <text:p>2026-05-07 14:12</text:p>
          </table:table-cell>
          <table:table-cell office:value-type="date" office:date-value="2026-06-23T17:44:00" table:style-name="ce6">
            <text:p>2026-06-23 17:44</text:p>
          </table:table-cell>
          <table:table-cell table:number-columns-repeated="16369"/>
        </table:table-row>
        <table:table-row table:style-name="ro1">
          <table:table-cell office:value-type="float" office:value="833" table:style-name="ce3">
            <text:p>833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15712400</text:p>
          </table:table-cell>
          <table:table-cell office:value-type="string" table:style-name="ce1">
            <text:p>Daniel Alejandro Sánchez Vargas</text:p>
          </table:table-cell>
          <table:table-cell office:value-type="date" office:date-value="2010-05-21T00:00:00" table:style-name="ce4">
            <text:p>2010-05-2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2679050</text:p>
          </table:table-cell>
          <table:table-cell office:value-type="string" table:style-name="ce1">
            <text:p>daniel.sanchez83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3-17T09:35:00" table:style-name="ce5">
            <text:p>2026-03-17 09:35</text:p>
          </table:table-cell>
          <table:table-cell office:value-type="date" office:date-value="2026-06-19T13:37:00" table:style-name="ce6">
            <text:p>2026-06-19 13:37</text:p>
          </table:table-cell>
          <table:table-cell table:number-columns-repeated="16369"/>
        </table:table-row>
        <table:table-row table:style-name="ro1">
          <table:table-cell office:value-type="float" office:value="834" table:style-name="ce3">
            <text:p>83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83645397</text:p>
          </table:table-cell>
          <table:table-cell office:value-type="string" table:style-name="ce1">
            <text:p>Nicolás Hernández Cárdenas</text:p>
          </table:table-cell>
          <table:table-cell office:value-type="date" office:date-value="2021-05-07T00:00:00" table:style-name="ce4">
            <text:p>2021-05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2759794</text:p>
          </table:table-cell>
          <table:table-cell office:value-type="string" table:style-name="ce1">
            <text:p>nicolas.hernandez834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13T14:39:00" table:style-name="ce5">
            <text:p>2026-03-13 14:39</text:p>
          </table:table-cell>
          <table:table-cell office:value-type="date" office:date-value="2026-06-06T13:14:00" table:style-name="ce6">
            <text:p>2026-06-06 13:14</text:p>
          </table:table-cell>
          <table:table-cell table:number-columns-repeated="16369"/>
        </table:table-row>
        <table:table-row table:style-name="ro1">
          <table:table-cell office:value-type="float" office:value="835" table:style-name="ce3">
            <text:p>83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3229540</text:p>
          </table:table-cell>
          <table:table-cell office:value-type="string" table:style-name="ce1">
            <text:p>Paula Ruiz Pérez</text:p>
          </table:table-cell>
          <table:table-cell office:value-type="date" office:date-value="1989-07-04T00:00:00" table:style-name="ce4">
            <text:p>1989-07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7914351</text:p>
          </table:table-cell>
          <table:table-cell office:value-type="string" table:style-name="ce1">
            <text:p>paula.ruiz835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12T10:01:00" table:style-name="ce5">
            <text:p>2026-05-12 10:01</text:p>
          </table:table-cell>
          <table:table-cell office:value-type="date" office:date-value="2026-06-11T09:10:00" table:style-name="ce6">
            <text:p>2026-06-11 09:10</text:p>
          </table:table-cell>
          <table:table-cell table:number-columns-repeated="16369"/>
        </table:table-row>
        <table:table-row table:style-name="ro1">
          <table:table-cell office:value-type="float" office:value="836" table:style-name="ce3">
            <text:p>836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708448552</text:p>
          </table:table-cell>
          <table:table-cell office:value-type="string" table:style-name="ce1">
            <text:p>Julián Rodríguez Mendoza</text:p>
          </table:table-cell>
          <table:table-cell office:value-type="date" office:date-value="1976-02-12T00:00:00" table:style-name="ce4">
            <text:p>1976-02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4554482</text:p>
          </table:table-cell>
          <table:table-cell office:value-type="string" table:style-name="ce1">
            <text:p>julian.rodriguez836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17T22:12:00" table:style-name="ce5">
            <text:p>2026-06-17 22:12</text:p>
          </table:table-cell>
          <table:table-cell office:value-type="date" office:date-value="2026-06-28T13:19:00" table:style-name="ce6">
            <text:p>2026-06-28 13:19</text:p>
          </table:table-cell>
          <table:table-cell table:number-columns-repeated="16369"/>
        </table:table-row>
        <table:table-row table:style-name="ro1">
          <table:table-cell office:value-type="float" office:value="837" table:style-name="ce3">
            <text:p>83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47130479</text:p>
          </table:table-cell>
          <table:table-cell office:value-type="string" table:style-name="ce1">
            <text:p>Ricardo Castro Martínez</text:p>
          </table:table-cell>
          <table:table-cell office:value-type="date" office:date-value="1951-08-17T00:00:00" table:style-name="ce4">
            <text:p>1951-08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8832334</text:p>
          </table:table-cell>
          <table:table-cell office:value-type="string" table:style-name="ce1">
            <text:p>ricardo.castro837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3-11T11:46:00" table:style-name="ce5">
            <text:p>2026-03-11 11:46</text:p>
          </table:table-cell>
          <table:table-cell office:value-type="date" office:date-value="2026-04-06T14:46:00" table:style-name="ce6">
            <text:p>2026-04-06 14:46</text:p>
          </table:table-cell>
          <table:table-cell table:number-columns-repeated="16369"/>
        </table:table-row>
        <table:table-row table:style-name="ro1">
          <table:table-cell office:value-type="float" office:value="838" table:style-name="ce3">
            <text:p>83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403404</text:p>
          </table:table-cell>
          <table:table-cell office:value-type="string" table:style-name="ce1">
            <text:p>Felipe Samuel Sánchez Díaz</text:p>
          </table:table-cell>
          <table:table-cell office:value-type="date" office:date-value="1982-03-18T00:00:00" table:style-name="ce4">
            <text:p>1982-03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4317181</text:p>
          </table:table-cell>
          <table:table-cell office:value-type="string" table:style-name="ce1">
            <text:p>felipe.sanchez838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4-26T06:41:00" table:style-name="ce5">
            <text:p>2026-04-26 06:41</text:p>
          </table:table-cell>
          <table:table-cell office:value-type="date" office:date-value="2026-06-25T12:11:00" table:style-name="ce6">
            <text:p>2026-06-25 12:11</text:p>
          </table:table-cell>
          <table:table-cell table:number-columns-repeated="16369"/>
        </table:table-row>
        <table:table-row table:style-name="ro1">
          <table:table-cell office:value-type="float" office:value="839" table:style-name="ce3">
            <text:p>83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73045467</text:p>
          </table:table-cell>
          <table:table-cell office:value-type="string" table:style-name="ce1">
            <text:p>Valentina Diana González García</text:p>
          </table:table-cell>
          <table:table-cell office:value-type="date" office:date-value="1996-02-25T00:00:00" table:style-name="ce4">
            <text:p>1996-02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7703038</text:p>
          </table:table-cell>
          <table:table-cell office:value-type="string" table:style-name="ce1">
            <text:p>valentina.gonzalez839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4-15T06:22:00" table:style-name="ce5">
            <text:p>2026-04-15 06:22</text:p>
          </table:table-cell>
          <table:table-cell office:value-type="date" office:date-value="2026-06-19T20:28:00" table:style-name="ce6">
            <text:p>2026-06-19 20:28</text:p>
          </table:table-cell>
          <table:table-cell table:number-columns-repeated="16369"/>
        </table:table-row>
        <table:table-row table:style-name="ro1">
          <table:table-cell office:value-type="float" office:value="840" table:style-name="ce3">
            <text:p>84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78394657</text:p>
          </table:table-cell>
          <table:table-cell office:value-type="string" table:style-name="ce1">
            <text:p>Cristian Andrés Hernández Ramírez</text:p>
          </table:table-cell>
          <table:table-cell office:value-type="date" office:date-value="2008-06-05T00:00:00" table:style-name="ce4">
            <text:p>2008-06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3012590</text:p>
          </table:table-cell>
          <table:table-cell office:value-type="string" table:style-name="ce1">
            <text:p>cristian.hernandez84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20T13:28:00" table:style-name="ce5">
            <text:p>2026-04-20 13:28</text:p>
          </table:table-cell>
          <table:table-cell office:value-type="date" office:date-value="2026-04-25T03:24:00" table:style-name="ce6">
            <text:p>2026-04-25 03:24</text:p>
          </table:table-cell>
          <table:table-cell table:number-columns-repeated="16369"/>
        </table:table-row>
        <table:table-row table:style-name="ro1">
          <table:table-cell office:value-type="float" office:value="841" table:style-name="ce3">
            <text:p>84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12353605</text:p>
          </table:table-cell>
          <table:table-cell office:value-type="string" table:style-name="ce1">
            <text:p>David Felipe Ospina González</text:p>
          </table:table-cell>
          <table:table-cell office:value-type="date" office:date-value="1986-10-21T00:00:00" table:style-name="ce4">
            <text:p>1986-10-2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7453285</text:p>
          </table:table-cell>
          <table:table-cell office:value-type="string" table:style-name="ce1">
            <text:p>david.ospina841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4-15T03:32:00" table:style-name="ce5">
            <text:p>2026-04-15 03:32</text:p>
          </table:table-cell>
          <table:table-cell office:value-type="date" office:date-value="2026-07-04T11:20:00" table:style-name="ce6">
            <text:p>2026-07-04 11:20</text:p>
          </table:table-cell>
          <table:table-cell table:number-columns-repeated="16369"/>
        </table:table-row>
        <table:table-row table:style-name="ro1">
          <table:table-cell office:value-type="float" office:value="842" table:style-name="ce3">
            <text:p>84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5652573</text:p>
          </table:table-cell>
          <table:table-cell office:value-type="string" table:style-name="ce1">
            <text:p>Ana Valencia Romero</text:p>
          </table:table-cell>
          <table:table-cell office:value-type="date" office:date-value="1996-01-06T00:00:00" table:style-name="ce4">
            <text:p>1996-01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7418553</text:p>
          </table:table-cell>
          <table:table-cell office:value-type="string" table:style-name="ce1">
            <text:p>ana.valencia842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11T12:31:00" table:style-name="ce5">
            <text:p>2026-04-11 12:31</text:p>
          </table:table-cell>
          <table:table-cell office:value-type="date" office:date-value="2026-05-23T13:01:00" table:style-name="ce6">
            <text:p>2026-05-23 13:01</text:p>
          </table:table-cell>
          <table:table-cell table:number-columns-repeated="16369"/>
        </table:table-row>
        <table:table-row table:style-name="ro1">
          <table:table-cell office:value-type="float" office:value="843" table:style-name="ce3">
            <text:p>84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78577069</text:p>
          </table:table-cell>
          <table:table-cell office:value-type="string" table:style-name="ce1">
            <text:p>Andrés Silva Ruiz</text:p>
          </table:table-cell>
          <table:table-cell office:value-type="date" office:date-value="1962-06-14T00:00:00" table:style-name="ce4">
            <text:p>1962-06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4255121</text:p>
          </table:table-cell>
          <table:table-cell office:value-type="string" table:style-name="ce1">
            <text:p>andres.silva843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27T20:17:00" table:style-name="ce5">
            <text:p>2026-06-27 20:17</text:p>
          </table:table-cell>
          <table:table-cell office:value-type="date" office:date-value="2026-07-06T17:23:00" table:style-name="ce6">
            <text:p>2026-07-06 17:23</text:p>
          </table:table-cell>
          <table:table-cell table:number-columns-repeated="16369"/>
        </table:table-row>
        <table:table-row table:style-name="ro1">
          <table:table-cell office:value-type="float" office:value="844" table:style-name="ce3">
            <text:p>84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8023837</text:p>
          </table:table-cell>
          <table:table-cell office:value-type="string" table:style-name="ce1">
            <text:p>Cristian Samuel Torres Restrepo</text:p>
          </table:table-cell>
          <table:table-cell office:value-type="date" office:date-value="1983-07-31T00:00:00" table:style-name="ce4">
            <text:p>1983-07-3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4596097</text:p>
          </table:table-cell>
          <table:table-cell office:value-type="string" table:style-name="ce1">
            <text:p>cristian.torres844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4-24T15:01:00" table:style-name="ce5">
            <text:p>2026-04-24 15:01</text:p>
          </table:table-cell>
          <table:table-cell office:value-type="date" office:date-value="2026-06-22T17:45:00" table:style-name="ce6">
            <text:p>2026-06-22 17:45</text:p>
          </table:table-cell>
          <table:table-cell table:number-columns-repeated="16369"/>
        </table:table-row>
        <table:table-row table:style-name="ro1">
          <table:table-cell office:value-type="float" office:value="845" table:style-name="ce3">
            <text:p>84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9146143</text:p>
          </table:table-cell>
          <table:table-cell office:value-type="string" table:style-name="ce1">
            <text:p>Daniela Silva Rojas</text:p>
          </table:table-cell>
          <table:table-cell office:value-type="date" office:date-value="1991-02-07T00:00:00" table:style-name="ce4">
            <text:p>1991-02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8850094</text:p>
          </table:table-cell>
          <table:table-cell office:value-type="string" table:style-name="ce1">
            <text:p>daniela.silva84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4-01T20:09:00" table:style-name="ce5">
            <text:p>2026-04-01 20:09</text:p>
          </table:table-cell>
          <table:table-cell office:value-type="date" office:date-value="2026-06-30T23:33:00" table:style-name="ce6">
            <text:p>2026-06-30 23:33</text:p>
          </table:table-cell>
          <table:table-cell table:number-columns-repeated="16369"/>
        </table:table-row>
        <table:table-row table:style-name="ro1">
          <table:table-cell office:value-type="float" office:value="846" table:style-name="ce3">
            <text:p>84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04128331</text:p>
          </table:table-cell>
          <table:table-cell office:value-type="string" table:style-name="ce1">
            <text:p>Juan David González García</text:p>
          </table:table-cell>
          <table:table-cell office:value-type="date" office:date-value="1967-02-19T00:00:00" table:style-name="ce4">
            <text:p>1967-02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9662867</text:p>
          </table:table-cell>
          <table:table-cell office:value-type="string" table:style-name="ce1">
            <text:p>juan.gonzalez846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04T05:34:00" table:style-name="ce5">
            <text:p>2026-06-04 05:34</text:p>
          </table:table-cell>
          <table:table-cell office:value-type="date" office:date-value="2026-06-18T08:41:00" table:style-name="ce6">
            <text:p>2026-06-18 08:41</text:p>
          </table:table-cell>
          <table:table-cell table:number-columns-repeated="16369"/>
        </table:table-row>
        <table:table-row table:style-name="ro1">
          <table:table-cell office:value-type="float" office:value="847" table:style-name="ce3">
            <text:p>84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1131571</text:p>
          </table:table-cell>
          <table:table-cell office:value-type="string" table:style-name="ce1">
            <text:p>Valentina Mendoza Ruiz</text:p>
          </table:table-cell>
          <table:table-cell office:value-type="date" office:date-value="1988-09-04T00:00:00" table:style-name="ce4">
            <text:p>1988-09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5070298</text:p>
          </table:table-cell>
          <table:table-cell office:value-type="string" table:style-name="ce1">
            <text:p>valentina.mendoza847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7-03T14:38:00" table:style-name="ce5">
            <text:p>2026-07-03 14:38</text:p>
          </table:table-cell>
          <table:table-cell office:value-type="date" office:date-value="2026-07-04T11:55:00" table:style-name="ce6">
            <text:p>2026-07-04 11:55</text:p>
          </table:table-cell>
          <table:table-cell table:number-columns-repeated="16369"/>
        </table:table-row>
        <table:table-row table:style-name="ro1">
          <table:table-cell office:value-type="float" office:value="848" table:style-name="ce3">
            <text:p>84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85588478</text:p>
          </table:table-cell>
          <table:table-cell office:value-type="string" table:style-name="ce1">
            <text:p>Miguel Jiménez Muñoz</text:p>
          </table:table-cell>
          <table:table-cell office:value-type="date" office:date-value="2004-10-10T00:00:00" table:style-name="ce4">
            <text:p>2004-10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2885983</text:p>
          </table:table-cell>
          <table:table-cell office:value-type="string" table:style-name="ce1">
            <text:p>miguel.jimenez84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3-17T00:51:00" table:style-name="ce5">
            <text:p>2026-03-17 00:51</text:p>
          </table:table-cell>
          <table:table-cell office:value-type="date" office:date-value="2026-03-30T01:43:00" table:style-name="ce6">
            <text:p>2026-03-30 01:43</text:p>
          </table:table-cell>
          <table:table-cell table:number-columns-repeated="16369"/>
        </table:table-row>
        <table:table-row table:style-name="ro1">
          <table:table-cell office:value-type="float" office:value="849" table:style-name="ce3">
            <text:p>84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6521648</text:p>
          </table:table-cell>
          <table:table-cell office:value-type="string" table:style-name="ce1">
            <text:p>Camila López Ruiz</text:p>
          </table:table-cell>
          <table:table-cell office:value-type="date" office:date-value="1963-07-07T00:00:00" table:style-name="ce4">
            <text:p>1963-07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2966623</text:p>
          </table:table-cell>
          <table:table-cell office:value-type="string" table:style-name="ce1">
            <text:p>camila.lopez849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03T14:58:00" table:style-name="ce5">
            <text:p>2026-04-03 14:58</text:p>
          </table:table-cell>
          <table:table-cell office:value-type="date" office:date-value="2026-05-25T04:33:00" table:style-name="ce6">
            <text:p>2026-05-25 04:33</text:p>
          </table:table-cell>
          <table:table-cell table:number-columns-repeated="16369"/>
        </table:table-row>
        <table:table-row table:style-name="ro1">
          <table:table-cell office:value-type="float" office:value="850" table:style-name="ce3">
            <text:p>85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57094760</text:p>
          </table:table-cell>
          <table:table-cell office:value-type="string" table:style-name="ce1">
            <text:p>Nicolás Tomás Moreno Pérez</text:p>
          </table:table-cell>
          <table:table-cell office:value-type="date" office:date-value="1964-05-03T00:00:00" table:style-name="ce4">
            <text:p>1964-05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9119382</text:p>
          </table:table-cell>
          <table:table-cell office:value-type="string" table:style-name="ce1">
            <text:p>nicolas.moreno85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6-15T22:12:00" table:style-name="ce5">
            <text:p>2026-06-15 22:12</text:p>
          </table:table-cell>
          <table:table-cell office:value-type="date" office:date-value="2026-06-16T18:32:00" table:style-name="ce6">
            <text:p>2026-06-16 18:32</text:p>
          </table:table-cell>
          <table:table-cell table:number-columns-repeated="16369"/>
        </table:table-row>
        <table:table-row table:style-name="ro1">
          <table:table-cell office:value-type="float" office:value="851" table:style-name="ce3">
            <text:p>85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9186809</text:p>
          </table:table-cell>
          <table:table-cell office:value-type="string" table:style-name="ce1">
            <text:p>Andrés Giraldo Jiménez</text:p>
          </table:table-cell>
          <table:table-cell office:value-type="date" office:date-value="1971-08-11T00:00:00" table:style-name="ce4">
            <text:p>1971-08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7060180</text:p>
          </table:table-cell>
          <table:table-cell office:value-type="string" table:style-name="ce1">
            <text:p>andres.giraldo851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4-30T09:47:00" table:style-name="ce5">
            <text:p>2026-04-30 09:47</text:p>
          </table:table-cell>
          <table:table-cell office:value-type="date" office:date-value="2026-05-15T15:34:00" table:style-name="ce6">
            <text:p>2026-05-15 15:34</text:p>
          </table:table-cell>
          <table:table-cell table:number-columns-repeated="16369"/>
        </table:table-row>
        <table:table-row table:style-name="ro1">
          <table:table-cell office:value-type="float" office:value="852" table:style-name="ce3">
            <text:p>85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6226680</text:p>
          </table:table-cell>
          <table:table-cell office:value-type="string" table:style-name="ce1">
            <text:p>Carolina Giraldo López</text:p>
          </table:table-cell>
          <table:table-cell office:value-type="date" office:date-value="1967-05-07T00:00:00" table:style-name="ce4">
            <text:p>1967-05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7900477</text:p>
          </table:table-cell>
          <table:table-cell office:value-type="string" table:style-name="ce1">
            <text:p>carolina.giraldo852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3-17T00:26:00" table:style-name="ce5">
            <text:p>2026-03-17 00:26</text:p>
          </table:table-cell>
          <table:table-cell office:value-type="date" office:date-value="2026-04-22T16:11:00" table:style-name="ce6">
            <text:p>2026-04-22 16:11</text:p>
          </table:table-cell>
          <table:table-cell table:number-columns-repeated="16369"/>
        </table:table-row>
        <table:table-row table:style-name="ro1">
          <table:table-cell office:value-type="float" office:value="853" table:style-name="ce3">
            <text:p>85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4974946</text:p>
          </table:table-cell>
          <table:table-cell office:value-type="string" table:style-name="ce1">
            <text:p>Santiago Esteban Ortiz Moreno</text:p>
          </table:table-cell>
          <table:table-cell office:value-type="date" office:date-value="1973-07-11T00:00:00" table:style-name="ce4">
            <text:p>1973-07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8774788</text:p>
          </table:table-cell>
          <table:table-cell office:value-type="string" table:style-name="ce1">
            <text:p>santiago.ortiz853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10T13:57:00" table:style-name="ce5">
            <text:p>2026-05-10 13:57</text:p>
          </table:table-cell>
          <table:table-cell office:value-type="date" office:date-value="2026-06-23T16:59:00" table:style-name="ce6">
            <text:p>2026-06-23 16:59</text:p>
          </table:table-cell>
          <table:table-cell table:number-columns-repeated="16369"/>
        </table:table-row>
        <table:table-row table:style-name="ro1">
          <table:table-cell office:value-type="float" office:value="854" table:style-name="ce3">
            <text:p>854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417279115</text:p>
          </table:table-cell>
          <table:table-cell office:value-type="string" table:style-name="ce1">
            <text:p>Jorge Esteban Torres Ramírez</text:p>
          </table:table-cell>
          <table:table-cell office:value-type="date" office:date-value="1991-05-18T00:00:00" table:style-name="ce4">
            <text:p>1991-05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2048795</text:p>
          </table:table-cell>
          <table:table-cell office:value-type="string" table:style-name="ce1">
            <text:p>jorge.torres854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5-20T11:04:00" table:style-name="ce5">
            <text:p>2026-05-20 11:04</text:p>
          </table:table-cell>
          <table:table-cell office:value-type="date" office:date-value="2026-06-30T02:18:00" table:style-name="ce6">
            <text:p>2026-06-30 02:18</text:p>
          </table:table-cell>
          <table:table-cell table:number-columns-repeated="16369"/>
        </table:table-row>
        <table:table-row table:style-name="ro1">
          <table:table-cell office:value-type="float" office:value="855" table:style-name="ce3">
            <text:p>85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68926157</text:p>
          </table:table-cell>
          <table:table-cell office:value-type="string" table:style-name="ce1">
            <text:p>Julián Moreno Martínez</text:p>
          </table:table-cell>
          <table:table-cell office:value-type="date" office:date-value="1994-04-30T00:00:00" table:style-name="ce4">
            <text:p>1994-04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8679868</text:p>
          </table:table-cell>
          <table:table-cell office:value-type="string" table:style-name="ce1">
            <text:p>julian.moreno855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21T06:47:00" table:style-name="ce5">
            <text:p>2026-04-21 06:47</text:p>
          </table:table-cell>
          <table:table-cell office:value-type="date" office:date-value="2026-04-22T19:01:00" table:style-name="ce6">
            <text:p>2026-04-22 19:01</text:p>
          </table:table-cell>
          <table:table-cell table:number-columns-repeated="16369"/>
        </table:table-row>
        <table:table-row table:style-name="ro1">
          <table:table-cell office:value-type="float" office:value="856" table:style-name="ce3">
            <text:p>85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8430379</text:p>
          </table:table-cell>
          <table:table-cell office:value-type="string" table:style-name="ce1">
            <text:p>Nicolás Pérez Giraldo</text:p>
          </table:table-cell>
          <table:table-cell office:value-type="date" office:date-value="1995-12-04T00:00:00" table:style-name="ce4">
            <text:p>1995-12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4238072</text:p>
          </table:table-cell>
          <table:table-cell office:value-type="string" table:style-name="ce1">
            <text:p>nicolas.perez85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4-25T03:42:00" table:style-name="ce5">
            <text:p>2026-04-25 03:42</text:p>
          </table:table-cell>
          <table:table-cell office:value-type="date" office:date-value="2026-05-26T04:12:00" table:style-name="ce6">
            <text:p>2026-05-26 04:12</text:p>
          </table:table-cell>
          <table:table-cell table:number-columns-repeated="16369"/>
        </table:table-row>
        <table:table-row table:style-name="ro1">
          <table:table-cell office:value-type="float" office:value="857" table:style-name="ce3">
            <text:p>85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56317953</text:p>
          </table:table-cell>
          <table:table-cell office:value-type="string" table:style-name="ce1">
            <text:p>Miguel Pérez Romero</text:p>
          </table:table-cell>
          <table:table-cell office:value-type="date" office:date-value="1987-01-23T00:00:00" table:style-name="ce4">
            <text:p>1987-01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1467669</text:p>
          </table:table-cell>
          <table:table-cell office:value-type="string" table:style-name="ce1">
            <text:p>miguel.perez85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23T19:53:00" table:style-name="ce5">
            <text:p>2026-06-23 19:53</text:p>
          </table:table-cell>
          <table:table-cell office:value-type="date" office:date-value="2026-07-09T04:52:00" table:style-name="ce6">
            <text:p>2026-07-09 04:52</text:p>
          </table:table-cell>
          <table:table-cell table:number-columns-repeated="16369"/>
        </table:table-row>
        <table:table-row table:style-name="ro1">
          <table:table-cell office:value-type="float" office:value="858" table:style-name="ce3">
            <text:p>85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75387630</text:p>
          </table:table-cell>
          <table:table-cell office:value-type="string" table:style-name="ce1">
            <text:p>Sebastián Jorge Torres López</text:p>
          </table:table-cell>
          <table:table-cell office:value-type="date" office:date-value="1976-09-20T00:00:00" table:style-name="ce4">
            <text:p>1976-09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9170640</text:p>
          </table:table-cell>
          <table:table-cell office:value-type="string" table:style-name="ce1">
            <text:p>sebastian.torres858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30T01:51:00" table:style-name="ce5">
            <text:p>2026-04-30 01:51</text:p>
          </table:table-cell>
          <table:table-cell office:value-type="date" office:date-value="2026-05-02T06:08:00" table:style-name="ce6">
            <text:p>2026-05-02 06:08</text:p>
          </table:table-cell>
          <table:table-cell table:number-columns-repeated="16369"/>
        </table:table-row>
        <table:table-row table:style-name="ro1">
          <table:table-cell office:value-type="float" office:value="859" table:style-name="ce3">
            <text:p>85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57956292</text:p>
          </table:table-cell>
          <table:table-cell office:value-type="string" table:style-name="ce1">
            <text:p>Manuela Catalina Giraldo Quintero</text:p>
          </table:table-cell>
          <table:table-cell office:value-type="date" office:date-value="1953-12-22T00:00:00" table:style-name="ce4">
            <text:p>1953-12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5869330</text:p>
          </table:table-cell>
          <table:table-cell office:value-type="string" table:style-name="ce1">
            <text:p>manuela.giraldo85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14T00:19:00" table:style-name="ce5">
            <text:p>2026-05-14 00:19</text:p>
          </table:table-cell>
          <table:table-cell office:value-type="date" office:date-value="2026-05-27T02:31:00" table:style-name="ce6">
            <text:p>2026-05-27 02:31</text:p>
          </table:table-cell>
          <table:table-cell table:number-columns-repeated="16369"/>
        </table:table-row>
        <table:table-row table:style-name="ro1">
          <table:table-cell office:value-type="float" office:value="860" table:style-name="ce3">
            <text:p>86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43765931</text:p>
          </table:table-cell>
          <table:table-cell office:value-type="string" table:style-name="ce1">
            <text:p>Juliana Díaz Ortiz</text:p>
          </table:table-cell>
          <table:table-cell office:value-type="date" office:date-value="1967-02-15T00:00:00" table:style-name="ce4">
            <text:p>1967-02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8097777</text:p>
          </table:table-cell>
          <table:table-cell office:value-type="string" table:style-name="ce1">
            <text:p>juliana.diaz86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07T11:45:00" table:style-name="ce5">
            <text:p>2026-05-07 11:45</text:p>
          </table:table-cell>
          <table:table-cell office:value-type="date" office:date-value="2026-05-23T01:31:00" table:style-name="ce6">
            <text:p>2026-05-23 01:31</text:p>
          </table:table-cell>
          <table:table-cell table:number-columns-repeated="16369"/>
        </table:table-row>
        <table:table-row table:style-name="ro1">
          <table:table-cell office:value-type="float" office:value="861" table:style-name="ce3">
            <text:p>86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7379101</text:p>
          </table:table-cell>
          <table:table-cell office:value-type="string" table:style-name="ce1">
            <text:p>Manuela Cárdenas Martínez</text:p>
          </table:table-cell>
          <table:table-cell office:value-type="date" office:date-value="1971-12-13T00:00:00" table:style-name="ce4">
            <text:p>1971-12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6477726</text:p>
          </table:table-cell>
          <table:table-cell office:value-type="string" table:style-name="ce1">
            <text:p>manuela.cardenas861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20T14:00:00" table:style-name="ce5">
            <text:p>2026-06-20 14:00</text:p>
          </table:table-cell>
          <table:table-cell office:value-type="date" office:date-value="2026-06-26T02:30:00" table:style-name="ce6">
            <text:p>2026-06-26 02:30</text:p>
          </table:table-cell>
          <table:table-cell table:number-columns-repeated="16369"/>
        </table:table-row>
        <table:table-row table:style-name="ro1">
          <table:table-cell office:value-type="float" office:value="862" table:style-name="ce3">
            <text:p>86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6540227</text:p>
          </table:table-cell>
          <table:table-cell office:value-type="string" table:style-name="ce1">
            <text:p>Luisa Moreno López</text:p>
          </table:table-cell>
          <table:table-cell office:value-type="date" office:date-value="1964-01-09T00:00:00" table:style-name="ce4">
            <text:p>1964-01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8687689</text:p>
          </table:table-cell>
          <table:table-cell office:value-type="string" table:style-name="ce1">
            <text:p>luisa.moreno862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5-19T12:50:00" table:style-name="ce5">
            <text:p>2026-05-19 12:50</text:p>
          </table:table-cell>
          <table:table-cell office:value-type="date" office:date-value="2026-06-29T23:25:00" table:style-name="ce6">
            <text:p>2026-06-29 23:25</text:p>
          </table:table-cell>
          <table:table-cell table:number-columns-repeated="16369"/>
        </table:table-row>
        <table:table-row table:style-name="ro1">
          <table:table-cell office:value-type="float" office:value="863" table:style-name="ce3">
            <text:p>86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90911025</text:p>
          </table:table-cell>
          <table:table-cell office:value-type="string" table:style-name="ce1">
            <text:p>Manuela Quintero Rojas</text:p>
          </table:table-cell>
          <table:table-cell office:value-type="date" office:date-value="1981-08-24T00:00:00" table:style-name="ce4">
            <text:p>1981-08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1364706</text:p>
          </table:table-cell>
          <table:table-cell office:value-type="string" table:style-name="ce1">
            <text:p>manuela.quintero86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7-05T14:01:00" table:style-name="ce5">
            <text:p>2026-07-05 14:01</text:p>
          </table:table-cell>
          <table:table-cell office:value-type="date" office:date-value="2026-07-10T08:56:00" table:style-name="ce6">
            <text:p>2026-07-10 08:56</text:p>
          </table:table-cell>
          <table:table-cell table:number-columns-repeated="16369"/>
        </table:table-row>
        <table:table-row table:style-name="ro1">
          <table:table-cell office:value-type="float" office:value="864" table:style-name="ce3">
            <text:p>86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26040481</text:p>
          </table:table-cell>
          <table:table-cell office:value-type="string" table:style-name="ce1">
            <text:p>Tomás José Castaño Jiménez</text:p>
          </table:table-cell>
          <table:table-cell office:value-type="date" office:date-value="2010-12-25T00:00:00" table:style-name="ce4">
            <text:p>2010-12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8511506</text:p>
          </table:table-cell>
          <table:table-cell office:value-type="string" table:style-name="ce1">
            <text:p>tomas.castano864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03T09:04:00" table:style-name="ce5">
            <text:p>2026-05-03 09:04</text:p>
          </table:table-cell>
          <table:table-cell office:value-type="date" office:date-value="2026-06-30T05:17:00" table:style-name="ce6">
            <text:p>2026-06-30 05:17</text:p>
          </table:table-cell>
          <table:table-cell table:number-columns-repeated="16369"/>
        </table:table-row>
        <table:table-row table:style-name="ro1">
          <table:table-cell office:value-type="float" office:value="865" table:style-name="ce3">
            <text:p>865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75445249</text:p>
          </table:table-cell>
          <table:table-cell office:value-type="string" table:style-name="ce1">
            <text:p>Catalina Daniela Ruiz Martínez</text:p>
          </table:table-cell>
          <table:table-cell office:value-type="date" office:date-value="2016-09-28T00:00:00" table:style-name="ce4">
            <text:p>2016-09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8237610</text:p>
          </table:table-cell>
          <table:table-cell office:value-type="string" table:style-name="ce1">
            <text:p>catalina.ruiz865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05T21:18:00" table:style-name="ce5">
            <text:p>2026-05-05 21:18</text:p>
          </table:table-cell>
          <table:table-cell office:value-type="date" office:date-value="2026-06-28T22:17:00" table:style-name="ce6">
            <text:p>2026-06-28 22:17</text:p>
          </table:table-cell>
          <table:table-cell table:number-columns-repeated="16369"/>
        </table:table-row>
        <table:table-row table:style-name="ro1">
          <table:table-cell office:value-type="float" office:value="866" table:style-name="ce3">
            <text:p>86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54620588</text:p>
          </table:table-cell>
          <table:table-cell office:value-type="string" table:style-name="ce1">
            <text:p>Sofía Muñoz Vargas</text:p>
          </table:table-cell>
          <table:table-cell office:value-type="date" office:date-value="1985-09-18T00:00:00" table:style-name="ce4">
            <text:p>1985-09-1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1672835</text:p>
          </table:table-cell>
          <table:table-cell office:value-type="string" table:style-name="ce1">
            <text:p>sofia.munoz866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14T06:45:00" table:style-name="ce5">
            <text:p>2026-06-14 06:45</text:p>
          </table:table-cell>
          <table:table-cell office:value-type="date" office:date-value="2026-07-03T18:06:00" table:style-name="ce6">
            <text:p>2026-07-03 18:06</text:p>
          </table:table-cell>
          <table:table-cell table:number-columns-repeated="16369"/>
        </table:table-row>
        <table:table-row table:style-name="ro1">
          <table:table-cell office:value-type="float" office:value="867" table:style-name="ce3">
            <text:p>86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2879367</text:p>
          </table:table-cell>
          <table:table-cell office:value-type="string" table:style-name="ce1">
            <text:p>Gabriela Ortiz Ramírez</text:p>
          </table:table-cell>
          <table:table-cell office:value-type="date" office:date-value="1965-08-30T00:00:00" table:style-name="ce4">
            <text:p>1965-08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1653462</text:p>
          </table:table-cell>
          <table:table-cell office:value-type="string" table:style-name="ce1">
            <text:p>gabriela.ortiz86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05T14:08:00" table:style-name="ce5">
            <text:p>2026-06-05 14:08</text:p>
          </table:table-cell>
          <table:table-cell office:value-type="date" office:date-value="2026-06-30T17:01:00" table:style-name="ce6">
            <text:p>2026-06-30 17:01</text:p>
          </table:table-cell>
          <table:table-cell table:number-columns-repeated="16369"/>
        </table:table-row>
        <table:table-row table:style-name="ro1">
          <table:table-cell office:value-type="float" office:value="868" table:style-name="ce3">
            <text:p>86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99054518</text:p>
          </table:table-cell>
          <table:table-cell office:value-type="string" table:style-name="ce1">
            <text:p>Sebastián López Rodríguez</text:p>
          </table:table-cell>
          <table:table-cell office:value-type="date" office:date-value="1990-11-27T00:00:00" table:style-name="ce4">
            <text:p>1990-11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2362039</text:p>
          </table:table-cell>
          <table:table-cell office:value-type="string" table:style-name="ce1">
            <text:p>sebastian.lopez868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01T06:08:00" table:style-name="ce5">
            <text:p>2026-05-01 06:08</text:p>
          </table:table-cell>
          <table:table-cell office:value-type="date" office:date-value="2026-05-08T00:56:00" table:style-name="ce6">
            <text:p>2026-05-08 00:56</text:p>
          </table:table-cell>
          <table:table-cell table:number-columns-repeated="16369"/>
        </table:table-row>
        <table:table-row table:style-name="ro1">
          <table:table-cell office:value-type="float" office:value="869" table:style-name="ce3">
            <text:p>86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69413813</text:p>
          </table:table-cell>
          <table:table-cell office:value-type="string" table:style-name="ce1">
            <text:p>Alejandro Jiménez Hernández</text:p>
          </table:table-cell>
          <table:table-cell office:value-type="date" office:date-value="1971-02-19T00:00:00" table:style-name="ce4">
            <text:p>1971-02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6324142</text:p>
          </table:table-cell>
          <table:table-cell office:value-type="string" table:style-name="ce1">
            <text:p>alejandro.jimenez869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5-05T04:56:00" table:style-name="ce5">
            <text:p>2026-05-05 04:56</text:p>
          </table:table-cell>
          <table:table-cell office:value-type="date" office:date-value="2026-06-06T05:14:00" table:style-name="ce6">
            <text:p>2026-06-06 05:14</text:p>
          </table:table-cell>
          <table:table-cell table:number-columns-repeated="16369"/>
        </table:table-row>
        <table:table-row table:style-name="ro1">
          <table:table-cell office:value-type="float" office:value="870" table:style-name="ce3">
            <text:p>87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44892396</text:p>
          </table:table-cell>
          <table:table-cell office:value-type="string" table:style-name="ce1">
            <text:p>Carolina Ruiz Díaz</text:p>
          </table:table-cell>
          <table:table-cell office:value-type="date" office:date-value="1949-06-19T00:00:00" table:style-name="ce4">
            <text:p>1949-06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7334948</text:p>
          </table:table-cell>
          <table:table-cell office:value-type="string" table:style-name="ce1">
            <text:p>carolina.ruiz870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27T05:39:00" table:style-name="ce5">
            <text:p>2026-05-27 05:39</text:p>
          </table:table-cell>
          <table:table-cell office:value-type="date" office:date-value="2026-06-01T10:05:00" table:style-name="ce6">
            <text:p>2026-06-01 10:05</text:p>
          </table:table-cell>
          <table:table-cell table:number-columns-repeated="16369"/>
        </table:table-row>
        <table:table-row table:style-name="ro1">
          <table:table-cell office:value-type="float" office:value="871" table:style-name="ce3">
            <text:p>87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79963194</text:p>
          </table:table-cell>
          <table:table-cell office:value-type="string" table:style-name="ce1">
            <text:p>Andrés Díaz González</text:p>
          </table:table-cell>
          <table:table-cell office:value-type="date" office:date-value="1999-05-14T00:00:00" table:style-name="ce4">
            <text:p>1999-05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1254945</text:p>
          </table:table-cell>
          <table:table-cell office:value-type="string" table:style-name="ce1">
            <text:p>andres.diaz871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3-23T14:42:00" table:style-name="ce5">
            <text:p>2026-03-23 14:42</text:p>
          </table:table-cell>
          <table:table-cell office:value-type="date" office:date-value="2026-04-22T15:31:00" table:style-name="ce6">
            <text:p>2026-04-22 15:31</text:p>
          </table:table-cell>
          <table:table-cell table:number-columns-repeated="16369"/>
        </table:table-row>
        <table:table-row table:style-name="ro1">
          <table:table-cell office:value-type="float" office:value="872" table:style-name="ce3">
            <text:p>87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5457342</text:p>
          </table:table-cell>
          <table:table-cell office:value-type="string" table:style-name="ce1">
            <text:p>Jorge Nicolás Rodríguez Díaz</text:p>
          </table:table-cell>
          <table:table-cell office:value-type="date" office:date-value="1965-02-09T00:00:00" table:style-name="ce4">
            <text:p>1965-02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6756931</text:p>
          </table:table-cell>
          <table:table-cell office:value-type="string" table:style-name="ce1">
            <text:p>jorge.rodriguez872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09T17:46:00" table:style-name="ce5">
            <text:p>2026-06-09 17:46</text:p>
          </table:table-cell>
          <table:table-cell office:value-type="date" office:date-value="2026-06-12T20:02:00" table:style-name="ce6">
            <text:p>2026-06-12 20:02</text:p>
          </table:table-cell>
          <table:table-cell table:number-columns-repeated="16369"/>
        </table:table-row>
        <table:table-row table:style-name="ro1">
          <table:table-cell office:value-type="float" office:value="873" table:style-name="ce3">
            <text:p>87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5133498</text:p>
          </table:table-cell>
          <table:table-cell office:value-type="string" table:style-name="ce1">
            <text:p>Manuela Giraldo Castaño</text:p>
          </table:table-cell>
          <table:table-cell office:value-type="date" office:date-value="2001-03-30T00:00:00" table:style-name="ce4">
            <text:p>2001-03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7196140</text:p>
          </table:table-cell>
          <table:table-cell office:value-type="string" table:style-name="ce1">
            <text:p>manuela.giraldo873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04T06:03:00" table:style-name="ce5">
            <text:p>2026-04-04 06:03</text:p>
          </table:table-cell>
          <table:table-cell office:value-type="date" office:date-value="2026-05-31T16:15:00" table:style-name="ce6">
            <text:p>2026-05-31 16:15</text:p>
          </table:table-cell>
          <table:table-cell table:number-columns-repeated="16369"/>
        </table:table-row>
        <table:table-row table:style-name="ro1">
          <table:table-cell office:value-type="float" office:value="874" table:style-name="ce3">
            <text:p>874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282743336</text:p>
          </table:table-cell>
          <table:table-cell office:value-type="string" table:style-name="ce1">
            <text:p>Alejandro García Ruiz</text:p>
          </table:table-cell>
          <table:table-cell office:value-type="date" office:date-value="1957-02-03T00:00:00" table:style-name="ce4">
            <text:p>1957-02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1161831</text:p>
          </table:table-cell>
          <table:table-cell office:value-type="string" table:style-name="ce1">
            <text:p>alejandro.garcia874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18T12:21:00" table:style-name="ce5">
            <text:p>2026-04-18 12:21</text:p>
          </table:table-cell>
          <table:table-cell office:value-type="date" office:date-value="2026-05-27T04:35:00" table:style-name="ce6">
            <text:p>2026-05-27 04:35</text:p>
          </table:table-cell>
          <table:table-cell table:number-columns-repeated="16369"/>
        </table:table-row>
        <table:table-row table:style-name="ro1">
          <table:table-cell office:value-type="float" office:value="875" table:style-name="ce3">
            <text:p>87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70162879</text:p>
          </table:table-cell>
          <table:table-cell office:value-type="string" table:style-name="ce1">
            <text:p>Juliana Jiménez Silva</text:p>
          </table:table-cell>
          <table:table-cell office:value-type="date" office:date-value="1956-12-06T00:00:00" table:style-name="ce4">
            <text:p>1956-12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1081077</text:p>
          </table:table-cell>
          <table:table-cell office:value-type="string" table:style-name="ce1">
            <text:p>juliana.jimenez875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6-17T10:52:00" table:style-name="ce5">
            <text:p>2026-06-17 10:52</text:p>
          </table:table-cell>
          <table:table-cell office:value-type="date" office:date-value="2026-07-05T04:35:00" table:style-name="ce6">
            <text:p>2026-07-05 04:35</text:p>
          </table:table-cell>
          <table:table-cell table:number-columns-repeated="16369"/>
        </table:table-row>
        <table:table-row table:style-name="ro1">
          <table:table-cell office:value-type="float" office:value="876" table:style-name="ce3">
            <text:p>87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38051448</text:p>
          </table:table-cell>
          <table:table-cell office:value-type="string" table:style-name="ce1">
            <text:p>Diana García Muñoz</text:p>
          </table:table-cell>
          <table:table-cell office:value-type="date" office:date-value="1975-04-16T00:00:00" table:style-name="ce4">
            <text:p>1975-04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9167904</text:p>
          </table:table-cell>
          <table:table-cell office:value-type="string" table:style-name="ce1">
            <text:p>diana.garcia87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3-29T21:47:00" table:style-name="ce5">
            <text:p>2026-03-29 21:47</text:p>
          </table:table-cell>
          <table:table-cell office:value-type="date" office:date-value="2026-05-04T03:02:00" table:style-name="ce6">
            <text:p>2026-05-04 03:02</text:p>
          </table:table-cell>
          <table:table-cell table:number-columns-repeated="16369"/>
        </table:table-row>
        <table:table-row table:style-name="ro1">
          <table:table-cell office:value-type="float" office:value="877" table:style-name="ce3">
            <text:p>87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3544077</text:p>
          </table:table-cell>
          <table:table-cell office:value-type="string" table:style-name="ce1">
            <text:p>Alejandro Pérez Cárdenas</text:p>
          </table:table-cell>
          <table:table-cell office:value-type="date" office:date-value="1968-12-14T00:00:00" table:style-name="ce4">
            <text:p>1968-12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9724137</text:p>
          </table:table-cell>
          <table:table-cell office:value-type="string" table:style-name="ce1">
            <text:p>alejandro.perez877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23T19:02:00" table:style-name="ce5">
            <text:p>2026-06-23 19:02</text:p>
          </table:table-cell>
          <table:table-cell office:value-type="date" office:date-value="2026-07-10T01:05:00" table:style-name="ce6">
            <text:p>2026-07-10 01:05</text:p>
          </table:table-cell>
          <table:table-cell table:number-columns-repeated="16369"/>
        </table:table-row>
        <table:table-row table:style-name="ro1">
          <table:table-cell office:value-type="float" office:value="878" table:style-name="ce3">
            <text:p>878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591181816</text:p>
          </table:table-cell>
          <table:table-cell office:value-type="string" table:style-name="ce1">
            <text:p>Sebastián Sánchez Ortiz</text:p>
          </table:table-cell>
          <table:table-cell office:value-type="date" office:date-value="2019-08-01T00:00:00" table:style-name="ce4">
            <text:p>2019-08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3000056</text:p>
          </table:table-cell>
          <table:table-cell office:value-type="string" table:style-name="ce1">
            <text:p>sebastian.sanchez878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19T14:45:00" table:style-name="ce5">
            <text:p>2026-05-19 14:45</text:p>
          </table:table-cell>
          <table:table-cell office:value-type="date" office:date-value="2026-05-26T04:44:00" table:style-name="ce6">
            <text:p>2026-05-26 04:44</text:p>
          </table:table-cell>
          <table:table-cell table:number-columns-repeated="16369"/>
        </table:table-row>
        <table:table-row table:style-name="ro1">
          <table:table-cell office:value-type="float" office:value="879" table:style-name="ce3">
            <text:p>87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32411479</text:p>
          </table:table-cell>
          <table:table-cell office:value-type="string" table:style-name="ce1">
            <text:p>Ricardo Vargas Romero</text:p>
          </table:table-cell>
          <table:table-cell office:value-type="date" office:date-value="1991-08-24T00:00:00" table:style-name="ce4">
            <text:p>1991-08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3423126</text:p>
          </table:table-cell>
          <table:table-cell office:value-type="string" table:style-name="ce1">
            <text:p>ricardo.vargas879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03T19:11:00" table:style-name="ce5">
            <text:p>2026-06-03 19:11</text:p>
          </table:table-cell>
          <table:table-cell office:value-type="date" office:date-value="2026-06-11T12:20:00" table:style-name="ce6">
            <text:p>2026-06-11 12:20</text:p>
          </table:table-cell>
          <table:table-cell table:number-columns-repeated="16369"/>
        </table:table-row>
        <table:table-row table:style-name="ro1">
          <table:table-cell office:value-type="float" office:value="880" table:style-name="ce3">
            <text:p>88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11200960</text:p>
          </table:table-cell>
          <table:table-cell office:value-type="string" table:style-name="ce1">
            <text:p>Ana Rodríguez Ortiz</text:p>
          </table:table-cell>
          <table:table-cell office:value-type="date" office:date-value="1957-07-17T00:00:00" table:style-name="ce4">
            <text:p>1957-07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8117510</text:p>
          </table:table-cell>
          <table:table-cell office:value-type="string" table:style-name="ce1">
            <text:p>ana.rodriguez880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6-29T08:51:00" table:style-name="ce5">
            <text:p>2026-06-29 08:51</text:p>
          </table:table-cell>
          <table:table-cell office:value-type="date" office:date-value="2026-07-08T19:45:00" table:style-name="ce6">
            <text:p>2026-07-08 19:45</text:p>
          </table:table-cell>
          <table:table-cell table:number-columns-repeated="16369"/>
        </table:table-row>
        <table:table-row table:style-name="ro1">
          <table:table-cell office:value-type="float" office:value="881" table:style-name="ce3">
            <text:p>88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61364486</text:p>
          </table:table-cell>
          <table:table-cell office:value-type="string" table:style-name="ce1">
            <text:p>Andrea Moreno Romero</text:p>
          </table:table-cell>
          <table:table-cell office:value-type="date" office:date-value="1948-01-22T00:00:00" table:style-name="ce4">
            <text:p>1948-01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2057337</text:p>
          </table:table-cell>
          <table:table-cell office:value-type="string" table:style-name="ce1">
            <text:p>andrea.moreno88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5-08T18:09:00" table:style-name="ce5">
            <text:p>2026-05-08 18:09</text:p>
          </table:table-cell>
          <table:table-cell office:value-type="date" office:date-value="2026-07-08T01:06:00" table:style-name="ce6">
            <text:p>2026-07-08 01:06</text:p>
          </table:table-cell>
          <table:table-cell table:number-columns-repeated="16369"/>
        </table:table-row>
        <table:table-row table:style-name="ro1">
          <table:table-cell office:value-type="float" office:value="882" table:style-name="ce3">
            <text:p>882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698225656</text:p>
          </table:table-cell>
          <table:table-cell office:value-type="string" table:style-name="ce1">
            <text:p>Alejandra Juliana Martínez Jiménez</text:p>
          </table:table-cell>
          <table:table-cell office:value-type="date" office:date-value="1945-03-10T00:00:00" table:style-name="ce4">
            <text:p>1945-03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2235378</text:p>
          </table:table-cell>
          <table:table-cell office:value-type="string" table:style-name="ce1">
            <text:p>alejandra.martinez88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06T19:19:00" table:style-name="ce5">
            <text:p>2026-04-06 19:19</text:p>
          </table:table-cell>
          <table:table-cell office:value-type="date" office:date-value="2026-04-19T21:10:00" table:style-name="ce6">
            <text:p>2026-04-19 21:10</text:p>
          </table:table-cell>
          <table:table-cell table:number-columns-repeated="16369"/>
        </table:table-row>
        <table:table-row table:style-name="ro1">
          <table:table-cell office:value-type="float" office:value="883" table:style-name="ce3">
            <text:p>88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60201895</text:p>
          </table:table-cell>
          <table:table-cell office:value-type="string" table:style-name="ce1">
            <text:p>Diana Ruiz Díaz</text:p>
          </table:table-cell>
          <table:table-cell office:value-type="date" office:date-value="1985-01-02T00:00:00" table:style-name="ce4">
            <text:p>1985-01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5191204</text:p>
          </table:table-cell>
          <table:table-cell office:value-type="string" table:style-name="ce1">
            <text:p>diana.ruiz883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15T13:03:00" table:style-name="ce5">
            <text:p>2026-04-15 13:03</text:p>
          </table:table-cell>
          <table:table-cell office:value-type="date" office:date-value="2026-04-30T05:43:00" table:style-name="ce6">
            <text:p>2026-04-30 05:43</text:p>
          </table:table-cell>
          <table:table-cell table:number-columns-repeated="16369"/>
        </table:table-row>
        <table:table-row table:style-name="ro1">
          <table:table-cell office:value-type="float" office:value="884" table:style-name="ce3">
            <text:p>88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211309123</text:p>
          </table:table-cell>
          <table:table-cell office:value-type="string" table:style-name="ce1">
            <text:p>Carlos Julián Jiménez Muñoz</text:p>
          </table:table-cell>
          <table:table-cell office:value-type="date" office:date-value="2014-06-02T00:00:00" table:style-name="ce4">
            <text:p>2014-06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4122221</text:p>
          </table:table-cell>
          <table:table-cell office:value-type="string" table:style-name="ce1">
            <text:p>carlos.jimenez88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13T07:32:00" table:style-name="ce5">
            <text:p>2026-05-13 07:32</text:p>
          </table:table-cell>
          <table:table-cell office:value-type="date" office:date-value="2026-07-08T12:31:00" table:style-name="ce6">
            <text:p>2026-07-08 12:31</text:p>
          </table:table-cell>
          <table:table-cell table:number-columns-repeated="16369"/>
        </table:table-row>
        <table:table-row table:style-name="ro1">
          <table:table-cell office:value-type="float" office:value="885" table:style-name="ce3">
            <text:p>88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9792090</text:p>
          </table:table-cell>
          <table:table-cell office:value-type="string" table:style-name="ce1">
            <text:p>Andrés Cárdenas Rodríguez</text:p>
          </table:table-cell>
          <table:table-cell office:value-type="date" office:date-value="1984-04-15T00:00:00" table:style-name="ce4">
            <text:p>1984-04-15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131576334</text:p>
          </table:table-cell>
          <table:table-cell office:value-type="string" table:style-name="ce1">
            <text:p>andres.cardenas885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11T10:37:00" table:style-name="ce5">
            <text:p>2026-04-11 10:37</text:p>
          </table:table-cell>
          <table:table-cell office:value-type="date" office:date-value="2026-07-09T15:42:00" table:style-name="ce6">
            <text:p>2026-07-09 15:42</text:p>
          </table:table-cell>
          <table:table-cell table:number-columns-repeated="16369"/>
        </table:table-row>
        <table:table-row table:style-name="ro1">
          <table:table-cell office:value-type="float" office:value="886" table:style-name="ce3">
            <text:p>88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14514460</text:p>
          </table:table-cell>
          <table:table-cell office:value-type="string" table:style-name="ce1">
            <text:p>Carolina Diana Mendoza Jiménez</text:p>
          </table:table-cell>
          <table:table-cell office:value-type="date" office:date-value="1996-04-21T00:00:00" table:style-name="ce4">
            <text:p>1996-04-2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4283995</text:p>
          </table:table-cell>
          <table:table-cell office:value-type="string" table:style-name="ce1">
            <text:p>carolina.mendoza886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6-12T14:45:00" table:style-name="ce5">
            <text:p>2026-06-12 14:45</text:p>
          </table:table-cell>
          <table:table-cell office:value-type="date" office:date-value="2026-06-14T05:10:00" table:style-name="ce6">
            <text:p>2026-06-14 05:10</text:p>
          </table:table-cell>
          <table:table-cell table:number-columns-repeated="16369"/>
        </table:table-row>
        <table:table-row table:style-name="ro1">
          <table:table-cell office:value-type="float" office:value="887" table:style-name="ce3">
            <text:p>88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10686042</text:p>
          </table:table-cell>
          <table:table-cell office:value-type="string" table:style-name="ce1">
            <text:p>Juliana González Vargas</text:p>
          </table:table-cell>
          <table:table-cell office:value-type="date" office:date-value="1977-05-14T00:00:00" table:style-name="ce4">
            <text:p>1977-05-1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3228400</text:p>
          </table:table-cell>
          <table:table-cell office:value-type="string" table:style-name="ce1">
            <text:p>juliana.gonzalez887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7-01T15:50:00" table:style-name="ce5">
            <text:p>2026-07-01 15:50</text:p>
          </table:table-cell>
          <table:table-cell office:value-type="date" office:date-value="2026-07-07T19:19:00" table:style-name="ce6">
            <text:p>2026-07-07 19:19</text:p>
          </table:table-cell>
          <table:table-cell table:number-columns-repeated="16369"/>
        </table:table-row>
        <table:table-row table:style-name="ro1">
          <table:table-cell office:value-type="float" office:value="888" table:style-name="ce3">
            <text:p>888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064445277</text:p>
          </table:table-cell>
          <table:table-cell office:value-type="string" table:style-name="ce1">
            <text:p>Cristian Hernández Martínez</text:p>
          </table:table-cell>
          <table:table-cell office:value-type="date" office:date-value="2018-12-19T00:00:00" table:style-name="ce4">
            <text:p>2018-12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3375867</text:p>
          </table:table-cell>
          <table:table-cell office:value-type="string" table:style-name="ce1">
            <text:p>cristian.hernandez888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09T20:04:00" table:style-name="ce5">
            <text:p>2026-06-09 20:04</text:p>
          </table:table-cell>
          <table:table-cell office:value-type="date" office:date-value="2026-07-04T18:21:00" table:style-name="ce6">
            <text:p>2026-07-04 18:21</text:p>
          </table:table-cell>
          <table:table-cell table:number-columns-repeated="16369"/>
        </table:table-row>
        <table:table-row table:style-name="ro1">
          <table:table-cell office:value-type="float" office:value="889" table:style-name="ce3">
            <text:p>88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9217843</text:p>
          </table:table-cell>
          <table:table-cell office:value-type="string" table:style-name="ce1">
            <text:p>David Ortiz Álvarez</text:p>
          </table:table-cell>
          <table:table-cell office:value-type="date" office:date-value="1994-02-25T00:00:00" table:style-name="ce4">
            <text:p>1994-02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4970323</text:p>
          </table:table-cell>
          <table:table-cell office:value-type="string" table:style-name="ce1">
            <text:p>david.ortiz88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23T03:20:00" table:style-name="ce5">
            <text:p>2026-04-23 03:20</text:p>
          </table:table-cell>
          <table:table-cell office:value-type="date" office:date-value="2026-06-19T13:09:00" table:style-name="ce6">
            <text:p>2026-06-19 13:09</text:p>
          </table:table-cell>
          <table:table-cell table:number-columns-repeated="16369"/>
        </table:table-row>
        <table:table-row table:style-name="ro1">
          <table:table-cell office:value-type="float" office:value="890" table:style-name="ce3">
            <text:p>89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67528175</text:p>
          </table:table-cell>
          <table:table-cell office:value-type="string" table:style-name="ce1">
            <text:p>Samuel Felipe Díaz Ospina</text:p>
          </table:table-cell>
          <table:table-cell office:value-type="date" office:date-value="2011-09-03T00:00:00" table:style-name="ce4">
            <text:p>2011-09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9709566</text:p>
          </table:table-cell>
          <table:table-cell office:value-type="string" table:style-name="ce1">
            <text:p>samuel.diaz89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10T18:15:00" table:style-name="ce5">
            <text:p>2026-06-10 18:15</text:p>
          </table:table-cell>
          <table:table-cell office:value-type="date" office:date-value="2026-07-06T11:08:00" table:style-name="ce6">
            <text:p>2026-07-06 11:08</text:p>
          </table:table-cell>
          <table:table-cell table:number-columns-repeated="16369"/>
        </table:table-row>
        <table:table-row table:style-name="ro1">
          <table:table-cell office:value-type="float" office:value="891" table:style-name="ce3">
            <text:p>89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32802251</text:p>
          </table:table-cell>
          <table:table-cell office:value-type="string" table:style-name="ce1">
            <text:p>David Ruiz Silva</text:p>
          </table:table-cell>
          <table:table-cell office:value-type="date" office:date-value="1979-09-02T00:00:00" table:style-name="ce4">
            <text:p>1979-09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6258421</text:p>
          </table:table-cell>
          <table:table-cell office:value-type="string" table:style-name="ce1">
            <text:p>david.ruiz89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27T17:48:00" table:style-name="ce5">
            <text:p>2026-05-27 17:48</text:p>
          </table:table-cell>
          <table:table-cell office:value-type="date" office:date-value="2026-06-02T12:06:00" table:style-name="ce6">
            <text:p>2026-06-02 12:06</text:p>
          </table:table-cell>
          <table:table-cell table:number-columns-repeated="16369"/>
        </table:table-row>
        <table:table-row table:style-name="ro1">
          <table:table-cell office:value-type="float" office:value="892" table:style-name="ce3">
            <text:p>89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77118799</text:p>
          </table:table-cell>
          <table:table-cell office:value-type="string" table:style-name="ce1">
            <text:p>Andrés Quintero Silva</text:p>
          </table:table-cell>
          <table:table-cell office:value-type="date" office:date-value="1975-09-15T00:00:00" table:style-name="ce4">
            <text:p>1975-09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3864321</text:p>
          </table:table-cell>
          <table:table-cell office:value-type="string" table:style-name="ce1">
            <text:p>andres.quintero892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13T16:02:00" table:style-name="ce5">
            <text:p>2026-04-13 16:02</text:p>
          </table:table-cell>
          <table:table-cell office:value-type="date" office:date-value="2026-04-21T19:12:00" table:style-name="ce6">
            <text:p>2026-04-21 19:12</text:p>
          </table:table-cell>
          <table:table-cell table:number-columns-repeated="16369"/>
        </table:table-row>
        <table:table-row table:style-name="ro1">
          <table:table-cell office:value-type="float" office:value="893" table:style-name="ce3">
            <text:p>89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8733915</text:p>
          </table:table-cell>
          <table:table-cell office:value-type="string" table:style-name="ce1">
            <text:p>David Sánchez Rojas</text:p>
          </table:table-cell>
          <table:table-cell office:value-type="date" office:date-value="1990-09-22T00:00:00" table:style-name="ce4">
            <text:p>1990-09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4581938</text:p>
          </table:table-cell>
          <table:table-cell office:value-type="string" table:style-name="ce1">
            <text:p>david.sanchez89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03T04:14:00" table:style-name="ce5">
            <text:p>2026-06-03 04:14</text:p>
          </table:table-cell>
          <table:table-cell office:value-type="date" office:date-value="2026-06-21T23:44:00" table:style-name="ce6">
            <text:p>2026-06-21 23:44</text:p>
          </table:table-cell>
          <table:table-cell table:number-columns-repeated="16369"/>
        </table:table-row>
        <table:table-row table:style-name="ro1">
          <table:table-cell office:value-type="float" office:value="894" table:style-name="ce3">
            <text:p>89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68676928</text:p>
          </table:table-cell>
          <table:table-cell office:value-type="string" table:style-name="ce1">
            <text:p>Felipe Álvarez Rodríguez</text:p>
          </table:table-cell>
          <table:table-cell office:value-type="date" office:date-value="1991-06-02T00:00:00" table:style-name="ce4">
            <text:p>1991-06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4442065</text:p>
          </table:table-cell>
          <table:table-cell office:value-type="string" table:style-name="ce1">
            <text:p>felipe.alvarez894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5-29T09:54:00" table:style-name="ce5">
            <text:p>2026-05-29 09:54</text:p>
          </table:table-cell>
          <table:table-cell office:value-type="date" office:date-value="2026-06-08T02:49:00" table:style-name="ce6">
            <text:p>2026-06-08 02:49</text:p>
          </table:table-cell>
          <table:table-cell table:number-columns-repeated="16369"/>
        </table:table-row>
        <table:table-row table:style-name="ro1">
          <table:table-cell office:value-type="float" office:value="895" table:style-name="ce3">
            <text:p>89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81547534</text:p>
          </table:table-cell>
          <table:table-cell office:value-type="string" table:style-name="ce1">
            <text:p>María Natalia Castaño Pérez</text:p>
          </table:table-cell>
          <table:table-cell office:value-type="date" office:date-value="1951-12-04T00:00:00" table:style-name="ce4">
            <text:p>1951-12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2680810</text:p>
          </table:table-cell>
          <table:table-cell office:value-type="string" table:style-name="ce1">
            <text:p>maria.castano895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11T08:13:00" table:style-name="ce5">
            <text:p>2026-06-11 08:13</text:p>
          </table:table-cell>
          <table:table-cell office:value-type="date" office:date-value="2026-06-22T23:06:00" table:style-name="ce6">
            <text:p>2026-06-22 23:06</text:p>
          </table:table-cell>
          <table:table-cell table:number-columns-repeated="16369"/>
        </table:table-row>
        <table:table-row table:style-name="ro1">
          <table:table-cell office:value-type="float" office:value="896" table:style-name="ce3">
            <text:p>89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09596058</text:p>
          </table:table-cell>
          <table:table-cell office:value-type="string" table:style-name="ce1">
            <text:p>Tomás Hernández Castaño</text:p>
          </table:table-cell>
          <table:table-cell office:value-type="date" office:date-value="1986-01-02T00:00:00" table:style-name="ce4">
            <text:p>1986-01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4619714</text:p>
          </table:table-cell>
          <table:table-cell office:value-type="string" table:style-name="ce1">
            <text:p>tomas.hernandez89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4-13T06:10:00" table:style-name="ce5">
            <text:p>2026-04-13 06:10</text:p>
          </table:table-cell>
          <table:table-cell office:value-type="date" office:date-value="2026-04-30T08:20:00" table:style-name="ce6">
            <text:p>2026-04-30 08:20</text:p>
          </table:table-cell>
          <table:table-cell table:number-columns-repeated="16369"/>
        </table:table-row>
        <table:table-row table:style-name="ro1">
          <table:table-cell office:value-type="float" office:value="897" table:style-name="ce3">
            <text:p>897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407498875</text:p>
          </table:table-cell>
          <table:table-cell office:value-type="string" table:style-name="ce1">
            <text:p>Andrés López Rodríguez</text:p>
          </table:table-cell>
          <table:table-cell office:value-type="date" office:date-value="1969-03-18T00:00:00" table:style-name="ce4">
            <text:p>1969-03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9696957</text:p>
          </table:table-cell>
          <table:table-cell office:value-type="string" table:style-name="ce1">
            <text:p>andres.lopez897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24T14:15:00" table:style-name="ce5">
            <text:p>2026-06-24 14:15</text:p>
          </table:table-cell>
          <table:table-cell office:value-type="date" office:date-value="2026-07-08T03:18:00" table:style-name="ce6">
            <text:p>2026-07-08 03:18</text:p>
          </table:table-cell>
          <table:table-cell table:number-columns-repeated="16369"/>
        </table:table-row>
        <table:table-row table:style-name="ro1">
          <table:table-cell office:value-type="float" office:value="898" table:style-name="ce3">
            <text:p>89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72080255</text:p>
          </table:table-cell>
          <table:table-cell office:value-type="string" table:style-name="ce1">
            <text:p>María Torres Ospina</text:p>
          </table:table-cell>
          <table:table-cell office:value-type="date" office:date-value="1968-11-18T00:00:00" table:style-name="ce4">
            <text:p>1968-11-1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7791334</text:p>
          </table:table-cell>
          <table:table-cell office:value-type="string" table:style-name="ce1">
            <text:p>maria.torres898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5-06T06:27:00" table:style-name="ce5">
            <text:p>2026-05-06 06:27</text:p>
          </table:table-cell>
          <table:table-cell office:value-type="date" office:date-value="2026-05-26T02:18:00" table:style-name="ce6">
            <text:p>2026-05-26 02:18</text:p>
          </table:table-cell>
          <table:table-cell table:number-columns-repeated="16369"/>
        </table:table-row>
        <table:table-row table:style-name="ro1">
          <table:table-cell office:value-type="float" office:value="899" table:style-name="ce3">
            <text:p>89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08092686</text:p>
          </table:table-cell>
          <table:table-cell office:value-type="string" table:style-name="ce1">
            <text:p>Andrea Torres Quintero</text:p>
          </table:table-cell>
          <table:table-cell office:value-type="date" office:date-value="1982-06-15T00:00:00" table:style-name="ce4">
            <text:p>1982-06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6905397</text:p>
          </table:table-cell>
          <table:table-cell office:value-type="string" table:style-name="ce1">
            <text:p>andrea.torres899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3-11T23:54:00" table:style-name="ce5">
            <text:p>2026-03-11 23:54</text:p>
          </table:table-cell>
          <table:table-cell office:value-type="date" office:date-value="2026-06-30T11:37:00" table:style-name="ce6">
            <text:p>2026-06-30 11:37</text:p>
          </table:table-cell>
          <table:table-cell table:number-columns-repeated="16369"/>
        </table:table-row>
        <table:table-row table:style-name="ro1">
          <table:table-cell office:value-type="float" office:value="900" table:style-name="ce3">
            <text:p>90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48334738</text:p>
          </table:table-cell>
          <table:table-cell office:value-type="string" table:style-name="ce1">
            <text:p>Sara Díaz Rodríguez</text:p>
          </table:table-cell>
          <table:table-cell office:value-type="date" office:date-value="1967-02-28T00:00:00" table:style-name="ce4">
            <text:p>1967-02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5505229</text:p>
          </table:table-cell>
          <table:table-cell office:value-type="string" table:style-name="ce1">
            <text:p>sara.diaz90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6-07T07:15:00" table:style-name="ce5">
            <text:p>2026-06-07 07:15</text:p>
          </table:table-cell>
          <table:table-cell office:value-type="date" office:date-value="2026-07-06T21:50:00" table:style-name="ce6">
            <text:p>2026-07-06 21:50</text:p>
          </table:table-cell>
          <table:table-cell table:number-columns-repeated="16369"/>
        </table:table-row>
        <table:table-row table:style-name="ro1">
          <table:table-cell office:value-type="float" office:value="901" table:style-name="ce3">
            <text:p>90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2742079</text:p>
          </table:table-cell>
          <table:table-cell office:value-type="string" table:style-name="ce1">
            <text:p>Julián Nicolás Ospina Moreno</text:p>
          </table:table-cell>
          <table:table-cell office:value-type="date" office:date-value="1998-10-05T00:00:00" table:style-name="ce4">
            <text:p>1998-10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5991336</text:p>
          </table:table-cell>
          <table:table-cell office:value-type="string" table:style-name="ce1">
            <text:p>julian.ospina901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15T22:46:00" table:style-name="ce5">
            <text:p>2026-05-15 22:46</text:p>
          </table:table-cell>
          <table:table-cell office:value-type="date" office:date-value="2026-05-21T16:32:00" table:style-name="ce6">
            <text:p>2026-05-21 16:32</text:p>
          </table:table-cell>
          <table:table-cell table:number-columns-repeated="16369"/>
        </table:table-row>
        <table:table-row table:style-name="ro1">
          <table:table-cell office:value-type="float" office:value="902" table:style-name="ce3">
            <text:p>90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168005931</text:p>
          </table:table-cell>
          <table:table-cell office:value-type="string" table:style-name="ce1">
            <text:p>Cristian Hernández Díaz</text:p>
          </table:table-cell>
          <table:table-cell office:value-type="date" office:date-value="2009-09-21T00:00:00" table:style-name="ce4">
            <text:p>2009-09-2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6108724</text:p>
          </table:table-cell>
          <table:table-cell office:value-type="string" table:style-name="ce1">
            <text:p>cristian.hernandez90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23T11:55:00" table:style-name="ce5">
            <text:p>2026-06-23 11:55</text:p>
          </table:table-cell>
          <table:table-cell office:value-type="date" office:date-value="2026-07-07T10:40:00" table:style-name="ce6">
            <text:p>2026-07-07 10:40</text:p>
          </table:table-cell>
          <table:table-cell table:number-columns-repeated="16369"/>
        </table:table-row>
        <table:table-row table:style-name="ro1">
          <table:table-cell office:value-type="float" office:value="903" table:style-name="ce3">
            <text:p>90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90436538</text:p>
          </table:table-cell>
          <table:table-cell office:value-type="string" table:style-name="ce1">
            <text:p>Isabella Daniela Rodríguez García</text:p>
          </table:table-cell>
          <table:table-cell office:value-type="date" office:date-value="1984-12-06T00:00:00" table:style-name="ce4">
            <text:p>1984-12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8219199</text:p>
          </table:table-cell>
          <table:table-cell office:value-type="string" table:style-name="ce1">
            <text:p>isabella.rodriguez903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18T08:21:00" table:style-name="ce5">
            <text:p>2026-04-18 08:21</text:p>
          </table:table-cell>
          <table:table-cell office:value-type="date" office:date-value="2026-06-02T16:23:00" table:style-name="ce6">
            <text:p>2026-06-02 16:23</text:p>
          </table:table-cell>
          <table:table-cell table:number-columns-repeated="16369"/>
        </table:table-row>
        <table:table-row table:style-name="ro1">
          <table:table-cell office:value-type="float" office:value="904" table:style-name="ce3">
            <text:p>904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96197424</text:p>
          </table:table-cell>
          <table:table-cell office:value-type="string" table:style-name="ce1">
            <text:p>Gabriela Álvarez Jiménez</text:p>
          </table:table-cell>
          <table:table-cell office:value-type="date" office:date-value="1990-02-21T00:00:00" table:style-name="ce4">
            <text:p>1990-02-2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4191475</text:p>
          </table:table-cell>
          <table:table-cell office:value-type="string" table:style-name="ce1">
            <text:p>gabriela.alvarez90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04T22:36:00" table:style-name="ce5">
            <text:p>2026-04-04 22:36</text:p>
          </table:table-cell>
          <table:table-cell office:value-type="date" office:date-value="2026-04-10T14:11:00" table:style-name="ce6">
            <text:p>2026-04-10 14:11</text:p>
          </table:table-cell>
          <table:table-cell table:number-columns-repeated="16369"/>
        </table:table-row>
        <table:table-row table:style-name="ro1">
          <table:table-cell office:value-type="float" office:value="905" table:style-name="ce3">
            <text:p>905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447952297</text:p>
          </table:table-cell>
          <table:table-cell office:value-type="string" table:style-name="ce1">
            <text:p>Manuela López Castaño</text:p>
          </table:table-cell>
          <table:table-cell office:value-type="date" office:date-value="2011-01-02T00:00:00" table:style-name="ce4">
            <text:p>2011-01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2040126</text:p>
          </table:table-cell>
          <table:table-cell office:value-type="string" table:style-name="ce1">
            <text:p>manuela.lopez90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08T23:18:00" table:style-name="ce5">
            <text:p>2026-05-08 23:18</text:p>
          </table:table-cell>
          <table:table-cell office:value-type="date" office:date-value="2026-05-18T08:33:00" table:style-name="ce6">
            <text:p>2026-05-18 08:33</text:p>
          </table:table-cell>
          <table:table-cell table:number-columns-repeated="16369"/>
        </table:table-row>
        <table:table-row table:style-name="ro1">
          <table:table-cell office:value-type="float" office:value="906" table:style-name="ce3">
            <text:p>90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4866184</text:p>
          </table:table-cell>
          <table:table-cell office:value-type="string" table:style-name="ce1">
            <text:p>Daniela María Muñoz Torres</text:p>
          </table:table-cell>
          <table:table-cell office:value-type="date" office:date-value="1960-10-13T00:00:00" table:style-name="ce4">
            <text:p>1960-10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9150925</text:p>
          </table:table-cell>
          <table:table-cell office:value-type="string" table:style-name="ce1">
            <text:p>daniela.munoz90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14T19:57:00" table:style-name="ce5">
            <text:p>2026-04-14 19:57</text:p>
          </table:table-cell>
          <table:table-cell office:value-type="date" office:date-value="2026-04-23T03:50:00" table:style-name="ce6">
            <text:p>2026-04-23 03:50</text:p>
          </table:table-cell>
          <table:table-cell table:number-columns-repeated="16369"/>
        </table:table-row>
        <table:table-row table:style-name="ro1">
          <table:table-cell office:value-type="float" office:value="907" table:style-name="ce3">
            <text:p>90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22688901</text:p>
          </table:table-cell>
          <table:table-cell office:value-type="string" table:style-name="ce1">
            <text:p>Sofía Moreno Sánchez</text:p>
          </table:table-cell>
          <table:table-cell office:value-type="date" office:date-value="1972-07-29T00:00:00" table:style-name="ce4">
            <text:p>1972-07-2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9995964</text:p>
          </table:table-cell>
          <table:table-cell office:value-type="string" table:style-name="ce1">
            <text:p>sofia.moreno907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12T00:10:00" table:style-name="ce5">
            <text:p>2026-04-12 00:10</text:p>
          </table:table-cell>
          <table:table-cell office:value-type="date" office:date-value="2026-07-07T21:38:00" table:style-name="ce6">
            <text:p>2026-07-07 21:38</text:p>
          </table:table-cell>
          <table:table-cell table:number-columns-repeated="16369"/>
        </table:table-row>
        <table:table-row table:style-name="ro1">
          <table:table-cell office:value-type="float" office:value="908" table:style-name="ce3">
            <text:p>90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85618648</text:p>
          </table:table-cell>
          <table:table-cell office:value-type="string" table:style-name="ce1">
            <text:p>Juan Hernández Ramírez</text:p>
          </table:table-cell>
          <table:table-cell office:value-type="date" office:date-value="1969-03-22T00:00:00" table:style-name="ce4">
            <text:p>1969-03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6680108</text:p>
          </table:table-cell>
          <table:table-cell office:value-type="string" table:style-name="ce1">
            <text:p>juan.hernandez908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27T22:02:00" table:style-name="ce5">
            <text:p>2026-04-27 22:02</text:p>
          </table:table-cell>
          <table:table-cell office:value-type="date" office:date-value="2026-05-18T12:34:00" table:style-name="ce6">
            <text:p>2026-05-18 12:34</text:p>
          </table:table-cell>
          <table:table-cell table:number-columns-repeated="16369"/>
        </table:table-row>
        <table:table-row table:style-name="ro1">
          <table:table-cell office:value-type="float" office:value="909" table:style-name="ce3">
            <text:p>90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2206473</text:p>
          </table:table-cell>
          <table:table-cell office:value-type="string" table:style-name="ce1">
            <text:p>Carolina Valencia Sánchez</text:p>
          </table:table-cell>
          <table:table-cell office:value-type="date" office:date-value="1981-01-02T00:00:00" table:style-name="ce4">
            <text:p>1981-01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3377026</text:p>
          </table:table-cell>
          <table:table-cell office:value-type="string" table:style-name="ce1">
            <text:p>carolina.valencia909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7-06T12:05:00" table:style-name="ce5">
            <text:p>2026-07-06 12:05</text:p>
          </table:table-cell>
          <table:table-cell office:value-type="date" office:date-value="2026-07-08T11:54:00" table:style-name="ce6">
            <text:p>2026-07-08 11:54</text:p>
          </table:table-cell>
          <table:table-cell table:number-columns-repeated="16369"/>
        </table:table-row>
        <table:table-row table:style-name="ro1">
          <table:table-cell office:value-type="float" office:value="910" table:style-name="ce3">
            <text:p>91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5452483</text:p>
          </table:table-cell>
          <table:table-cell office:value-type="string" table:style-name="ce1">
            <text:p>Valentina Pérez Ramírez</text:p>
          </table:table-cell>
          <table:table-cell office:value-type="date" office:date-value="2002-08-12T00:00:00" table:style-name="ce4">
            <text:p>2002-08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6358656</text:p>
          </table:table-cell>
          <table:table-cell office:value-type="string" table:style-name="ce1">
            <text:p>valentina.perez910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6-01T13:00:00" table:style-name="ce5">
            <text:p>2026-06-01 13:00</text:p>
          </table:table-cell>
          <table:table-cell office:value-type="date" office:date-value="2026-07-04T23:53:00" table:style-name="ce6">
            <text:p>2026-07-04 23:53</text:p>
          </table:table-cell>
          <table:table-cell table:number-columns-repeated="16369"/>
        </table:table-row>
        <table:table-row table:style-name="ro1">
          <table:table-cell office:value-type="float" office:value="911" table:style-name="ce3">
            <text:p>91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66873147</text:p>
          </table:table-cell>
          <table:table-cell office:value-type="string" table:style-name="ce1">
            <text:p>Samuel Mateo Ruiz Castaño</text:p>
          </table:table-cell>
          <table:table-cell office:value-type="date" office:date-value="1984-10-09T00:00:00" table:style-name="ce4">
            <text:p>1984-10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9106558</text:p>
          </table:table-cell>
          <table:table-cell office:value-type="string" table:style-name="ce1">
            <text:p>samuel.ruiz911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6-07T21:37:00" table:style-name="ce5">
            <text:p>2026-06-07 21:37</text:p>
          </table:table-cell>
          <table:table-cell office:value-type="date" office:date-value="2026-06-14T10:35:00" table:style-name="ce6">
            <text:p>2026-06-14 10:35</text:p>
          </table:table-cell>
          <table:table-cell table:number-columns-repeated="16369"/>
        </table:table-row>
        <table:table-row table:style-name="ro1">
          <table:table-cell office:value-type="float" office:value="912" table:style-name="ce3">
            <text:p>91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83781065</text:p>
          </table:table-cell>
          <table:table-cell office:value-type="string" table:style-name="ce1">
            <text:p>Diana Quintero Romero</text:p>
          </table:table-cell>
          <table:table-cell office:value-type="date" office:date-value="1987-08-20T00:00:00" table:style-name="ce4">
            <text:p>1987-08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1039554</text:p>
          </table:table-cell>
          <table:table-cell office:value-type="string" table:style-name="ce1">
            <text:p>diana.quintero91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3-19T17:57:00" table:style-name="ce5">
            <text:p>2026-03-19 17:57</text:p>
          </table:table-cell>
          <table:table-cell office:value-type="date" office:date-value="2026-03-26T07:03:00" table:style-name="ce6">
            <text:p>2026-03-26 07:03</text:p>
          </table:table-cell>
          <table:table-cell table:number-columns-repeated="16369"/>
        </table:table-row>
        <table:table-row table:style-name="ro1">
          <table:table-cell office:value-type="float" office:value="913" table:style-name="ce3">
            <text:p>913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326861366</text:p>
          </table:table-cell>
          <table:table-cell office:value-type="string" table:style-name="ce1">
            <text:p>Andrea Ospina Restrepo</text:p>
          </table:table-cell>
          <table:table-cell office:value-type="date" office:date-value="1971-09-20T00:00:00" table:style-name="ce4">
            <text:p>1971-09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5130100</text:p>
          </table:table-cell>
          <table:table-cell office:value-type="string" table:style-name="ce1">
            <text:p>andrea.ospina91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3-13T05:59:00" table:style-name="ce5">
            <text:p>2026-03-13 05:59</text:p>
          </table:table-cell>
          <table:table-cell office:value-type="date" office:date-value="2026-04-22T00:36:00" table:style-name="ce6">
            <text:p>2026-04-22 00:36</text:p>
          </table:table-cell>
          <table:table-cell table:number-columns-repeated="16369"/>
        </table:table-row>
        <table:table-row table:style-name="ro1">
          <table:table-cell office:value-type="float" office:value="914" table:style-name="ce3">
            <text:p>91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37585363</text:p>
          </table:table-cell>
          <table:table-cell office:value-type="string" table:style-name="ce1">
            <text:p>Daniel González Sánchez</text:p>
          </table:table-cell>
          <table:table-cell office:value-type="date" office:date-value="1991-01-18T00:00:00" table:style-name="ce4">
            <text:p>1991-01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1749903</text:p>
          </table:table-cell>
          <table:table-cell office:value-type="string" table:style-name="ce1">
            <text:p>daniel.gonzalez914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3-18T00:37:00" table:style-name="ce5">
            <text:p>2026-03-18 00:37</text:p>
          </table:table-cell>
          <table:table-cell office:value-type="date" office:date-value="2026-05-09T17:24:00" table:style-name="ce6">
            <text:p>2026-05-09 17:24</text:p>
          </table:table-cell>
          <table:table-cell table:number-columns-repeated="16369"/>
        </table:table-row>
        <table:table-row table:style-name="ro1">
          <table:table-cell office:value-type="float" office:value="915" table:style-name="ce3">
            <text:p>91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3317964</text:p>
          </table:table-cell>
          <table:table-cell office:value-type="string" table:style-name="ce1">
            <text:p>María Castro Jiménez</text:p>
          </table:table-cell>
          <table:table-cell office:value-type="date" office:date-value="1992-05-23T00:00:00" table:style-name="ce4">
            <text:p>1992-05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7503110</text:p>
          </table:table-cell>
          <table:table-cell office:value-type="string" table:style-name="ce1">
            <text:p>maria.castro915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5-16T00:48:00" table:style-name="ce5">
            <text:p>2026-05-16 00:48</text:p>
          </table:table-cell>
          <table:table-cell office:value-type="date" office:date-value="2026-05-20T03:16:00" table:style-name="ce6">
            <text:p>2026-05-20 03:16</text:p>
          </table:table-cell>
          <table:table-cell table:number-columns-repeated="16369"/>
        </table:table-row>
        <table:table-row table:style-name="ro1">
          <table:table-cell office:value-type="float" office:value="916" table:style-name="ce3">
            <text:p>91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09840559</text:p>
          </table:table-cell>
          <table:table-cell office:value-type="string" table:style-name="ce1">
            <text:p>María Torres Jiménez</text:p>
          </table:table-cell>
          <table:table-cell office:value-type="date" office:date-value="1945-12-30T00:00:00" table:style-name="ce4">
            <text:p>1945-12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5645802</text:p>
          </table:table-cell>
          <table:table-cell office:value-type="string" table:style-name="ce1">
            <text:p>maria.torres916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16T15:27:00" table:style-name="ce5">
            <text:p>2026-04-16 15:27</text:p>
          </table:table-cell>
          <table:table-cell office:value-type="date" office:date-value="2026-05-26T02:51:00" table:style-name="ce6">
            <text:p>2026-05-26 02:51</text:p>
          </table:table-cell>
          <table:table-cell table:number-columns-repeated="16369"/>
        </table:table-row>
        <table:table-row table:style-name="ro1">
          <table:table-cell office:value-type="float" office:value="917" table:style-name="ce3">
            <text:p>91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46504523</text:p>
          </table:table-cell>
          <table:table-cell office:value-type="string" table:style-name="ce1">
            <text:p>Carolina Giraldo Vargas</text:p>
          </table:table-cell>
          <table:table-cell office:value-type="date" office:date-value="1993-02-12T00:00:00" table:style-name="ce4">
            <text:p>1993-02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3489814</text:p>
          </table:table-cell>
          <table:table-cell office:value-type="string" table:style-name="ce1">
            <text:p>carolina.giraldo91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09T12:56:00" table:style-name="ce5">
            <text:p>2026-06-09 12:56</text:p>
          </table:table-cell>
          <table:table-cell office:value-type="date" office:date-value="2026-07-06T23:16:00" table:style-name="ce6">
            <text:p>2026-07-06 23:16</text:p>
          </table:table-cell>
          <table:table-cell table:number-columns-repeated="16369"/>
        </table:table-row>
        <table:table-row table:style-name="ro1">
          <table:table-cell office:value-type="float" office:value="918" table:style-name="ce3">
            <text:p>91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54771760</text:p>
          </table:table-cell>
          <table:table-cell office:value-type="string" table:style-name="ce1">
            <text:p>Cristian Sebastián Romero López</text:p>
          </table:table-cell>
          <table:table-cell office:value-type="date" office:date-value="1964-02-20T00:00:00" table:style-name="ce4">
            <text:p>1964-02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5941672</text:p>
          </table:table-cell>
          <table:table-cell office:value-type="string" table:style-name="ce1">
            <text:p>cristian.romero918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7-01T19:56:00" table:style-name="ce5">
            <text:p>2026-07-01 19:56</text:p>
          </table:table-cell>
          <table:table-cell office:value-type="date" office:date-value="2026-07-10T02:05:00" table:style-name="ce6">
            <text:p>2026-07-10 02:05</text:p>
          </table:table-cell>
          <table:table-cell table:number-columns-repeated="16369"/>
        </table:table-row>
        <table:table-row table:style-name="ro1">
          <table:table-cell office:value-type="float" office:value="919" table:style-name="ce3">
            <text:p>91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2521021</text:p>
          </table:table-cell>
          <table:table-cell office:value-type="string" table:style-name="ce1">
            <text:p>Luisa Laura Romero Martínez</text:p>
          </table:table-cell>
          <table:table-cell office:value-type="date" office:date-value="1980-09-28T00:00:00" table:style-name="ce4">
            <text:p>1980-09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9396882</text:p>
          </table:table-cell>
          <table:table-cell office:value-type="string" table:style-name="ce1">
            <text:p>luisa.romero91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13T10:46:00" table:style-name="ce5">
            <text:p>2026-05-13 10:46</text:p>
          </table:table-cell>
          <table:table-cell office:value-type="date" office:date-value="2026-05-26T08:27:00" table:style-name="ce6">
            <text:p>2026-05-26 08:27</text:p>
          </table:table-cell>
          <table:table-cell table:number-columns-repeated="16369"/>
        </table:table-row>
        <table:table-row table:style-name="ro1">
          <table:table-cell office:value-type="float" office:value="920" table:style-name="ce3">
            <text:p>92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53175551</text:p>
          </table:table-cell>
          <table:table-cell office:value-type="string" table:style-name="ce1">
            <text:p>Daniel Martínez Díaz</text:p>
          </table:table-cell>
          <table:table-cell office:value-type="date" office:date-value="2007-12-10T00:00:00" table:style-name="ce4">
            <text:p>2007-12-10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196330960</text:p>
          </table:table-cell>
          <table:table-cell office:value-type="string" table:style-name="ce1">
            <text:p>daniel.martinez920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3-16T20:03:00" table:style-name="ce5">
            <text:p>2026-03-16 20:03</text:p>
          </table:table-cell>
          <table:table-cell office:value-type="date" office:date-value="2026-05-23T16:36:00" table:style-name="ce6">
            <text:p>2026-05-23 16:36</text:p>
          </table:table-cell>
          <table:table-cell table:number-columns-repeated="16369"/>
        </table:table-row>
        <table:table-row table:style-name="ro1">
          <table:table-cell office:value-type="float" office:value="921" table:style-name="ce3">
            <text:p>92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75541571</text:p>
          </table:table-cell>
          <table:table-cell office:value-type="string" table:style-name="ce1">
            <text:p>David Sánchez González</text:p>
          </table:table-cell>
          <table:table-cell office:value-type="date" office:date-value="1974-11-02T00:00:00" table:style-name="ce4">
            <text:p>1974-11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8763837</text:p>
          </table:table-cell>
          <table:table-cell office:value-type="string" table:style-name="ce1">
            <text:p>david.sanchez92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30T02:09:00" table:style-name="ce5">
            <text:p>2026-05-30 02:09</text:p>
          </table:table-cell>
          <table:table-cell office:value-type="date" office:date-value="2026-06-27T06:13:00" table:style-name="ce6">
            <text:p>2026-06-27 06:13</text:p>
          </table:table-cell>
          <table:table-cell table:number-columns-repeated="16369"/>
        </table:table-row>
        <table:table-row table:style-name="ro1">
          <table:table-cell office:value-type="float" office:value="922" table:style-name="ce3">
            <text:p>92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7558743</text:p>
          </table:table-cell>
          <table:table-cell office:value-type="string" table:style-name="ce1">
            <text:p>Tomás Torres Rodríguez</text:p>
          </table:table-cell>
          <table:table-cell office:value-type="date" office:date-value="1994-02-18T00:00:00" table:style-name="ce4">
            <text:p>1994-02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3105994</text:p>
          </table:table-cell>
          <table:table-cell office:value-type="string" table:style-name="ce1">
            <text:p>tomas.torres922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20T15:56:00" table:style-name="ce5">
            <text:p>2026-04-20 15:56</text:p>
          </table:table-cell>
          <table:table-cell office:value-type="date" office:date-value="2026-06-20T22:25:00" table:style-name="ce6">
            <text:p>2026-06-20 22:25</text:p>
          </table:table-cell>
          <table:table-cell table:number-columns-repeated="16369"/>
        </table:table-row>
        <table:table-row table:style-name="ro1">
          <table:table-cell office:value-type="float" office:value="923" table:style-name="ce3">
            <text:p>92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793359</text:p>
          </table:table-cell>
          <table:table-cell office:value-type="string" table:style-name="ce1">
            <text:p>Ricardo Quintero Valencia</text:p>
          </table:table-cell>
          <table:table-cell office:value-type="date" office:date-value="2004-03-24T00:00:00" table:style-name="ce4">
            <text:p>2004-03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2708025</text:p>
          </table:table-cell>
          <table:table-cell office:value-type="string" table:style-name="ce1">
            <text:p>ricardo.quintero92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30T22:01:00" table:style-name="ce5">
            <text:p>2026-04-30 22:01</text:p>
          </table:table-cell>
          <table:table-cell office:value-type="date" office:date-value="2026-06-20T15:14:00" table:style-name="ce6">
            <text:p>2026-06-20 15:14</text:p>
          </table:table-cell>
          <table:table-cell table:number-columns-repeated="16369"/>
        </table:table-row>
        <table:table-row table:style-name="ro1">
          <table:table-cell office:value-type="float" office:value="924" table:style-name="ce3">
            <text:p>92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2425877</text:p>
          </table:table-cell>
          <table:table-cell office:value-type="string" table:style-name="ce1">
            <text:p>David Álvarez Quintero</text:p>
          </table:table-cell>
          <table:table-cell office:value-type="date" office:date-value="1988-03-20T00:00:00" table:style-name="ce4">
            <text:p>1988-03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6421618</text:p>
          </table:table-cell>
          <table:table-cell office:value-type="string" table:style-name="ce1">
            <text:p>david.alvarez92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21T07:48:00" table:style-name="ce5">
            <text:p>2026-05-21 07:48</text:p>
          </table:table-cell>
          <table:table-cell office:value-type="date" office:date-value="2026-05-30T23:50:00" table:style-name="ce6">
            <text:p>2026-05-30 23:50</text:p>
          </table:table-cell>
          <table:table-cell table:number-columns-repeated="16369"/>
        </table:table-row>
        <table:table-row table:style-name="ro1">
          <table:table-cell office:value-type="float" office:value="925" table:style-name="ce3">
            <text:p>92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76065139</text:p>
          </table:table-cell>
          <table:table-cell office:value-type="string" table:style-name="ce1">
            <text:p>Natalia Camila Silva Castro</text:p>
          </table:table-cell>
          <table:table-cell office:value-type="date" office:date-value="1988-10-21T00:00:00" table:style-name="ce4">
            <text:p>1988-10-2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3435158</text:p>
          </table:table-cell>
          <table:table-cell office:value-type="string" table:style-name="ce1">
            <text:p>natalia.silva92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4-19T01:56:00" table:style-name="ce5">
            <text:p>2026-04-19 01:56</text:p>
          </table:table-cell>
          <table:table-cell office:value-type="date" office:date-value="2026-06-06T22:17:00" table:style-name="ce6">
            <text:p>2026-06-06 22:17</text:p>
          </table:table-cell>
          <table:table-cell table:number-columns-repeated="16369"/>
        </table:table-row>
        <table:table-row table:style-name="ro1">
          <table:table-cell office:value-type="float" office:value="926" table:style-name="ce3">
            <text:p>92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4864310</text:p>
          </table:table-cell>
          <table:table-cell office:value-type="string" table:style-name="ce1">
            <text:p>Diana Gabriela García Pérez</text:p>
          </table:table-cell>
          <table:table-cell office:value-type="date" office:date-value="1953-07-09T00:00:00" table:style-name="ce4">
            <text:p>1953-07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9092897</text:p>
          </table:table-cell>
          <table:table-cell office:value-type="string" table:style-name="ce1">
            <text:p>diana.garcia92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3-29T16:39:00" table:style-name="ce5">
            <text:p>2026-03-29 16:39</text:p>
          </table:table-cell>
          <table:table-cell office:value-type="date" office:date-value="2026-07-07T13:21:00" table:style-name="ce6">
            <text:p>2026-07-07 13:21</text:p>
          </table:table-cell>
          <table:table-cell table:number-columns-repeated="16369"/>
        </table:table-row>
        <table:table-row table:style-name="ro1">
          <table:table-cell office:value-type="float" office:value="927" table:style-name="ce3">
            <text:p>92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4526587</text:p>
          </table:table-cell>
          <table:table-cell office:value-type="string" table:style-name="ce1">
            <text:p>Nicolás Quintero García</text:p>
          </table:table-cell>
          <table:table-cell office:value-type="date" office:date-value="1983-09-02T00:00:00" table:style-name="ce4">
            <text:p>1983-09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9100627</text:p>
          </table:table-cell>
          <table:table-cell office:value-type="string" table:style-name="ce1">
            <text:p>nicolas.quintero92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22T23:26:00" table:style-name="ce5">
            <text:p>2026-06-22 23:26</text:p>
          </table:table-cell>
          <table:table-cell office:value-type="date" office:date-value="2026-07-04T03:32:00" table:style-name="ce6">
            <text:p>2026-07-04 03:32</text:p>
          </table:table-cell>
          <table:table-cell table:number-columns-repeated="16369"/>
        </table:table-row>
        <table:table-row table:style-name="ro1">
          <table:table-cell office:value-type="float" office:value="928" table:style-name="ce3">
            <text:p>92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03748780</text:p>
          </table:table-cell>
          <table:table-cell office:value-type="string" table:style-name="ce1">
            <text:p>Diana López González</text:p>
          </table:table-cell>
          <table:table-cell office:value-type="date" office:date-value="2000-07-25T00:00:00" table:style-name="ce4">
            <text:p>2000-07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3223093</text:p>
          </table:table-cell>
          <table:table-cell office:value-type="string" table:style-name="ce1">
            <text:p>diana.lopez92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28T12:52:00" table:style-name="ce5">
            <text:p>2026-06-28 12:52</text:p>
          </table:table-cell>
          <table:table-cell office:value-type="date" office:date-value="2026-07-05T09:05:00" table:style-name="ce6">
            <text:p>2026-07-05 09:05</text:p>
          </table:table-cell>
          <table:table-cell table:number-columns-repeated="16369"/>
        </table:table-row>
        <table:table-row table:style-name="ro1">
          <table:table-cell office:value-type="float" office:value="929" table:style-name="ce3">
            <text:p>92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45470150</text:p>
          </table:table-cell>
          <table:table-cell office:value-type="string" table:style-name="ce1">
            <text:p>Carlos Martínez Moreno</text:p>
          </table:table-cell>
          <table:table-cell office:value-type="date" office:date-value="1980-11-14T00:00:00" table:style-name="ce4">
            <text:p>1980-11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9665295</text:p>
          </table:table-cell>
          <table:table-cell office:value-type="string" table:style-name="ce1">
            <text:p>carlos.martinez929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03T07:47:00" table:style-name="ce5">
            <text:p>2026-04-03 07:47</text:p>
          </table:table-cell>
          <table:table-cell office:value-type="date" office:date-value="2026-07-02T08:33:00" table:style-name="ce6">
            <text:p>2026-07-02 08:33</text:p>
          </table:table-cell>
          <table:table-cell table:number-columns-repeated="16369"/>
        </table:table-row>
        <table:table-row table:style-name="ro1">
          <table:table-cell office:value-type="float" office:value="930" table:style-name="ce3">
            <text:p>93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6902455</text:p>
          </table:table-cell>
          <table:table-cell office:value-type="string" table:style-name="ce1">
            <text:p>Natalia Rodríguez Ortiz</text:p>
          </table:table-cell>
          <table:table-cell office:value-type="date" office:date-value="2004-08-13T00:00:00" table:style-name="ce4">
            <text:p>2004-08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7465887</text:p>
          </table:table-cell>
          <table:table-cell office:value-type="string" table:style-name="ce1">
            <text:p>natalia.rodriguez930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28T01:37:00" table:style-name="ce5">
            <text:p>2026-05-28 01:37</text:p>
          </table:table-cell>
          <table:table-cell office:value-type="date" office:date-value="2026-06-16T21:41:00" table:style-name="ce6">
            <text:p>2026-06-16 21:41</text:p>
          </table:table-cell>
          <table:table-cell table:number-columns-repeated="16369"/>
        </table:table-row>
        <table:table-row table:style-name="ro1">
          <table:table-cell office:value-type="float" office:value="931" table:style-name="ce3">
            <text:p>93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0473733</text:p>
          </table:table-cell>
          <table:table-cell office:value-type="string" table:style-name="ce1">
            <text:p>Gabriela Martínez Moreno</text:p>
          </table:table-cell>
          <table:table-cell office:value-type="date" office:date-value="1973-02-09T00:00:00" table:style-name="ce4">
            <text:p>1973-02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3980529</text:p>
          </table:table-cell>
          <table:table-cell office:value-type="string" table:style-name="ce1">
            <text:p>gabriela.martinez931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06T00:39:00" table:style-name="ce5">
            <text:p>2026-05-06 00:39</text:p>
          </table:table-cell>
          <table:table-cell office:value-type="date" office:date-value="2026-07-05T14:49:00" table:style-name="ce6">
            <text:p>2026-07-05 14:49</text:p>
          </table:table-cell>
          <table:table-cell table:number-columns-repeated="16369"/>
        </table:table-row>
        <table:table-row table:style-name="ro1">
          <table:table-cell office:value-type="float" office:value="932" table:style-name="ce3">
            <text:p>932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617004829</text:p>
          </table:table-cell>
          <table:table-cell office:value-type="string" table:style-name="ce1">
            <text:p>Paula Torres Ospina</text:p>
          </table:table-cell>
          <table:table-cell office:value-type="date" office:date-value="1983-04-06T00:00:00" table:style-name="ce4">
            <text:p>1983-04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4356059</text:p>
          </table:table-cell>
          <table:table-cell office:value-type="string" table:style-name="ce1">
            <text:p>paula.torres93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7-08T13:16:00" table:style-name="ce5">
            <text:p>2026-07-08 13:16</text:p>
          </table:table-cell>
          <table:table-cell office:value-type="date" office:date-value="2026-07-09T13:31:00" table:style-name="ce6">
            <text:p>2026-07-09 13:31</text:p>
          </table:table-cell>
          <table:table-cell table:number-columns-repeated="16369"/>
        </table:table-row>
        <table:table-row table:style-name="ro1">
          <table:table-cell office:value-type="float" office:value="933" table:style-name="ce3">
            <text:p>93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06235094</text:p>
          </table:table-cell>
          <table:table-cell office:value-type="string" table:style-name="ce1">
            <text:p>Juliana García Castaño</text:p>
          </table:table-cell>
          <table:table-cell office:value-type="date" office:date-value="1973-02-20T00:00:00" table:style-name="ce4">
            <text:p>1973-02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5133869</text:p>
          </table:table-cell>
          <table:table-cell office:value-type="string" table:style-name="ce1">
            <text:p>juliana.garcia933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4-24T23:31:00" table:style-name="ce5">
            <text:p>2026-04-24 23:31</text:p>
          </table:table-cell>
          <table:table-cell office:value-type="date" office:date-value="2026-07-09T13:37:00" table:style-name="ce6">
            <text:p>2026-07-09 13:37</text:p>
          </table:table-cell>
          <table:table-cell table:number-columns-repeated="16369"/>
        </table:table-row>
        <table:table-row table:style-name="ro1">
          <table:table-cell office:value-type="float" office:value="934" table:style-name="ce3">
            <text:p>934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158960657</text:p>
          </table:table-cell>
          <table:table-cell office:value-type="string" table:style-name="ce1">
            <text:p>Sara Rojas Torres</text:p>
          </table:table-cell>
          <table:table-cell office:value-type="date" office:date-value="1948-12-12T00:00:00" table:style-name="ce4">
            <text:p>1948-12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6238277</text:p>
          </table:table-cell>
          <table:table-cell office:value-type="string" table:style-name="ce1">
            <text:p>sara.rojas93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21T16:21:00" table:style-name="ce5">
            <text:p>2026-06-21 16:21</text:p>
          </table:table-cell>
          <table:table-cell office:value-type="date" office:date-value="2026-06-28T20:36:00" table:style-name="ce6">
            <text:p>2026-06-28 20:36</text:p>
          </table:table-cell>
          <table:table-cell table:number-columns-repeated="16369"/>
        </table:table-row>
        <table:table-row table:style-name="ro1">
          <table:table-cell office:value-type="float" office:value="935" table:style-name="ce3">
            <text:p>93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9624484</text:p>
          </table:table-cell>
          <table:table-cell office:value-type="string" table:style-name="ce1">
            <text:p>María Jiménez Ramírez</text:p>
          </table:table-cell>
          <table:table-cell office:value-type="date" office:date-value="1943-01-08T00:00:00" table:style-name="ce4">
            <text:p>1943-01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6760314</text:p>
          </table:table-cell>
          <table:table-cell office:value-type="string" table:style-name="ce1">
            <text:p>maria.jimenez935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5-30T23:08:00" table:style-name="ce5">
            <text:p>2026-05-30 23:08</text:p>
          </table:table-cell>
          <table:table-cell office:value-type="date" office:date-value="2026-06-12T10:01:00" table:style-name="ce6">
            <text:p>2026-06-12 10:01</text:p>
          </table:table-cell>
          <table:table-cell table:number-columns-repeated="16369"/>
        </table:table-row>
        <table:table-row table:style-name="ro1">
          <table:table-cell office:value-type="float" office:value="936" table:style-name="ce3">
            <text:p>93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88381839</text:p>
          </table:table-cell>
          <table:table-cell office:value-type="string" table:style-name="ce1">
            <text:p>Carlos Díaz Giraldo</text:p>
          </table:table-cell>
          <table:table-cell office:value-type="date" office:date-value="1978-11-06T00:00:00" table:style-name="ce4">
            <text:p>1978-11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9040515</text:p>
          </table:table-cell>
          <table:table-cell office:value-type="string" table:style-name="ce1">
            <text:p>carlos.diaz936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04T07:22:00" table:style-name="ce5">
            <text:p>2026-05-04 07:22</text:p>
          </table:table-cell>
          <table:table-cell office:value-type="date" office:date-value="2026-07-03T06:13:00" table:style-name="ce6">
            <text:p>2026-07-03 06:13</text:p>
          </table:table-cell>
          <table:table-cell table:number-columns-repeated="16369"/>
        </table:table-row>
        <table:table-row table:style-name="ro1">
          <table:table-cell office:value-type="float" office:value="937" table:style-name="ce3">
            <text:p>93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48679930</text:p>
          </table:table-cell>
          <table:table-cell office:value-type="string" table:style-name="ce1">
            <text:p>Cristian Vargas Jiménez</text:p>
          </table:table-cell>
          <table:table-cell office:value-type="date" office:date-value="1983-11-02T00:00:00" table:style-name="ce4">
            <text:p>1983-11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9633698</text:p>
          </table:table-cell>
          <table:table-cell office:value-type="string" table:style-name="ce1">
            <text:p>cristian.vargas93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4-14T03:08:00" table:style-name="ce5">
            <text:p>2026-04-14 03:08</text:p>
          </table:table-cell>
          <table:table-cell office:value-type="date" office:date-value="2026-05-17T04:49:00" table:style-name="ce6">
            <text:p>2026-05-17 04:49</text:p>
          </table:table-cell>
          <table:table-cell table:number-columns-repeated="16369"/>
        </table:table-row>
        <table:table-row table:style-name="ro1">
          <table:table-cell office:value-type="float" office:value="938" table:style-name="ce3">
            <text:p>93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4708339</text:p>
          </table:table-cell>
          <table:table-cell office:value-type="string" table:style-name="ce1">
            <text:p>Alejandro Martínez Cárdenas</text:p>
          </table:table-cell>
          <table:table-cell office:value-type="date" office:date-value="1955-05-26T00:00:00" table:style-name="ce4">
            <text:p>1955-05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1274544</text:p>
          </table:table-cell>
          <table:table-cell office:value-type="string" table:style-name="ce1">
            <text:p>alejandro.martinez938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05T13:50:00" table:style-name="ce5">
            <text:p>2026-06-05 13:50</text:p>
          </table:table-cell>
          <table:table-cell office:value-type="date" office:date-value="2026-07-04T17:56:00" table:style-name="ce6">
            <text:p>2026-07-04 17:56</text:p>
          </table:table-cell>
          <table:table-cell table:number-columns-repeated="16369"/>
        </table:table-row>
        <table:table-row table:style-name="ro1">
          <table:table-cell office:value-type="float" office:value="939" table:style-name="ce3">
            <text:p>93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58128574</text:p>
          </table:table-cell>
          <table:table-cell office:value-type="string" table:style-name="ce1">
            <text:p>Jorge Daniel Romero Jiménez</text:p>
          </table:table-cell>
          <table:table-cell office:value-type="date" office:date-value="1956-06-28T00:00:00" table:style-name="ce4">
            <text:p>1956-06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9116074</text:p>
          </table:table-cell>
          <table:table-cell office:value-type="string" table:style-name="ce1">
            <text:p>jorge.romero93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7-10T07:39:00" table:style-name="ce5">
            <text:p>2026-07-10 07:39</text:p>
          </table:table-cell>
          <table:table-cell office:value-type="date" office:date-value="2026-07-10T09:29:00" table:style-name="ce6">
            <text:p>2026-07-10 09:29</text:p>
          </table:table-cell>
          <table:table-cell table:number-columns-repeated="16369"/>
        </table:table-row>
        <table:table-row table:style-name="ro1">
          <table:table-cell office:value-type="float" office:value="940" table:style-name="ce3">
            <text:p>94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113887685</text:p>
          </table:table-cell>
          <table:table-cell office:value-type="string" table:style-name="ce1">
            <text:p>Alejandro Santiago Rodríguez López</text:p>
          </table:table-cell>
          <table:table-cell office:value-type="date" office:date-value="2015-12-30T00:00:00" table:style-name="ce4">
            <text:p>2015-12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1854152</text:p>
          </table:table-cell>
          <table:table-cell office:value-type="string" table:style-name="ce1">
            <text:p>alejandro.rodriguez940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21T10:53:00" table:style-name="ce5">
            <text:p>2026-04-21 10:53</text:p>
          </table:table-cell>
          <table:table-cell office:value-type="date" office:date-value="2026-07-05T17:38:00" table:style-name="ce6">
            <text:p>2026-07-05 17:38</text:p>
          </table:table-cell>
          <table:table-cell table:number-columns-repeated="16369"/>
        </table:table-row>
        <table:table-row table:style-name="ro1">
          <table:table-cell office:value-type="float" office:value="941" table:style-name="ce3">
            <text:p>94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51242169</text:p>
          </table:table-cell>
          <table:table-cell office:value-type="string" table:style-name="ce1">
            <text:p>Jorge Hernández Romero</text:p>
          </table:table-cell>
          <table:table-cell office:value-type="date" office:date-value="1959-02-13T00:00:00" table:style-name="ce4">
            <text:p>1959-02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2204681</text:p>
          </table:table-cell>
          <table:table-cell office:value-type="string" table:style-name="ce1">
            <text:p>jorge.hernandez941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7-10T04:59:00" table:style-name="ce5">
            <text:p>2026-07-10 04:59</text:p>
          </table:table-cell>
          <table:table-cell office:value-type="date" office:date-value="2026-07-10T08:29:00" table:style-name="ce6">
            <text:p>2026-07-10 08:29</text:p>
          </table:table-cell>
          <table:table-cell table:number-columns-repeated="16369"/>
        </table:table-row>
        <table:table-row table:style-name="ro1">
          <table:table-cell office:value-type="float" office:value="942" table:style-name="ce3">
            <text:p>94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3237738</text:p>
          </table:table-cell>
          <table:table-cell office:value-type="string" table:style-name="ce1">
            <text:p>Alejandra Giraldo González</text:p>
          </table:table-cell>
          <table:table-cell office:value-type="date" office:date-value="1974-01-28T00:00:00" table:style-name="ce4">
            <text:p>1974-01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2127598</text:p>
          </table:table-cell>
          <table:table-cell office:value-type="string" table:style-name="ce1">
            <text:p>alejandra.giraldo942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14T21:20:00" table:style-name="ce5">
            <text:p>2026-04-14 21:20</text:p>
          </table:table-cell>
          <table:table-cell office:value-type="date" office:date-value="2026-05-09T14:04:00" table:style-name="ce6">
            <text:p>2026-05-09 14:04</text:p>
          </table:table-cell>
          <table:table-cell table:number-columns-repeated="16369"/>
        </table:table-row>
        <table:table-row table:style-name="ro1">
          <table:table-cell office:value-type="float" office:value="943" table:style-name="ce3">
            <text:p>94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53646926</text:p>
          </table:table-cell>
          <table:table-cell office:value-type="string" table:style-name="ce1">
            <text:p>Gabriela Camila González Sánchez</text:p>
          </table:table-cell>
          <table:table-cell office:value-type="date" office:date-value="1995-09-06T00:00:00" table:style-name="ce4">
            <text:p>1995-09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7227745</text:p>
          </table:table-cell>
          <table:table-cell office:value-type="string" table:style-name="ce1">
            <text:p>gabriela.gonzalez943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13T19:13:00" table:style-name="ce5">
            <text:p>2026-05-13 19:13</text:p>
          </table:table-cell>
          <table:table-cell office:value-type="date" office:date-value="2026-05-24T09:49:00" table:style-name="ce6">
            <text:p>2026-05-24 09:49</text:p>
          </table:table-cell>
          <table:table-cell table:number-columns-repeated="16369"/>
        </table:table-row>
        <table:table-row table:style-name="ro1">
          <table:table-cell office:value-type="float" office:value="944" table:style-name="ce3">
            <text:p>94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8301450</text:p>
          </table:table-cell>
          <table:table-cell office:value-type="string" table:style-name="ce1">
            <text:p>Nicolás Martínez Silva</text:p>
          </table:table-cell>
          <table:table-cell office:value-type="date" office:date-value="1967-09-06T00:00:00" table:style-name="ce4">
            <text:p>1967-09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6364516</text:p>
          </table:table-cell>
          <table:table-cell office:value-type="string" table:style-name="ce1">
            <text:p>nicolas.martinez944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18T07:47:00" table:style-name="ce5">
            <text:p>2026-04-18 07:47</text:p>
          </table:table-cell>
          <table:table-cell office:value-type="date" office:date-value="2026-04-19T21:17:00" table:style-name="ce6">
            <text:p>2026-04-19 21:17</text:p>
          </table:table-cell>
          <table:table-cell table:number-columns-repeated="16369"/>
        </table:table-row>
        <table:table-row table:style-name="ro1">
          <table:table-cell office:value-type="float" office:value="945" table:style-name="ce3">
            <text:p>94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88189587</text:p>
          </table:table-cell>
          <table:table-cell office:value-type="string" table:style-name="ce1">
            <text:p>Cristian Castro Ramírez</text:p>
          </table:table-cell>
          <table:table-cell office:value-type="date" office:date-value="1979-12-02T00:00:00" table:style-name="ce4">
            <text:p>1979-12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7361721</text:p>
          </table:table-cell>
          <table:table-cell office:value-type="string" table:style-name="ce1">
            <text:p>cristian.castro94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24T03:15:00" table:style-name="ce5">
            <text:p>2026-03-24 03:15</text:p>
          </table:table-cell>
          <table:table-cell office:value-type="date" office:date-value="2026-06-28T23:45:00" table:style-name="ce6">
            <text:p>2026-06-28 23:45</text:p>
          </table:table-cell>
          <table:table-cell table:number-columns-repeated="16369"/>
        </table:table-row>
        <table:table-row table:style-name="ro1">
          <table:table-cell office:value-type="float" office:value="946" table:style-name="ce3">
            <text:p>94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89590619</text:p>
          </table:table-cell>
          <table:table-cell office:value-type="string" table:style-name="ce1">
            <text:p>Daniela Isabella Castaño Martínez</text:p>
          </table:table-cell>
          <table:table-cell office:value-type="date" office:date-value="1948-04-03T00:00:00" table:style-name="ce4">
            <text:p>1948-04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1332777</text:p>
          </table:table-cell>
          <table:table-cell office:value-type="string" table:style-name="ce1">
            <text:p>daniela.castano946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6-23T14:00:00" table:style-name="ce5">
            <text:p>2026-06-23 14:00</text:p>
          </table:table-cell>
          <table:table-cell office:value-type="date" office:date-value="2026-06-24T21:12:00" table:style-name="ce6">
            <text:p>2026-06-24 21:12</text:p>
          </table:table-cell>
          <table:table-cell table:number-columns-repeated="16369"/>
        </table:table-row>
        <table:table-row table:style-name="ro1">
          <table:table-cell office:value-type="float" office:value="947" table:style-name="ce3">
            <text:p>947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796633948</text:p>
          </table:table-cell>
          <table:table-cell office:value-type="string" table:style-name="ce1">
            <text:p>Andrés Silva García</text:p>
          </table:table-cell>
          <table:table-cell office:value-type="date" office:date-value="2014-04-18T00:00:00" table:style-name="ce4">
            <text:p>2014-04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4277293</text:p>
          </table:table-cell>
          <table:table-cell office:value-type="string" table:style-name="ce1">
            <text:p>andres.silva947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7-09T01:22:00" table:style-name="ce5">
            <text:p>2026-07-09 01:22</text:p>
          </table:table-cell>
          <table:table-cell office:value-type="date" office:date-value="2026-07-09T01:26:00" table:style-name="ce6">
            <text:p>2026-07-09 01:26</text:p>
          </table:table-cell>
          <table:table-cell table:number-columns-repeated="16369"/>
        </table:table-row>
        <table:table-row table:style-name="ro1">
          <table:table-cell office:value-type="float" office:value="948" table:style-name="ce3">
            <text:p>94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8136318</text:p>
          </table:table-cell>
          <table:table-cell office:value-type="string" table:style-name="ce1">
            <text:p>Miguel Nicolás Ramírez Silva</text:p>
          </table:table-cell>
          <table:table-cell office:value-type="date" office:date-value="1995-01-04T00:00:00" table:style-name="ce4">
            <text:p>1995-01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6912601</text:p>
          </table:table-cell>
          <table:table-cell office:value-type="string" table:style-name="ce1">
            <text:p>miguel.ramirez948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13T23:02:00" table:style-name="ce5">
            <text:p>2026-06-13 23:02</text:p>
          </table:table-cell>
          <table:table-cell office:value-type="date" office:date-value="2026-07-02T11:46:00" table:style-name="ce6">
            <text:p>2026-07-02 11:46</text:p>
          </table:table-cell>
          <table:table-cell table:number-columns-repeated="16369"/>
        </table:table-row>
        <table:table-row table:style-name="ro1">
          <table:table-cell office:value-type="float" office:value="949" table:style-name="ce3">
            <text:p>94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83755964</text:p>
          </table:table-cell>
          <table:table-cell office:value-type="string" table:style-name="ce1">
            <text:p>Diana Mendoza Giraldo</text:p>
          </table:table-cell>
          <table:table-cell office:value-type="date" office:date-value="1959-03-06T00:00:00" table:style-name="ce4">
            <text:p>1959-03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6549410</text:p>
          </table:table-cell>
          <table:table-cell office:value-type="string" table:style-name="ce1">
            <text:p>diana.mendoza949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20T12:24:00" table:style-name="ce5">
            <text:p>2026-03-20 12:24</text:p>
          </table:table-cell>
          <table:table-cell office:value-type="date" office:date-value="2026-06-10T16:06:00" table:style-name="ce6">
            <text:p>2026-06-10 16:06</text:p>
          </table:table-cell>
          <table:table-cell table:number-columns-repeated="16369"/>
        </table:table-row>
        <table:table-row table:style-name="ro1">
          <table:table-cell office:value-type="float" office:value="950" table:style-name="ce3">
            <text:p>95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25808292</text:p>
          </table:table-cell>
          <table:table-cell office:value-type="string" table:style-name="ce1">
            <text:p>Mateo Valencia Hernández</text:p>
          </table:table-cell>
          <table:table-cell office:value-type="date" office:date-value="2003-01-23T00:00:00" table:style-name="ce4">
            <text:p>2003-01-23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142093238</text:p>
          </table:table-cell>
          <table:table-cell office:value-type="string" table:style-name="ce1">
            <text:p>mateo.valencia95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03T13:44:00" table:style-name="ce5">
            <text:p>2026-04-03 13:44</text:p>
          </table:table-cell>
          <table:table-cell office:value-type="date" office:date-value="2026-04-28T04:06:00" table:style-name="ce6">
            <text:p>2026-04-28 04:06</text:p>
          </table:table-cell>
          <table:table-cell table:number-columns-repeated="16369"/>
        </table:table-row>
        <table:table-row table:style-name="ro1">
          <table:table-cell office:value-type="float" office:value="951" table:style-name="ce3">
            <text:p>95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25447076</text:p>
          </table:table-cell>
          <table:table-cell office:value-type="string" table:style-name="ce1">
            <text:p>Cristian Valencia Ruiz</text:p>
          </table:table-cell>
          <table:table-cell office:value-type="date" office:date-value="1990-12-25T00:00:00" table:style-name="ce4">
            <text:p>1990-12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3315589</text:p>
          </table:table-cell>
          <table:table-cell office:value-type="string" table:style-name="ce1">
            <text:p>cristian.valencia95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4-13T06:45:00" table:style-name="ce5">
            <text:p>2026-04-13 06:45</text:p>
          </table:table-cell>
          <table:table-cell office:value-type="date" office:date-value="2026-06-09T15:05:00" table:style-name="ce6">
            <text:p>2026-06-09 15:05</text:p>
          </table:table-cell>
          <table:table-cell table:number-columns-repeated="16369"/>
        </table:table-row>
        <table:table-row table:style-name="ro1">
          <table:table-cell office:value-type="float" office:value="952" table:style-name="ce3">
            <text:p>95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59932504</text:p>
          </table:table-cell>
          <table:table-cell office:value-type="string" table:style-name="ce1">
            <text:p>Mateo Rojas González</text:p>
          </table:table-cell>
          <table:table-cell office:value-type="date" office:date-value="1950-12-20T00:00:00" table:style-name="ce4">
            <text:p>1950-12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4591871</text:p>
          </table:table-cell>
          <table:table-cell office:value-type="string" table:style-name="ce1">
            <text:p>mateo.rojas952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3-17T15:32:00" table:style-name="ce5">
            <text:p>2026-03-17 15:32</text:p>
          </table:table-cell>
          <table:table-cell office:value-type="date" office:date-value="2026-06-02T08:08:00" table:style-name="ce6">
            <text:p>2026-06-02 08:08</text:p>
          </table:table-cell>
          <table:table-cell table:number-columns-repeated="16369"/>
        </table:table-row>
        <table:table-row table:style-name="ro1">
          <table:table-cell office:value-type="float" office:value="953" table:style-name="ce3">
            <text:p>953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520926326</text:p>
          </table:table-cell>
          <table:table-cell office:value-type="string" table:style-name="ce1">
            <text:p>Natalia González Rodríguez</text:p>
          </table:table-cell>
          <table:table-cell office:value-type="date" office:date-value="2013-09-04T00:00:00" table:style-name="ce4">
            <text:p>2013-09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5946802</text:p>
          </table:table-cell>
          <table:table-cell office:value-type="string" table:style-name="ce1">
            <text:p>natalia.gonzalez953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19T15:48:00" table:style-name="ce5">
            <text:p>2026-06-19 15:48</text:p>
          </table:table-cell>
          <table:table-cell office:value-type="date" office:date-value="2026-06-25T22:27:00" table:style-name="ce6">
            <text:p>2026-06-25 22:27</text:p>
          </table:table-cell>
          <table:table-cell table:number-columns-repeated="16369"/>
        </table:table-row>
        <table:table-row table:style-name="ro1">
          <table:table-cell office:value-type="float" office:value="954" table:style-name="ce3">
            <text:p>95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19431824</text:p>
          </table:table-cell>
          <table:table-cell office:value-type="string" table:style-name="ce1">
            <text:p>Felipe Romero Jiménez</text:p>
          </table:table-cell>
          <table:table-cell office:value-type="date" office:date-value="1999-05-06T00:00:00" table:style-name="ce4">
            <text:p>1999-05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5256608</text:p>
          </table:table-cell>
          <table:table-cell office:value-type="string" table:style-name="ce1">
            <text:p>felipe.romero954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27T05:58:00" table:style-name="ce5">
            <text:p>2026-04-27 05:58</text:p>
          </table:table-cell>
          <table:table-cell office:value-type="date" office:date-value="2026-05-24T06:57:00" table:style-name="ce6">
            <text:p>2026-05-24 06:57</text:p>
          </table:table-cell>
          <table:table-cell table:number-columns-repeated="16369"/>
        </table:table-row>
        <table:table-row table:style-name="ro1">
          <table:table-cell office:value-type="float" office:value="955" table:style-name="ce3">
            <text:p>95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53093216</text:p>
          </table:table-cell>
          <table:table-cell office:value-type="string" table:style-name="ce1">
            <text:p>Juliana Sánchez Romero</text:p>
          </table:table-cell>
          <table:table-cell office:value-type="date" office:date-value="1961-09-11T00:00:00" table:style-name="ce4">
            <text:p>1961-09-1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2829569</text:p>
          </table:table-cell>
          <table:table-cell office:value-type="string" table:style-name="ce1">
            <text:p>juliana.sanchez955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07T07:01:00" table:style-name="ce5">
            <text:p>2026-04-07 07:01</text:p>
          </table:table-cell>
          <table:table-cell office:value-type="date" office:date-value="2026-07-07T20:30:00" table:style-name="ce6">
            <text:p>2026-07-07 20:30</text:p>
          </table:table-cell>
          <table:table-cell table:number-columns-repeated="16369"/>
        </table:table-row>
        <table:table-row table:style-name="ro1">
          <table:table-cell office:value-type="float" office:value="956" table:style-name="ce3">
            <text:p>95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89082931</text:p>
          </table:table-cell>
          <table:table-cell office:value-type="string" table:style-name="ce1">
            <text:p>Luisa Laura Restrepo Pérez</text:p>
          </table:table-cell>
          <table:table-cell office:value-type="date" office:date-value="1955-03-08T00:00:00" table:style-name="ce4">
            <text:p>1955-03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7595946</text:p>
          </table:table-cell>
          <table:table-cell office:value-type="string" table:style-name="ce1">
            <text:p>luisa.restrepo956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24T18:25:00" table:style-name="ce5">
            <text:p>2026-06-24 18:25</text:p>
          </table:table-cell>
          <table:table-cell office:value-type="date" office:date-value="2026-06-25T04:50:00" table:style-name="ce6">
            <text:p>2026-06-25 04:50</text:p>
          </table:table-cell>
          <table:table-cell table:number-columns-repeated="16369"/>
        </table:table-row>
        <table:table-row table:style-name="ro1">
          <table:table-cell office:value-type="float" office:value="957" table:style-name="ce3">
            <text:p>957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957052823</text:p>
          </table:table-cell>
          <table:table-cell office:value-type="string" table:style-name="ce1">
            <text:p>Alejandro Moreno Restrepo</text:p>
          </table:table-cell>
          <table:table-cell office:value-type="date" office:date-value="2023-12-27T00:00:00" table:style-name="ce4">
            <text:p>2023-12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1630950</text:p>
          </table:table-cell>
          <table:table-cell office:value-type="string" table:style-name="ce1">
            <text:p>alejandro.moreno957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25T10:07:00" table:style-name="ce5">
            <text:p>2026-06-25 10:07</text:p>
          </table:table-cell>
          <table:table-cell office:value-type="date" office:date-value="2026-07-06T18:39:00" table:style-name="ce6">
            <text:p>2026-07-06 18:39</text:p>
          </table:table-cell>
          <table:table-cell table:number-columns-repeated="16369"/>
        </table:table-row>
        <table:table-row table:style-name="ro1">
          <table:table-cell office:value-type="float" office:value="958" table:style-name="ce3">
            <text:p>95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04129787</text:p>
          </table:table-cell>
          <table:table-cell office:value-type="string" table:style-name="ce1">
            <text:p>Andrea Ana González Sánchez</text:p>
          </table:table-cell>
          <table:table-cell office:value-type="date" office:date-value="1964-04-03T00:00:00" table:style-name="ce4">
            <text:p>1964-04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7737985</text:p>
          </table:table-cell>
          <table:table-cell office:value-type="string" table:style-name="ce1">
            <text:p>andrea.gonzalez958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08T21:10:00" table:style-name="ce5">
            <text:p>2026-06-08 21:10</text:p>
          </table:table-cell>
          <table:table-cell office:value-type="date" office:date-value="2026-06-26T18:01:00" table:style-name="ce6">
            <text:p>2026-06-26 18:01</text:p>
          </table:table-cell>
          <table:table-cell table:number-columns-repeated="16369"/>
        </table:table-row>
        <table:table-row table:style-name="ro1">
          <table:table-cell office:value-type="float" office:value="959" table:style-name="ce3">
            <text:p>95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26632783</text:p>
          </table:table-cell>
          <table:table-cell office:value-type="string" table:style-name="ce1">
            <text:p>Daniela Ortiz González</text:p>
          </table:table-cell>
          <table:table-cell office:value-type="date" office:date-value="2006-03-26T00:00:00" table:style-name="ce4">
            <text:p>2006-03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8941255</text:p>
          </table:table-cell>
          <table:table-cell office:value-type="string" table:style-name="ce1">
            <text:p>daniela.ortiz959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4-21T18:36:00" table:style-name="ce5">
            <text:p>2026-04-21 18:36</text:p>
          </table:table-cell>
          <table:table-cell office:value-type="date" office:date-value="2026-06-09T18:54:00" table:style-name="ce6">
            <text:p>2026-06-09 18:54</text:p>
          </table:table-cell>
          <table:table-cell table:number-columns-repeated="16369"/>
        </table:table-row>
        <table:table-row table:style-name="ro1">
          <table:table-cell office:value-type="float" office:value="960" table:style-name="ce3">
            <text:p>96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61266228</text:p>
          </table:table-cell>
          <table:table-cell office:value-type="string" table:style-name="ce1">
            <text:p>Andrés Rojas Quintero</text:p>
          </table:table-cell>
          <table:table-cell office:value-type="date" office:date-value="1986-03-17T00:00:00" table:style-name="ce4">
            <text:p>1986-03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1127483</text:p>
          </table:table-cell>
          <table:table-cell office:value-type="string" table:style-name="ce1">
            <text:p>andres.rojas96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4-13T11:39:00" table:style-name="ce5">
            <text:p>2026-04-13 11:39</text:p>
          </table:table-cell>
          <table:table-cell office:value-type="date" office:date-value="2026-06-22T14:56:00" table:style-name="ce6">
            <text:p>2026-06-22 14:56</text:p>
          </table:table-cell>
          <table:table-cell table:number-columns-repeated="16369"/>
        </table:table-row>
        <table:table-row table:style-name="ro1">
          <table:table-cell office:value-type="float" office:value="961" table:style-name="ce3">
            <text:p>96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7077947</text:p>
          </table:table-cell>
          <table:table-cell office:value-type="string" table:style-name="ce1">
            <text:p>Daniela Ruiz Martínez</text:p>
          </table:table-cell>
          <table:table-cell office:value-type="date" office:date-value="1956-09-13T00:00:00" table:style-name="ce4">
            <text:p>1956-09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9683241</text:p>
          </table:table-cell>
          <table:table-cell office:value-type="string" table:style-name="ce1">
            <text:p>daniela.ruiz961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13T18:41:00" table:style-name="ce5">
            <text:p>2026-05-13 18:41</text:p>
          </table:table-cell>
          <table:table-cell office:value-type="date" office:date-value="2026-06-23T07:20:00" table:style-name="ce6">
            <text:p>2026-06-23 07:20</text:p>
          </table:table-cell>
          <table:table-cell table:number-columns-repeated="16369"/>
        </table:table-row>
        <table:table-row table:style-name="ro1">
          <table:table-cell office:value-type="float" office:value="962" table:style-name="ce3">
            <text:p>96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582379910</text:p>
          </table:table-cell>
          <table:table-cell office:value-type="string" table:style-name="ce1">
            <text:p>Sofía Jiménez Pérez</text:p>
          </table:table-cell>
          <table:table-cell office:value-type="date" office:date-value="2014-12-07T00:00:00" table:style-name="ce4">
            <text:p>2014-12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6453474</text:p>
          </table:table-cell>
          <table:table-cell office:value-type="string" table:style-name="ce1">
            <text:p>sofia.jimenez96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6-12T18:28:00" table:style-name="ce5">
            <text:p>2026-06-12 18:28</text:p>
          </table:table-cell>
          <table:table-cell office:value-type="date" office:date-value="2026-06-23T12:29:00" table:style-name="ce6">
            <text:p>2026-06-23 12:29</text:p>
          </table:table-cell>
          <table:table-cell table:number-columns-repeated="16369"/>
        </table:table-row>
        <table:table-row table:style-name="ro1">
          <table:table-cell office:value-type="float" office:value="963" table:style-name="ce3">
            <text:p>96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08971837</text:p>
          </table:table-cell>
          <table:table-cell office:value-type="string" table:style-name="ce1">
            <text:p>Catalina Muñoz Martínez</text:p>
          </table:table-cell>
          <table:table-cell office:value-type="date" office:date-value="1959-11-25T00:00:00" table:style-name="ce4">
            <text:p>1959-11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8010484</text:p>
          </table:table-cell>
          <table:table-cell office:value-type="string" table:style-name="ce1">
            <text:p>catalina.munoz96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5-06T05:40:00" table:style-name="ce5">
            <text:p>2026-05-06 05:40</text:p>
          </table:table-cell>
          <table:table-cell office:value-type="date" office:date-value="2026-07-09T22:06:00" table:style-name="ce6">
            <text:p>2026-07-09 22:06</text:p>
          </table:table-cell>
          <table:table-cell table:number-columns-repeated="16369"/>
        </table:table-row>
        <table:table-row table:style-name="ro1">
          <table:table-cell office:value-type="float" office:value="964" table:style-name="ce3">
            <text:p>96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9696289</text:p>
          </table:table-cell>
          <table:table-cell office:value-type="string" table:style-name="ce1">
            <text:p>Alejandro Julián Silva Cárdenas</text:p>
          </table:table-cell>
          <table:table-cell office:value-type="date" office:date-value="1973-08-12T00:00:00" table:style-name="ce4">
            <text:p>1973-08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7396038</text:p>
          </table:table-cell>
          <table:table-cell office:value-type="string" table:style-name="ce1">
            <text:p>alejandro.silva964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07T17:29:00" table:style-name="ce5">
            <text:p>2026-05-07 17:29</text:p>
          </table:table-cell>
          <table:table-cell office:value-type="date" office:date-value="2026-06-22T11:17:00" table:style-name="ce6">
            <text:p>2026-06-22 11:17</text:p>
          </table:table-cell>
          <table:table-cell table:number-columns-repeated="16369"/>
        </table:table-row>
        <table:table-row table:style-name="ro1">
          <table:table-cell office:value-type="float" office:value="965" table:style-name="ce3">
            <text:p>96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49434588</text:p>
          </table:table-cell>
          <table:table-cell office:value-type="string" table:style-name="ce1">
            <text:p>Gabriela Laura Martínez Cárdenas</text:p>
          </table:table-cell>
          <table:table-cell office:value-type="date" office:date-value="1987-10-08T00:00:00" table:style-name="ce4">
            <text:p>1987-10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5332722</text:p>
          </table:table-cell>
          <table:table-cell office:value-type="string" table:style-name="ce1">
            <text:p>gabriela.martinez965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4-02T05:16:00" table:style-name="ce5">
            <text:p>2026-04-02 05:16</text:p>
          </table:table-cell>
          <table:table-cell office:value-type="date" office:date-value="2026-07-05T22:03:00" table:style-name="ce6">
            <text:p>2026-07-05 22:03</text:p>
          </table:table-cell>
          <table:table-cell table:number-columns-repeated="16369"/>
        </table:table-row>
        <table:table-row table:style-name="ro1">
          <table:table-cell office:value-type="float" office:value="966" table:style-name="ce3">
            <text:p>96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7227706</text:p>
          </table:table-cell>
          <table:table-cell office:value-type="string" table:style-name="ce1">
            <text:p>Felipe Torres Ramírez</text:p>
          </table:table-cell>
          <table:table-cell office:value-type="date" office:date-value="1983-07-25T00:00:00" table:style-name="ce4">
            <text:p>1983-07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3133314</text:p>
          </table:table-cell>
          <table:table-cell office:value-type="string" table:style-name="ce1">
            <text:p>felipe.torres96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23T05:45:00" table:style-name="ce5">
            <text:p>2026-04-23 05:45</text:p>
          </table:table-cell>
          <table:table-cell office:value-type="date" office:date-value="2026-07-06T09:23:00" table:style-name="ce6">
            <text:p>2026-07-06 09:23</text:p>
          </table:table-cell>
          <table:table-cell table:number-columns-repeated="16369"/>
        </table:table-row>
        <table:table-row table:style-name="ro1">
          <table:table-cell office:value-type="float" office:value="967" table:style-name="ce3">
            <text:p>96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7455665</text:p>
          </table:table-cell>
          <table:table-cell office:value-type="string" table:style-name="ce1">
            <text:p>Diana Paula Ramírez Ospina</text:p>
          </table:table-cell>
          <table:table-cell office:value-type="date" office:date-value="1973-11-15T00:00:00" table:style-name="ce4">
            <text:p>1973-11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6378352</text:p>
          </table:table-cell>
          <table:table-cell office:value-type="string" table:style-name="ce1">
            <text:p>diana.ramirez96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En atención</text:p>
          </table:table-cell>
          <table:table-cell office:value-type="date" office:date-value="2026-05-03T17:49:00" table:style-name="ce5">
            <text:p>2026-05-03 17:49</text:p>
          </table:table-cell>
          <table:table-cell office:value-type="date" office:date-value="2026-05-11T21:32:00" table:style-name="ce6">
            <text:p>2026-05-11 21:32</text:p>
          </table:table-cell>
          <table:table-cell table:number-columns-repeated="16369"/>
        </table:table-row>
        <table:table-row table:style-name="ro1">
          <table:table-cell office:value-type="float" office:value="968" table:style-name="ce3">
            <text:p>96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98007770</text:p>
          </table:table-cell>
          <table:table-cell office:value-type="string" table:style-name="ce1">
            <text:p>David Mateo Álvarez Quintero</text:p>
          </table:table-cell>
          <table:table-cell office:value-type="date" office:date-value="1957-10-02T00:00:00" table:style-name="ce4">
            <text:p>1957-10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5144069</text:p>
          </table:table-cell>
          <table:table-cell office:value-type="string" table:style-name="ce1">
            <text:p>david.alvarez968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4-26T16:12:00" table:style-name="ce5">
            <text:p>2026-04-26 16:12</text:p>
          </table:table-cell>
          <table:table-cell office:value-type="date" office:date-value="2026-05-16T01:44:00" table:style-name="ce6">
            <text:p>2026-05-16 01:44</text:p>
          </table:table-cell>
          <table:table-cell table:number-columns-repeated="16369"/>
        </table:table-row>
        <table:table-row table:style-name="ro1">
          <table:table-cell office:value-type="float" office:value="969" table:style-name="ce3">
            <text:p>969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290907904</text:p>
          </table:table-cell>
          <table:table-cell office:value-type="string" table:style-name="ce1">
            <text:p>Felipe Daniel Hernández Martínez</text:p>
          </table:table-cell>
          <table:table-cell office:value-type="date" office:date-value="2016-05-27T00:00:00" table:style-name="ce4">
            <text:p>2016-05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9681307</text:p>
          </table:table-cell>
          <table:table-cell office:value-type="string" table:style-name="ce1">
            <text:p>felipe.hernandez969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28T00:25:00" table:style-name="ce5">
            <text:p>2026-06-28 00:25</text:p>
          </table:table-cell>
          <table:table-cell office:value-type="date" office:date-value="2026-07-09T05:53:00" table:style-name="ce6">
            <text:p>2026-07-09 05:53</text:p>
          </table:table-cell>
          <table:table-cell table:number-columns-repeated="16369"/>
        </table:table-row>
        <table:table-row table:style-name="ro1">
          <table:table-cell office:value-type="float" office:value="970" table:style-name="ce3">
            <text:p>97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1637830</text:p>
          </table:table-cell>
          <table:table-cell office:value-type="string" table:style-name="ce1">
            <text:p>Esteban Muñoz Hernández</text:p>
          </table:table-cell>
          <table:table-cell office:value-type="date" office:date-value="1969-03-27T00:00:00" table:style-name="ce4">
            <text:p>1969-03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9629829</text:p>
          </table:table-cell>
          <table:table-cell office:value-type="string" table:style-name="ce1">
            <text:p>esteban.munoz970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16T05:11:00" table:style-name="ce5">
            <text:p>2026-06-16 05:11</text:p>
          </table:table-cell>
          <table:table-cell office:value-type="date" office:date-value="2026-06-29T08:54:00" table:style-name="ce6">
            <text:p>2026-06-29 08:54</text:p>
          </table:table-cell>
          <table:table-cell table:number-columns-repeated="16369"/>
        </table:table-row>
        <table:table-row table:style-name="ro1">
          <table:table-cell office:value-type="float" office:value="971" table:style-name="ce3">
            <text:p>97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83618535</text:p>
          </table:table-cell>
          <table:table-cell office:value-type="string" table:style-name="ce1">
            <text:p>Nicolás Ricardo Cárdenas Pérez</text:p>
          </table:table-cell>
          <table:table-cell office:value-type="date" office:date-value="1982-02-27T00:00:00" table:style-name="ce4">
            <text:p>1982-02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8798900</text:p>
          </table:table-cell>
          <table:table-cell office:value-type="string" table:style-name="ce1">
            <text:p>nicolas.cardenas971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5-06T15:00:00" table:style-name="ce5">
            <text:p>2026-05-06 15:00</text:p>
          </table:table-cell>
          <table:table-cell office:value-type="date" office:date-value="2026-07-04T14:55:00" table:style-name="ce6">
            <text:p>2026-07-04 14:55</text:p>
          </table:table-cell>
          <table:table-cell table:number-columns-repeated="16369"/>
        </table:table-row>
        <table:table-row table:style-name="ro1">
          <table:table-cell office:value-type="float" office:value="972" table:style-name="ce3">
            <text:p>97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83598792</text:p>
          </table:table-cell>
          <table:table-cell office:value-type="string" table:style-name="ce1">
            <text:p>Luisa González Moreno</text:p>
          </table:table-cell>
          <table:table-cell office:value-type="date" office:date-value="1985-03-08T00:00:00" table:style-name="ce4">
            <text:p>1985-03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2336012</text:p>
          </table:table-cell>
          <table:table-cell office:value-type="string" table:style-name="ce1">
            <text:p>luisa.gonzalez972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En atención</text:p>
          </table:table-cell>
          <table:table-cell office:value-type="date" office:date-value="2026-03-11T14:51:00" table:style-name="ce5">
            <text:p>2026-03-11 14:51</text:p>
          </table:table-cell>
          <table:table-cell office:value-type="date" office:date-value="2026-04-16T01:20:00" table:style-name="ce6">
            <text:p>2026-04-16 01:20</text:p>
          </table:table-cell>
          <table:table-cell table:number-columns-repeated="16369"/>
        </table:table-row>
        <table:table-row table:style-name="ro1">
          <table:table-cell office:value-type="float" office:value="973" table:style-name="ce3">
            <text:p>97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7389824</text:p>
          </table:table-cell>
          <table:table-cell office:value-type="string" table:style-name="ce1">
            <text:p>Isabella Camila Rodríguez González</text:p>
          </table:table-cell>
          <table:table-cell office:value-type="date" office:date-value="1970-03-27T00:00:00" table:style-name="ce4">
            <text:p>1970-03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8859150</text:p>
          </table:table-cell>
          <table:table-cell office:value-type="string" table:style-name="ce1">
            <text:p>isabella.rodriguez97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01T21:01:00" table:style-name="ce5">
            <text:p>2026-05-01 21:01</text:p>
          </table:table-cell>
          <table:table-cell office:value-type="date" office:date-value="2026-07-06T04:22:00" table:style-name="ce6">
            <text:p>2026-07-06 04:22</text:p>
          </table:table-cell>
          <table:table-cell table:number-columns-repeated="16369"/>
        </table:table-row>
        <table:table-row table:style-name="ro1">
          <table:table-cell office:value-type="float" office:value="974" table:style-name="ce3">
            <text:p>97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07004128</text:p>
          </table:table-cell>
          <table:table-cell office:value-type="string" table:style-name="ce1">
            <text:p>Cristian Restrepo Álvarez</text:p>
          </table:table-cell>
          <table:table-cell office:value-type="date" office:date-value="1955-10-18T00:00:00" table:style-name="ce4">
            <text:p>1955-10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4066622</text:p>
          </table:table-cell>
          <table:table-cell office:value-type="string" table:style-name="ce1">
            <text:p>cristian.restrepo97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6-25T22:33:00" table:style-name="ce5">
            <text:p>2026-06-25 22:33</text:p>
          </table:table-cell>
          <table:table-cell office:value-type="date" office:date-value="2026-07-05T18:52:00" table:style-name="ce6">
            <text:p>2026-07-05 18:52</text:p>
          </table:table-cell>
          <table:table-cell table:number-columns-repeated="16369"/>
        </table:table-row>
        <table:table-row table:style-name="ro1">
          <table:table-cell office:value-type="float" office:value="975" table:style-name="ce3">
            <text:p>97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5708487</text:p>
          </table:table-cell>
          <table:table-cell office:value-type="string" table:style-name="ce1">
            <text:p>Laura Álvarez Silva</text:p>
          </table:table-cell>
          <table:table-cell office:value-type="date" office:date-value="1960-07-31T00:00:00" table:style-name="ce4">
            <text:p>1960-07-3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8086047</text:p>
          </table:table-cell>
          <table:table-cell office:value-type="string" table:style-name="ce1">
            <text:p>laura.alvarez97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03T15:58:00" table:style-name="ce5">
            <text:p>2026-05-03 15:58</text:p>
          </table:table-cell>
          <table:table-cell office:value-type="date" office:date-value="2026-06-06T14:08:00" table:style-name="ce6">
            <text:p>2026-06-06 14:08</text:p>
          </table:table-cell>
          <table:table-cell table:number-columns-repeated="16369"/>
        </table:table-row>
        <table:table-row table:style-name="ro1">
          <table:table-cell office:value-type="float" office:value="976" table:style-name="ce3">
            <text:p>976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041148593</text:p>
          </table:table-cell>
          <table:table-cell office:value-type="string" table:style-name="ce1">
            <text:p>Carlos Giraldo Torres</text:p>
          </table:table-cell>
          <table:table-cell office:value-type="date" office:date-value="2010-06-01T00:00:00" table:style-name="ce4">
            <text:p>2010-06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9511409</text:p>
          </table:table-cell>
          <table:table-cell office:value-type="string" table:style-name="ce1">
            <text:p>carlos.giraldo976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20T18:30:00" table:style-name="ce5">
            <text:p>2026-05-20 18:30</text:p>
          </table:table-cell>
          <table:table-cell office:value-type="date" office:date-value="2026-05-25T07:01:00" table:style-name="ce6">
            <text:p>2026-05-25 07:01</text:p>
          </table:table-cell>
          <table:table-cell table:number-columns-repeated="16369"/>
        </table:table-row>
        <table:table-row table:style-name="ro1">
          <table:table-cell office:value-type="float" office:value="977" table:style-name="ce3">
            <text:p>97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7345327</text:p>
          </table:table-cell>
          <table:table-cell office:value-type="string" table:style-name="ce1">
            <text:p>Isabella Álvarez Hernández</text:p>
          </table:table-cell>
          <table:table-cell office:value-type="date" office:date-value="2004-09-05T00:00:00" table:style-name="ce4">
            <text:p>2004-09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1306545</text:p>
          </table:table-cell>
          <table:table-cell office:value-type="string" table:style-name="ce1">
            <text:p>isabella.alvarez977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3-31T02:42:00" table:style-name="ce5">
            <text:p>2026-03-31 02:42</text:p>
          </table:table-cell>
          <table:table-cell office:value-type="date" office:date-value="2026-04-04T06:25:00" table:style-name="ce6">
            <text:p>2026-04-04 06:25</text:p>
          </table:table-cell>
          <table:table-cell table:number-columns-repeated="16369"/>
        </table:table-row>
        <table:table-row table:style-name="ro1">
          <table:table-cell office:value-type="float" office:value="978" table:style-name="ce3">
            <text:p>97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66155281</text:p>
          </table:table-cell>
          <table:table-cell office:value-type="string" table:style-name="ce1">
            <text:p>Natalia Castaño Valencia</text:p>
          </table:table-cell>
          <table:table-cell office:value-type="date" office:date-value="1986-08-28T00:00:00" table:style-name="ce4">
            <text:p>1986-08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8576185</text:p>
          </table:table-cell>
          <table:table-cell office:value-type="string" table:style-name="ce1">
            <text:p>natalia.castano978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20T06:07:00" table:style-name="ce5">
            <text:p>2026-06-20 06:07</text:p>
          </table:table-cell>
          <table:table-cell office:value-type="date" office:date-value="2026-06-21T14:52:00" table:style-name="ce6">
            <text:p>2026-06-21 14:52</text:p>
          </table:table-cell>
          <table:table-cell table:number-columns-repeated="16369"/>
        </table:table-row>
        <table:table-row table:style-name="ro1">
          <table:table-cell office:value-type="float" office:value="979" table:style-name="ce3">
            <text:p>97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80175703</text:p>
          </table:table-cell>
          <table:table-cell office:value-type="string" table:style-name="ce1">
            <text:p>Isabella Vargas Sánchez</text:p>
          </table:table-cell>
          <table:table-cell office:value-type="date" office:date-value="1972-08-05T00:00:00" table:style-name="ce4">
            <text:p>1972-08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5910871</text:p>
          </table:table-cell>
          <table:table-cell office:value-type="string" table:style-name="ce1">
            <text:p>isabella.vargas97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4-21T17:08:00" table:style-name="ce5">
            <text:p>2026-04-21 17:08</text:p>
          </table:table-cell>
          <table:table-cell office:value-type="date" office:date-value="2026-07-04T05:01:00" table:style-name="ce6">
            <text:p>2026-07-04 05:01</text:p>
          </table:table-cell>
          <table:table-cell table:number-columns-repeated="16369"/>
        </table:table-row>
        <table:table-row table:style-name="ro1">
          <table:table-cell office:value-type="float" office:value="980" table:style-name="ce3">
            <text:p>98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037554106</text:p>
          </table:table-cell>
          <table:table-cell office:value-type="string" table:style-name="ce1">
            <text:p>Miguel Torres Pérez</text:p>
          </table:table-cell>
          <table:table-cell office:value-type="date" office:date-value="2015-01-28T00:00:00" table:style-name="ce4">
            <text:p>2015-01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9147569</text:p>
          </table:table-cell>
          <table:table-cell office:value-type="string" table:style-name="ce1">
            <text:p>miguel.torres98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4-20T15:50:00" table:style-name="ce5">
            <text:p>2026-04-20 15:50</text:p>
          </table:table-cell>
          <table:table-cell office:value-type="date" office:date-value="2026-05-24T20:33:00" table:style-name="ce6">
            <text:p>2026-05-24 20:33</text:p>
          </table:table-cell>
          <table:table-cell table:number-columns-repeated="16369"/>
        </table:table-row>
        <table:table-row table:style-name="ro1">
          <table:table-cell office:value-type="float" office:value="981" table:style-name="ce3">
            <text:p>98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56716650</text:p>
          </table:table-cell>
          <table:table-cell office:value-type="string" table:style-name="ce1">
            <text:p>Manuela Valencia García</text:p>
          </table:table-cell>
          <table:table-cell office:value-type="date" office:date-value="1970-10-11T00:00:00" table:style-name="ce4">
            <text:p>1970-10-1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9579827</text:p>
          </table:table-cell>
          <table:table-cell office:value-type="string" table:style-name="ce1">
            <text:p>manuela.valencia981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7-02T02:57:00" table:style-name="ce5">
            <text:p>2026-07-02 02:57</text:p>
          </table:table-cell>
          <table:table-cell office:value-type="date" office:date-value="2026-07-06T02:31:00" table:style-name="ce6">
            <text:p>2026-07-06 02:31</text:p>
          </table:table-cell>
          <table:table-cell table:number-columns-repeated="16369"/>
        </table:table-row>
        <table:table-row table:style-name="ro1">
          <table:table-cell office:value-type="float" office:value="982" table:style-name="ce3">
            <text:p>98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790712673</text:p>
          </table:table-cell>
          <table:table-cell office:value-type="string" table:style-name="ce1">
            <text:p>Felipe Ortiz Rodríguez</text:p>
          </table:table-cell>
          <table:table-cell office:value-type="date" office:date-value="2013-03-30T00:00:00" table:style-name="ce4">
            <text:p>2013-03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6753368</text:p>
          </table:table-cell>
          <table:table-cell office:value-type="string" table:style-name="ce1">
            <text:p>felipe.ortiz982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20T11:18:00" table:style-name="ce5">
            <text:p>2026-06-20 11:18</text:p>
          </table:table-cell>
          <table:table-cell office:value-type="date" office:date-value="2026-06-26T17:21:00" table:style-name="ce6">
            <text:p>2026-06-26 17:21</text:p>
          </table:table-cell>
          <table:table-cell table:number-columns-repeated="16369"/>
        </table:table-row>
        <table:table-row table:style-name="ro1">
          <table:table-cell office:value-type="float" office:value="983" table:style-name="ce3">
            <text:p>98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26680439</text:p>
          </table:table-cell>
          <table:table-cell office:value-type="string" table:style-name="ce1">
            <text:p>Natalia Castaño Ruiz</text:p>
          </table:table-cell>
          <table:table-cell office:value-type="date" office:date-value="1999-01-08T00:00:00" table:style-name="ce4">
            <text:p>1999-01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9714284</text:p>
          </table:table-cell>
          <table:table-cell office:value-type="string" table:style-name="ce1">
            <text:p>natalia.castano98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28T13:08:00" table:style-name="ce5">
            <text:p>2026-06-28 13:08</text:p>
          </table:table-cell>
          <table:table-cell office:value-type="date" office:date-value="2026-06-28T15:29:00" table:style-name="ce6">
            <text:p>2026-06-28 15:29</text:p>
          </table:table-cell>
          <table:table-cell table:number-columns-repeated="16369"/>
        </table:table-row>
        <table:table-row table:style-name="ro1">
          <table:table-cell office:value-type="float" office:value="984" table:style-name="ce3">
            <text:p>98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63414822</text:p>
          </table:table-cell>
          <table:table-cell office:value-type="string" table:style-name="ce1">
            <text:p>Alejandra Ortiz Pérez</text:p>
          </table:table-cell>
          <table:table-cell office:value-type="date" office:date-value="1982-03-17T00:00:00" table:style-name="ce4">
            <text:p>1982-03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6686176</text:p>
          </table:table-cell>
          <table:table-cell office:value-type="string" table:style-name="ce1">
            <text:p>alejandra.ortiz98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3-16T09:42:00" table:style-name="ce5">
            <text:p>2026-03-16 09:42</text:p>
          </table:table-cell>
          <table:table-cell office:value-type="date" office:date-value="2026-07-04T15:08:00" table:style-name="ce6">
            <text:p>2026-07-04 15:08</text:p>
          </table:table-cell>
          <table:table-cell table:number-columns-repeated="16369"/>
        </table:table-row>
        <table:table-row table:style-name="ro1">
          <table:table-cell office:value-type="float" office:value="985" table:style-name="ce3">
            <text:p>98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01913008</text:p>
          </table:table-cell>
          <table:table-cell office:value-type="string" table:style-name="ce1">
            <text:p>Juliana Andrea López Torres</text:p>
          </table:table-cell>
          <table:table-cell office:value-type="date" office:date-value="1985-07-21T00:00:00" table:style-name="ce4">
            <text:p>1985-07-2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6793356</text:p>
          </table:table-cell>
          <table:table-cell office:value-type="string" table:style-name="ce1">
            <text:p>juliana.lopez985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Pendiente</text:p>
          </table:table-cell>
          <table:table-cell office:value-type="date" office:date-value="2026-04-14T15:15:00" table:style-name="ce5">
            <text:p>2026-04-14 15:15</text:p>
          </table:table-cell>
          <table:table-cell office:value-type="date" office:date-value="2026-04-15T03:04:00" table:style-name="ce6">
            <text:p>2026-04-15 03:04</text:p>
          </table:table-cell>
          <table:table-cell table:number-columns-repeated="16369"/>
        </table:table-row>
        <table:table-row table:style-name="ro1">
          <table:table-cell office:value-type="float" office:value="986" table:style-name="ce3">
            <text:p>98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86214945</text:p>
          </table:table-cell>
          <table:table-cell office:value-type="string" table:style-name="ce1">
            <text:p>José Jiménez González</text:p>
          </table:table-cell>
          <table:table-cell office:value-type="date" office:date-value="1961-01-02T00:00:00" table:style-name="ce4">
            <text:p>1961-01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5850976</text:p>
          </table:table-cell>
          <table:table-cell office:value-type="string" table:style-name="ce1">
            <text:p>jose.jimenez986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3-11T19:46:00" table:style-name="ce5">
            <text:p>2026-03-11 19:46</text:p>
          </table:table-cell>
          <table:table-cell office:value-type="date" office:date-value="2026-04-12T04:04:00" table:style-name="ce6">
            <text:p>2026-04-12 04:04</text:p>
          </table:table-cell>
          <table:table-cell table:number-columns-repeated="16369"/>
        </table:table-row>
        <table:table-row table:style-name="ro1">
          <table:table-cell office:value-type="float" office:value="987" table:style-name="ce3">
            <text:p>98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97101426</text:p>
          </table:table-cell>
          <table:table-cell office:value-type="string" table:style-name="ce1">
            <text:p>Sofía Ruiz Ramírez</text:p>
          </table:table-cell>
          <table:table-cell office:value-type="date" office:date-value="1985-05-05T00:00:00" table:style-name="ce4">
            <text:p>1985-05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6416528</text:p>
          </table:table-cell>
          <table:table-cell office:value-type="string" table:style-name="ce1">
            <text:p>sofia.ruiz987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6-02T06:13:00" table:style-name="ce5">
            <text:p>2026-06-02 06:13</text:p>
          </table:table-cell>
          <table:table-cell office:value-type="date" office:date-value="2026-06-26T18:48:00" table:style-name="ce6">
            <text:p>2026-06-26 18:48</text:p>
          </table:table-cell>
          <table:table-cell table:number-columns-repeated="16369"/>
        </table:table-row>
        <table:table-row table:style-name="ro1">
          <table:table-cell office:value-type="float" office:value="988" table:style-name="ce3">
            <text:p>98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08096522</text:p>
          </table:table-cell>
          <table:table-cell office:value-type="string" table:style-name="ce1">
            <text:p>Tomás Sebastián Mendoza Castaño</text:p>
          </table:table-cell>
          <table:table-cell office:value-type="date" office:date-value="1985-04-01T00:00:00" table:style-name="ce4">
            <text:p>1985-04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1300538</text:p>
          </table:table-cell>
          <table:table-cell office:value-type="string" table:style-name="ce1">
            <text:p>tomas.mendoza988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5-01T13:57:00" table:style-name="ce5">
            <text:p>2026-05-01 13:57</text:p>
          </table:table-cell>
          <table:table-cell office:value-type="date" office:date-value="2026-06-10T21:13:00" table:style-name="ce6">
            <text:p>2026-06-10 21:13</text:p>
          </table:table-cell>
          <table:table-cell table:number-columns-repeated="16369"/>
        </table:table-row>
        <table:table-row table:style-name="ro1">
          <table:table-cell office:value-type="float" office:value="989" table:style-name="ce3">
            <text:p>98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62386613</text:p>
          </table:table-cell>
          <table:table-cell office:value-type="string" table:style-name="ce1">
            <text:p>David Daniel Martínez Díaz</text:p>
          </table:table-cell>
          <table:table-cell office:value-type="date" office:date-value="1985-04-09T00:00:00" table:style-name="ce4">
            <text:p>1985-04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7745172</text:p>
          </table:table-cell>
          <table:table-cell office:value-type="string" table:style-name="ce1">
            <text:p>david.martinez989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6-15T10:27:00" table:style-name="ce5">
            <text:p>2026-06-15 10:27</text:p>
          </table:table-cell>
          <table:table-cell office:value-type="date" office:date-value="2026-06-19T22:53:00" table:style-name="ce6">
            <text:p>2026-06-19 22:53</text:p>
          </table:table-cell>
          <table:table-cell table:number-columns-repeated="16369"/>
        </table:table-row>
        <table:table-row table:style-name="ro1">
          <table:table-cell office:value-type="float" office:value="990" table:style-name="ce3">
            <text:p>99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52593563</text:p>
          </table:table-cell>
          <table:table-cell office:value-type="string" table:style-name="ce1">
            <text:p>Jorge Álvarez García</text:p>
          </table:table-cell>
          <table:table-cell office:value-type="date" office:date-value="1986-05-11T00:00:00" table:style-name="ce4">
            <text:p>1986-05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7237827</text:p>
          </table:table-cell>
          <table:table-cell office:value-type="string" table:style-name="ce1">
            <text:p>jorge.alvarez99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En atención</text:p>
          </table:table-cell>
          <table:table-cell office:value-type="date" office:date-value="2026-05-10T08:38:00" table:style-name="ce5">
            <text:p>2026-05-10 08:38</text:p>
          </table:table-cell>
          <table:table-cell office:value-type="date" office:date-value="2026-06-23T05:29:00" table:style-name="ce6">
            <text:p>2026-06-23 05:29</text:p>
          </table:table-cell>
          <table:table-cell table:number-columns-repeated="16369"/>
        </table:table-row>
        <table:table-row table:style-name="ro1">
          <table:table-cell office:value-type="float" office:value="991" table:style-name="ce3">
            <text:p>99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7104877</text:p>
          </table:table-cell>
          <table:table-cell office:value-type="string" table:style-name="ce1">
            <text:p>Nicolás Rodríguez Cárdenas</text:p>
          </table:table-cell>
          <table:table-cell office:value-type="date" office:date-value="1989-02-09T00:00:00" table:style-name="ce4">
            <text:p>1989-02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5219902</text:p>
          </table:table-cell>
          <table:table-cell office:value-type="string" table:style-name="ce1">
            <text:p>nicolas.rodriguez991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Pendiente</text:p>
          </table:table-cell>
          <table:table-cell office:value-type="date" office:date-value="2026-05-22T20:09:00" table:style-name="ce5">
            <text:p>2026-05-22 20:09</text:p>
          </table:table-cell>
          <table:table-cell office:value-type="date" office:date-value="2026-06-06T13:48:00" table:style-name="ce6">
            <text:p>2026-06-06 13:48</text:p>
          </table:table-cell>
          <table:table-cell table:number-columns-repeated="16369"/>
        </table:table-row>
        <table:table-row table:style-name="ro1">
          <table:table-cell office:value-type="float" office:value="992" table:style-name="ce3">
            <text:p>99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0531485</text:p>
          </table:table-cell>
          <table:table-cell office:value-type="string" table:style-name="ce1">
            <text:p>Daniel Díaz Rojas</text:p>
          </table:table-cell>
          <table:table-cell office:value-type="date" office:date-value="1997-03-10T00:00:00" table:style-name="ce4">
            <text:p>1997-03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7584034</text:p>
          </table:table-cell>
          <table:table-cell office:value-type="string" table:style-name="ce1">
            <text:p>daniel.diaz992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6-20T14:54:00" table:style-name="ce5">
            <text:p>2026-06-20 14:54</text:p>
          </table:table-cell>
          <table:table-cell office:value-type="date" office:date-value="2026-06-25T13:34:00" table:style-name="ce6">
            <text:p>2026-06-25 13:34</text:p>
          </table:table-cell>
          <table:table-cell table:number-columns-repeated="16369"/>
        </table:table-row>
        <table:table-row table:style-name="ro1">
          <table:table-cell office:value-type="float" office:value="993" table:style-name="ce3">
            <text:p>99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81112476</text:p>
          </table:table-cell>
          <table:table-cell office:value-type="string" table:style-name="ce1">
            <text:p>Carolina Quintero Moreno</text:p>
          </table:table-cell>
          <table:table-cell office:value-type="date" office:date-value="1993-02-04T00:00:00" table:style-name="ce4">
            <text:p>1993-02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2749536</text:p>
          </table:table-cell>
          <table:table-cell office:value-type="string" table:style-name="ce1">
            <text:p>carolina.quintero993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21T12:54:00" table:style-name="ce5">
            <text:p>2026-05-21 12:54</text:p>
          </table:table-cell>
          <table:table-cell office:value-type="date" office:date-value="2026-05-29T05:38:00" table:style-name="ce6">
            <text:p>2026-05-29 05:38</text:p>
          </table:table-cell>
          <table:table-cell table:number-columns-repeated="16369"/>
        </table:table-row>
        <table:table-row table:style-name="ro1">
          <table:table-cell office:value-type="float" office:value="994" table:style-name="ce3">
            <text:p>99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96522997</text:p>
          </table:table-cell>
          <table:table-cell office:value-type="string" table:style-name="ce1">
            <text:p>Ana Rojas Rodríguez</text:p>
          </table:table-cell>
          <table:table-cell office:value-type="date" office:date-value="1999-02-26T00:00:00" table:style-name="ce4">
            <text:p>1999-02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6843002</text:p>
          </table:table-cell>
          <table:table-cell office:value-type="string" table:style-name="ce1">
            <text:p>ana.rojas99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5-17T20:02:00" table:style-name="ce5">
            <text:p>2026-05-17 20:02</text:p>
          </table:table-cell>
          <table:table-cell office:value-type="date" office:date-value="2026-06-04T23:36:00" table:style-name="ce6">
            <text:p>2026-06-04 23:36</text:p>
          </table:table-cell>
          <table:table-cell table:number-columns-repeated="16369"/>
        </table:table-row>
        <table:table-row table:style-name="ro1">
          <table:table-cell office:value-type="float" office:value="995" table:style-name="ce3">
            <text:p>99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16247359</text:p>
          </table:table-cell>
          <table:table-cell office:value-type="string" table:style-name="ce1">
            <text:p>Andrea Rojas Ramírez</text:p>
          </table:table-cell>
          <table:table-cell office:value-type="date" office:date-value="1999-06-08T00:00:00" table:style-name="ce4">
            <text:p>1999-06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6339778</text:p>
          </table:table-cell>
          <table:table-cell office:value-type="string" table:style-name="ce1">
            <text:p>andrea.rojas995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13">
            <text:p>Alta</text:p>
          </table:table-cell>
          <table:table-cell office:value-type="string" table:style-name="ce15">
            <text:p>Atendido</text:p>
          </table:table-cell>
          <table:table-cell office:value-type="date" office:date-value="2026-03-15T20:07:00" table:style-name="ce5">
            <text:p>2026-03-15 20:07</text:p>
          </table:table-cell>
          <table:table-cell office:value-type="date" office:date-value="2026-06-24T00:36:00" table:style-name="ce6">
            <text:p>2026-06-24 00:36</text:p>
          </table:table-cell>
          <table:table-cell table:number-columns-repeated="16369"/>
        </table:table-row>
        <table:table-row table:style-name="ro1">
          <table:table-cell office:value-type="float" office:value="996" table:style-name="ce3">
            <text:p>99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58568702</text:p>
          </table:table-cell>
          <table:table-cell office:value-type="string" table:style-name="ce1">
            <text:p>Daniel Castro Ramírez</text:p>
          </table:table-cell>
          <table:table-cell office:value-type="date" office:date-value="2000-10-14T00:00:00" table:style-name="ce4">
            <text:p>2000-10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9736202</text:p>
          </table:table-cell>
          <table:table-cell office:value-type="string" table:style-name="ce1">
            <text:p>daniel.castro99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Atendido</text:p>
          </table:table-cell>
          <table:table-cell office:value-type="date" office:date-value="2026-04-16T02:10:00" table:style-name="ce5">
            <text:p>2026-04-16 02:10</text:p>
          </table:table-cell>
          <table:table-cell office:value-type="date" office:date-value="2026-06-13T07:45:00" table:style-name="ce6">
            <text:p>2026-06-13 07:45</text:p>
          </table:table-cell>
          <table:table-cell table:number-columns-repeated="16369"/>
        </table:table-row>
        <table:table-row table:style-name="ro1">
          <table:table-cell office:value-type="float" office:value="997" table:style-name="ce3">
            <text:p>99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4585384</text:p>
          </table:table-cell>
          <table:table-cell office:value-type="string" table:style-name="ce1">
            <text:p>Natalia Rodríguez Pérez</text:p>
          </table:table-cell>
          <table:table-cell office:value-type="date" office:date-value="2000-04-22T00:00:00" table:style-name="ce4">
            <text:p>2000-04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8729385</text:p>
          </table:table-cell>
          <table:table-cell office:value-type="string" table:style-name="ce1">
            <text:p>natalia.rodriguez99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4-25T18:43:00" table:style-name="ce5">
            <text:p>2026-04-25 18:43</text:p>
          </table:table-cell>
          <table:table-cell office:value-type="date" office:date-value="2026-05-09T19:30:00" table:style-name="ce6">
            <text:p>2026-05-09 19:30</text:p>
          </table:table-cell>
          <table:table-cell table:number-columns-repeated="16369"/>
        </table:table-row>
        <table:table-row table:style-name="ro1">
          <table:table-cell office:value-type="float" office:value="998" table:style-name="ce3">
            <text:p>998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202313029</text:p>
          </table:table-cell>
          <table:table-cell office:value-type="string" table:style-name="ce1">
            <text:p>Luisa Sánchez Mendoza</text:p>
          </table:table-cell>
          <table:table-cell office:value-type="date" office:date-value="1992-01-11T00:00:00" table:style-name="ce4">
            <text:p>1992-01-1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3132359</text:p>
          </table:table-cell>
          <table:table-cell office:value-type="string" table:style-name="ce1">
            <text:p>luisa.sanchez998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13">
            <text:p>Baja</text:p>
          </table:table-cell>
          <table:table-cell office:value-type="string" table:style-name="ce15">
            <text:p>Atendido</text:p>
          </table:table-cell>
          <table:table-cell office:value-type="date" office:date-value="2026-05-04T01:26:00" table:style-name="ce5">
            <text:p>2026-05-04 01:26</text:p>
          </table:table-cell>
          <table:table-cell office:value-type="date" office:date-value="2026-06-30T00:37:00" table:style-name="ce6">
            <text:p>2026-06-30 00:37</text:p>
          </table:table-cell>
          <table:table-cell table:number-columns-repeated="16369"/>
        </table:table-row>
        <table:table-row table:style-name="ro1">
          <table:table-cell office:value-type="float" office:value="999" table:style-name="ce3">
            <text:p>99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74661514</text:p>
          </table:table-cell>
          <table:table-cell office:value-type="string" table:style-name="ce1">
            <text:p>Alejandra Carolina Castaño Ramírez</text:p>
          </table:table-cell>
          <table:table-cell office:value-type="date" office:date-value="1985-02-03T00:00:00" table:style-name="ce4">
            <text:p>1985-02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4494967</text:p>
          </table:table-cell>
          <table:table-cell office:value-type="string" table:style-name="ce1">
            <text:p>alejandra.castano999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13">
            <text:p>Media</text:p>
          </table:table-cell>
          <table:table-cell office:value-type="string" table:style-name="ce15">
            <text:p>Pendiente</text:p>
          </table:table-cell>
          <table:table-cell office:value-type="date" office:date-value="2026-05-16T00:40:00" table:style-name="ce5">
            <text:p>2026-05-16 00:40</text:p>
          </table:table-cell>
          <table:table-cell office:value-type="date" office:date-value="2026-06-01T18:36:00" table:style-name="ce6">
            <text:p>2026-06-01 18:36</text:p>
          </table:table-cell>
          <table:table-cell table:number-columns-repeated="16369"/>
        </table:table-row>
        <table:table-row table:style-name="ro1">
          <table:table-cell office:value-type="float" office:value="1000" table:style-name="ce3">
            <text:p>1000</text:p>
          </table:table-cell>
          <table:table-cell office:value-type="string" table:style-name="ce3">
            <text:p>CC</text:p>
          </table:table-cell>
          <table:table-cell office:value-type="string" table:style-name="ce3">
            <text:p>1075859749</text:p>
          </table:table-cell>
          <table:table-cell office:value-type="string" table:style-name="ce3">
            <text:p>Julián Álvarez Pérez</text:p>
          </table:table-cell>
          <table:table-cell office:value-type="date" office:date-value="1950-10-02T00:00:00" table:style-name="ce11">
            <text:p>1950-10-02</text:p>
          </table:table-cell>
          <table:table-cell office:value-type="string" table:style-name="ce3">
            <text:p>Masculino</text:p>
          </table:table-cell>
          <table:table-cell office:value-type="string" table:style-name="ce3">
            <text:p>3223896894</text:p>
          </table:table-cell>
          <table:table-cell office:value-type="string" table:style-name="ce3">
            <text:p>julian.alvarez1000@example.test</text:p>
          </table:table-cell>
          <table:table-cell office:value-type="string" table:style-name="ce3">
            <text:p>EPS002</text:p>
          </table:table-cell>
          <table:table-cell office:value-type="string" table:style-name="ce3">
            <text:p>Nueva EPS</text:p>
          </table:table-cell>
          <table:table-cell office:value-type="string" table:style-name="ce3">
            <text:p>Palmira</text:p>
          </table:table-cell>
          <table:table-cell office:value-type="string" table:style-name="ce14">
            <text:p>Media</text:p>
          </table:table-cell>
          <table:table-cell office:value-type="string" table:style-name="ce16">
            <text:p>Pendiente</text:p>
          </table:table-cell>
          <table:table-cell office:value-type="date" office:date-value="2026-04-13T19:44:00" table:style-name="ce6">
            <text:p>2026-04-13 19:44</text:p>
          </table:table-cell>
          <table:table-cell office:value-type="date" office:date-value="2026-04-30T09:34:00" table:style-name="ce6">
            <text:p>2026-04-30 09:34</text:p>
          </table:table-cell>
          <table:table-cell table:number-columns-repeated="16369"/>
        </table:table-row>
        <table:table-row table:number-rows-repeated="1047575" table:style-name="ro1">
          <table:table-cell table:number-columns-repeated="16384"/>
        </table:table-row>
      </table:table>
      <table:table table:name="Catalogos" table:style-name="ta1">
        <table:table-column table:style-name="co5" table:number-columns-repeated="10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">
            <text:p>eps_codigo</text:p>
          </table:table-cell>
          <table:table-cell office:value-type="string" table:style-name="ce2">
            <text:p>eps_nombre</text:p>
          </table:table-cell>
          <table:table-cell table:style-name="ce1"/>
          <table:table-cell office:value-type="string" table:style-name="ce2">
            <text:p>genero</text:p>
          </table:table-cell>
          <table:table-cell table:style-name="ce1"/>
          <table:table-cell office:value-type="string" table:style-name="ce2">
            <text:p>prioridad</text:p>
          </table:table-cell>
          <table:table-cell table:style-name="ce1"/>
          <table:table-cell office:value-type="string" table:style-name="ce2">
            <text:p>estado</text:p>
          </table:table-cell>
          <table:table-cell table:style-name="ce1"/>
          <table:table-cell office:value-type="string" table:style-name="ce2">
            <text:p>tipo_document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table:style-name="ce1"/>
          <table:table-cell office:value-type="string" table:style-name="ce1">
            <text:p>Femenino</text:p>
          </table:table-cell>
          <table:table-cell table:style-name="ce1"/>
          <table:table-cell office:value-type="string" table:style-name="ce1">
            <text:p>Alta</text:p>
          </table:table-cell>
          <table:table-cell table:style-name="ce1"/>
          <table:table-cell office:value-type="string" table:style-name="ce1">
            <text:p>Pendiente</text:p>
          </table:table-cell>
          <table:table-cell table:style-name="ce1"/>
          <table:table-cell office:value-type="string" table:style-name="ce1">
            <text:p>CC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table:style-name="ce1"/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Media</text:p>
          </table:table-cell>
          <table:table-cell table:style-name="ce1"/>
          <table:table-cell office:value-type="string" table:style-name="ce1">
            <text:p>En atención</text:p>
          </table:table-cell>
          <table:table-cell table:style-name="ce1"/>
          <table:table-cell office:value-type="string" table:style-name="ce1">
            <text:p>TI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table:style-name="ce1"/>
          <table:table-cell office:value-type="string" table:style-name="ce1">
            <text:p>Otro</text:p>
          </table:table-cell>
          <table:table-cell table:style-name="ce1"/>
          <table:table-cell office:value-type="string" table:style-name="ce1">
            <text:p>Baja</text:p>
          </table:table-cell>
          <table:table-cell table:style-name="ce1"/>
          <table:table-cell office:value-type="string" table:style-name="ce1">
            <text:p>Atendido</text:p>
          </table:table-cell>
          <table:table-cell table:style-name="ce1"/>
          <table:table-cell office:value-type="string" table:style-name="ce1">
            <text:p>C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table:style-name="ce1"/>
          <table:table-cell office:value-type="string" table:style-name="ce1">
            <text:p>Prefiere no informar</text:p>
          </table:table-cell>
          <table:table-cell table:number-columns-repeated="5" table:style-name="ce1"/>
          <table:table-cell office:value-type="string" table:style-name="ce1">
            <text:p>P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table:number-columns-repeated="16382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ccionario" table:style-name="ta1">
        <table:table-column table:style-name="co11" table:number-columns-repeated="3" table:default-cell-style-name="ce1"/>
        <table:table-column table:style-name="co12" table:default-cell-style-name="ce1"/>
        <table:table-column table:style-name="co10" table:number-columns-repeated="16380" table:default-cell-style-name="ce1"/>
        <table:table-row table:style-name="ro1">
          <table:table-cell office:value-type="string" table:style-name="ce2">
            <text:p>Campo</text:p>
          </table:table-cell>
          <table:table-cell office:value-type="string" table:style-name="ce2">
            <text:p>Tipo sugerido</text:p>
          </table:table-cell>
          <table:table-cell office:value-type="string" table:style-name="ce2">
            <text:p>Obligatorio</text:p>
          </table:table-cell>
          <table:table-cell office:value-type="string" table:style-name="ce2">
            <text:p>Descripción / regla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aciente_id</text:p>
          </table:table-cell>
          <table:table-cell office:value-type="string" table:style-name="ce7">
            <text:p>BIGINT / INTEGER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Identificador técnico único.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tipo_documento</text:p>
          </table:table-cell>
          <table:table-cell office:value-type="string" table:style-name="ce7">
            <text:p>VARCHAR(3)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Catálogo: CC, TI, CE o PA.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documento</text:p>
          </table:table-cell>
          <table:table-cell office:value-type="string" table:style-name="ce7">
            <text:p>VARCHAR(20)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Único por paciente. No tratar como número para evitar pérdida de ceros.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nombre_completo</text:p>
          </table:table-cell>
          <table:table-cell office:value-type="string" table:style-name="ce7">
            <text:p>VARCHAR(150)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mbre visible del paciente.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fecha_nacimiento</text:p>
          </table:table-cell>
          <table:table-cell office:value-type="string" table:style-name="ce7">
            <text:p>DATE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 puede ser posterior a la fecha actual.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nero</text:p>
          </table:table-cell>
          <table:table-cell office:value-type="string" table:style-name="ce7">
            <text:p>VARCHAR(30)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Valor controlado por catálogo.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telefono</text:p>
          </table:table-cell>
          <table:table-cell office:value-type="string" table:style-name="ce7">
            <text:p>VARCHAR(20)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Dato sintético; no corresponde a personas reales.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correo</text:p>
          </table:table-cell>
          <table:table-cell office:value-type="string" table:style-name="ce7">
            <text:p>VARCHAR(150)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minio example.test para evitar uso accidental.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eps_codigo</text:p>
          </table:table-cell>
          <table:table-cell office:value-type="string" table:style-name="ce7">
            <text:p>VARCHAR(10)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Llave foránea sugerida al catálogo EPS.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eps_nombre</text:p>
          </table:table-cell>
          <table:table-cell office:value-type="string" table:style-name="ce7">
            <text:p>VARCHAR(100)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Incluido para facilidad de carga; en un modelo normalizado se obtiene por relación.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ciudad</text:p>
          </table:table-cell>
          <table:table-cell office:value-type="string" table:style-name="ce7">
            <text:p>VARCHAR(80)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Ciudad de referencia del paciente.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rioridad</text:p>
          </table:table-cell>
          <table:table-cell office:value-type="string" table:style-name="ce7">
            <text:p>VARCHAR(10)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Alta, Media o Baja.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estado</text:p>
          </table:table-cell>
          <table:table-cell office:value-type="string" table:style-name="ce7">
            <text:p>VARCHAR(20)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Pendiente, En atención o Atendido.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fecha_creacion</text:p>
          </table:table-cell>
          <table:table-cell office:value-type="string" table:style-name="ce7">
            <text:p>TIMESTAMP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Fecha de ingreso a la lista.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fecha_actualizacion</text:p>
          </table:table-cell>
          <table:table-cell office:value-type="string" table:style-name="ce7">
            <text:p>TIMESTAMP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Última modificación del registro.</text:p>
          </table:table-cell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  <table:table table:name="Usuarios_Login" table:style-name="ta1"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15" table:default-cell-style-name="ce1"/>
        <table:table-column table:style-name="co10" table:number-columns-repeated="16377" table:default-cell-style-name="ce1"/>
        <table:table-row table:style-name="ro1">
          <table:table-cell office:value-type="string" table:style-name="ce2">
            <text:p>usuario_id</text:p>
          </table:table-cell>
          <table:table-cell office:value-type="string" table:style-name="ce2">
            <text:p>usuario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rol</text:p>
          </table:table-cell>
          <table:table-cell office:value-type="string" table:style-name="ce2">
            <text:p>activo</text:p>
          </table:table-cell>
          <table:table-cell office:value-type="string" table:style-name="ce2">
            <text:p>password_demo</text:p>
          </table:table-cell>
          <table:table-cell office:value-type="string" table:style-name="ce2">
            <text:p>nota</text:p>
          </table:table-cell>
          <table:table-cell table:number-columns-repeated="16377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7">
            <text:p>admin.demo</text:p>
          </table:table-cell>
          <table:table-cell office:value-type="string" table:style-name="ce7">
            <text:p>Administrador Demo</text:p>
          </table:table-cell>
          <table:table-cell office:value-type="string" table:style-name="ce7">
            <text:p>ADMIN</text:p>
          </table:table-cell>
          <table:table-cell office:value-type="boolean" office:boolean-value="true" table:style-name="ce8">
            <text:p>VERDADERO</text:p>
          </table:table-cell>
          <table:table-cell office:value-type="string" table:style-name="ce7">
            <text:p>Demo2026*</text:p>
          </table:table-cell>
          <table:table-cell office:value-type="string" table:style-name="ce7">
            <text:p>Solo para ambiente de prueba. En una solución real almacenar hash.</text:p>
          </table:table-cell>
          <table:table-cell table:number-columns-repeated="16377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operador.demo</text:p>
          </table:table-cell>
          <table:table-cell office:value-type="string" table:style-name="ce7">
            <text:p>Operador Demo</text:p>
          </table:table-cell>
          <table:table-cell office:value-type="string" table:style-name="ce7">
            <text:p>OPERADOR</text:p>
          </table:table-cell>
          <table:table-cell office:value-type="boolean" office:boolean-value="true" table:style-name="ce8">
            <text:p>VERDADERO</text:p>
          </table:table-cell>
          <table:table-cell office:value-type="string" table:style-name="ce7">
            <text:p>Demo2026*</text:p>
          </table:table-cell>
          <table:table-cell office:value-type="string" table:style-name="ce7">
            <text:p>Solo para ambiente de prueba. En una solución real almacenar hash.</text:p>
          </table:table-cell>
          <table:table-cell table:number-columns-repeated="16377"/>
        </table:table-row>
        <table:table-row table:number-rows-repeated="1048573" table:style-name="ro1">
          <table:table-cell table:number-columns-repeated="16384"/>
        </table:table-row>
      </table:table>
      <table:table table:name="LEEME" table:style-name="ta1">
        <table:table-column table:style-name="co14" table:default-cell-style-name="ce1"/>
        <table:table-column table:style-name="co16" table:default-cell-style-name="ce1"/>
        <table:table-column table:style-name="co10" table:number-columns-repeated="16382" table:default-cell-style-name="ce1"/>
        <table:table-row table:style-name="ro1">
          <table:table-cell office:value-type="string" table:number-columns-spanned="2" table:number-rows-spanned="1" table:style-name="ce12">
            <text:p>DATOS SINTÉTICOS - PRUEBA TÉCNICA FULL STACK JUNIOR 2026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9">
            <text:p>Contenido</text:p>
          </table:table-cell>
          <table:table-cell table:style-name="ce9"/>
          <table:table-cell table:number-columns-repeated="16382"/>
        </table:table-row>
        <table:table-row table:style-name="ro1">
          <table:table-cell office:value-type="string" table:style-name="ce7">
            <text:p>Pacientes</text:p>
          </table:table-cell>
          <table:table-cell office:value-type="string" table:style-name="ce7">
            <text:p>1.000 registros sintéticos para importar o usar como semilla.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atalogos</text:p>
          </table:table-cell>
          <table:table-cell office:value-type="string" table:style-name="ce7">
            <text:p>Valores válidos para EPS, género, prioridad, estado y tipo de documento.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iccionario</text:p>
          </table:table-cell>
          <table:table-cell office:value-type="string" table:style-name="ce7">
            <text:p>Definición funcional y tipo sugerido de cada campo.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Usuarios_Login</text:p>
          </table:table-cell>
          <table:table-cell office:value-type="string" table:style-name="ce7">
            <text:p>Usuarios demo para el login sencillo solicitado.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9">
            <text:p>Consideraciones</text:p>
          </table:table-cell>
          <table:table-cell table:style-name="ce9"/>
          <table:table-cell table:number-columns-repeated="16382"/>
        </table:table-row>
        <table:table-row table:style-name="ro1">
          <table:table-cell office:value-type="string" table:style-name="ce7">
            <text:p>Los datos son completamente ficticios y no deben tratarse como información clínica real.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7">
            <text:p>Los correos usan el dominio reservado example.test.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7">
            <text:p>El candidato puede normalizar el modelo y separar EPS u otros catálogos en tablas relacionadas.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7">
            <text:p>No es obligatorio importar los 1.000 registros; puede usar una muestra, pero debe explicar su decisión.</text:p>
          </table:table-cell>
          <table:table-cell table:style-name="ce7"/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database-ranges>
        <table:database-range table:target-range-address="Pacientes.A1:Pacientes.O1001" table:name="PacientesTabl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rlito" svg:font-family="Carlito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rlito" style:font-name-asian="Carlito" style:font-name-complex="Carlito" fo:font-size="11pt" style:font-size-asian="11pt" style:font-size-complex="11pt"/>
    </style:style>
    <style:style style:name="cf1" style:family="table-cell">
      <style:table-cell-properties fo:background-color="#FECACA"/>
      <style:text-properties fo:color="#991B1B" fo:font-weight="bold" style:font-weight-asian="bold" style:font-weight-complex="bold"/>
    </style:style>
    <style:style style:name="cf2" style:family="table-cell">
      <style:table-cell-properties fo:background-color="#FEF3C7"/>
    </style:style>
    <style:style style:name="cf3" style:family="table-cell">
      <style:table-cell-properties fo:background-color="#DCFCE7"/>
    </style:style>
    <style:style style:name="cf4" style:family="table-cell">
      <style:table-cell-properties fo:background-color="#FFEDD5"/>
    </style:style>
    <style:style style:name="cf5" style:family="table-cell">
      <style:table-cell-properties fo:background-color="#DBEAFE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6-07-10T19:03:02Z</meta:creation-date>
    <dc:date>2026-07-14T19:00:28Z</dc:date>
  </office:meta>
</office:document-meta>
</file>